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1cm"/>
    </style:style>
    <style:style style:name="Tabela1.B" style:family="table-column">
      <style:table-column-properties style:column-width="5.535cm"/>
    </style:style>
    <style:style style:name="Tabela1.C" style:family="table-column">
      <style:table-column-properties style:column-width="8.655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Text_20_body">
      <style:paragraph-properties style:writing-mode="lr-tb" style:writing-mode-automatic="false"/>
      <style:text-properties style:font-name="Google Sans Tex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Preformatted_20_Text">
      <style:paragraph-properties fo:margin-top="0cm" fo:margin-bottom="0cm" style:contextual-spacing="false" fo:line-height="114%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page" fo:padding="0cm" fo:border="none"/>
      <style:text-properties style:font-name="Google Sans Tex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/>
    </style:style>
    <style:style style:name="P1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 fo:break-before="page"/>
      <style:text-properties style:font-name="Google Sans" officeooo:rsid="000a1a73" officeooo:paragraph-rsid="000a1a73"/>
    </style:style>
    <style:style style:name="P14" style:family="paragraph" style:parent-style-name="Text_20_body">
      <style:paragraph-properties style:writing-mode="lr-tb" style:writing-mode-automatic="false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6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2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</style:style>
    <style:style style:name="P23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4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6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7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8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9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3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34" style:family="paragraph" style:parent-style-name="Preformatted_20_Text">
      <style:paragraph-properties fo:margin-top="0cm" fo:margin-bottom="0cm" style:contextual-spacing="false" fo:line-height="114%"/>
    </style:style>
    <style:style style:name="P35" style:family="paragraph" style:parent-style-name="Standard">
      <style:paragraph-properties style:writing-mode="lr-tb" style:writing-mode-automatic="fals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style="italic"/>
    </style:style>
    <style:style style:name="T5" style:family="text">
      <style:text-properties officeooo:rsid="0008d6d7"/>
    </style:style>
    <style:style style:name="T6" style:family="text">
      <style:text-properties style:font-name="Google San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<text:span text:style-name="T1">formulários em HTML</text:span> (<text:span text:style-name="Source_20_Text"><text:span text:style-name="T2">&lt;form&gt;</text:span></text:span>) são a principal ferramenta para coletar dados dos usuários na web. É através deles que fazemos login, realizamos compras, enviamos mensagens de contato e fazemos buscas.</text:p>
      <text:p text:style-name="P1"/>
      <text:section text:style-name="Sect1" text:name="model-response-message-contentr_254996c05e852df7">
        <text:p text:style-name="P2">Entender como eles funcionam envolve duas partes: a <text:span text:style-name="T1">estrutura no HTML</text:span> (onde o usuário digita) e o <text:span text:style-name="T1">envio dos dados</text:span> (para onde as informações vão).</text:p>
        <text:h text:style-name="P3" text:outline-level="2">1. A Estrutura Básica de um Formulário</text:h>
        <text:p text:style-name="P2">Um formulário precisa de uma tag pai <text:span text:style-name="Source_20_Text"><text:span text:style-name="T2">&lt;form&gt;</text:span></text:span> e de elementos internos para capturar os dados (como <text:span text:style-name="Source_20_Text"><text:span text:style-name="T2">&lt;input&gt;</text:span></text:span>, <text:span text:style-name="Source_20_Text"><text:span text:style-name="T2">&lt;label&gt;</text:span></text:span> e <text:span text:style-name="Source_20_Text"><text:span text:style-name="T2">&lt;button&gt;</text:span></text:span>).</text:p>
        <text:p text:style-name="P2">HTML</text:p>
        <text:p text:style-name="P4"><text:span text:style-name="Source_20_Text"><text:span text:style-name="T2">&lt;form action="/enviar-dados" method="POST"&gt;</text:span></text:span></text:p>
        <text:p text:style-name="P4"><text:span text:style-name="Source_20_Text"><text:s text:c="2"/></text:span><text:span text:style-name="Source_20_Text"><text:span text:style-name="T2">&lt;label for="nome"&gt;Nome:&lt;/label&gt;</text:span></text:span></text:p>
        <text:p text:style-name="P4"><text:span text:style-name="Source_20_Text"><text:s text:c="2"/></text:span><text:span text:style-name="Source_20_Text"><text:span text:style-name="T2">&lt;input type="text" id="nome" name="nome_usuario" placeholder="Digite seu nome" required&gt;</text:span></text:span></text:p>
        <text:p text:style-name="P5"/>
        <text:p text:style-name="P4"><text:span text:style-name="Source_20_Text"><text:s text:c="2"/></text:span><text:span text:style-name="Source_20_Text"><text:span text:style-name="T2">&lt;label for="email"&gt;E-mail:&lt;/label&gt;</text:span></text:span></text:p>
        <text:p text:style-name="P4"><text:span text:style-name="Source_20_Text"><text:s text:c="2"/></text:span><text:span text:style-name="Source_20_Text"><text:span text:style-name="T2">&lt;input type="email" id="email" name="email_usuario" required&gt;</text:span></text:span></text:p>
        <text:p text:style-name="P5"/>
        <text:p text:style-name="P4"><text:span text:style-name="Source_20_Text"><text:s text:c="2"/></text:span><text:span text:style-name="Source_20_Text"><text:span text:style-name="T2">&lt;button type="submit"&gt;Enviar&lt;/button&gt;</text:span></text:span></text:p>
        <text:p text:style-name="P4"><text:span text:style-name="Source_20_Text"><text:span text:style-name="T2">&lt;/form&gt;</text:span></text:span></text:p>
        <text:p text:style-name="P4"><text:span text:style-name="Source_20_Text"><text:span text:style-name="T2"/></text:span></text:p>
        <text:h text:style-name="P6" text:outline-level="3">O que significam esses atributos vitais?</text:h>
        <text:list text:style-name="L1">
          <text:list-item>
            <text:p text:style-name="P7"><text:span text:style-name="Source_20_Text"><text:span text:style-name="T3">action</text:span></text:span><text:span text:style-name="T1">:</text:span> É a URL (o endereço no servidor) para onde os dados do formulário serão enviados quando o usuário clicar no botão.</text:p>
          </text:list-item>
          <text:list-item>
            <text:p text:style-name="P7"><text:span text:style-name="Source_20_Text"><text:span text:style-name="T3">method</text:span></text:span><text:span text:style-name="T1">:</text:span> O método HTTP usado para enviar os dados (os mais comuns são <text:span text:style-name="Source_20_Text"><text:span text:style-name="T2">GET</text:span></text:span> e <text:span text:style-name="Source_20_Text"><text:span text:style-name="T2">POST</text:span></text:span>).</text:p>
          </text:list-item>
          <text:list-item>
            <text:p text:style-name="P7"><text:span text:style-name="Source_20_Text"><text:span text:style-name="T3">name</text:span></text:span><text:span text:style-name="T1">:</text:span> <text:span text:style-name="T1">O atributo mais importante do input.</text:span> O servidor usa o valor do <text:span text:style-name="Source_20_Text"><text:span text:style-name="T2">name</text:span></text:span> para identificar o que foi digitado. Se o input não tiver <text:span text:style-name="Source_20_Text"><text:span text:style-name="T2">name</text:span></text:span>, o dado não é enviado.</text:p>
          </text:list-item>
          <text:list-item>
            <text:p text:style-name="P7"><text:span text:style-name="Source_20_Text"><text:span text:style-name="T3">for</text:span></text:span><text:span text:style-name="T1"> (no label) e </text:span><text:span text:style-name="Source_20_Text"><text:span text:style-name="T3">id</text:span></text:span><text:span text:style-name="T1"> (no input):</text:span> Devem ter o mesmo valor. Isso liga o texto ao campo correspondente, melhorando a acessibilidade e permitindo que o usuário clique no texto para focar no campo.</text:p>
          </text:list-item>
        </text:list>
        <text:p text:style-name="P8"/>
        <text:h text:style-name="P3" text:outline-level="2">2. Métodos de Envio: GET vs. POST</text:h>
        <text:p text:style-name="P2">A escolha do método muda completamente a forma como os dados viajam pela internet:</text:p>
        <text:list text:style-name="L2">
          <text:list-item>
            <text:p text:style-name="P9"><text:span text:style-name="Source_20_Text"><text:span text:style-name="T3">GET</text:span></text:span><text:span text:style-name="T1"> (Padrão):</text:span> Envia os dados anexados diretamente na URL (ex: <text:span text:style-name="Source_20_Text"><text:span text:style-name="T2">seusite.com/buscar?termo=html</text:span></text:span>).</text:p>
            <text:list>
              <text:list-item>
                <text:p text:style-name="P9"><text:span text:style-name="T4">Quando usar:</text:span> Em sistemas de busca ou filtros.</text:p>
              </text:list-item>
              <text:list-item>
                <text:p text:style-name="P9"><text:span text:style-name="T4">Atenção:</text:span> <text:span text:style-name="T1">Nunca</text:span> use GET para senhas ou dados sensíveis, pois as informações ficam visíveis no histórico do navegador.</text:p>
              </text:list-item>
            </text:list>
          </text:list-item>
          <text:list-item>
            <text:p text:style-name="P9"><text:span text:style-name="Source_20_Text"><text:span text:style-name="T3">POST</text:span></text:span><text:span text:style-name="T1">:</text:span> Envia os dados "escondidos" dentro do corpo da requisição HTTP.</text:p>
            <text:list>
              <text:list-item>
                <text:p text:style-name="P9"><text:span text:style-name="T4">Quando usar:</text:span> Para cadastros, logins, envio de arquivos e dados sensíveis. É muito mais seguro e não tem limite de tamanho de dados.</text:p>
              </text:list-item>
              <text:list-item>
                <text:p text:style-name="P10"/>
              </text:list-item>
            </text:list>
          </text:list-item>
        </text:list>
        <text:h text:style-name="P3" text:outline-level="2"><text:span text:style-name="T5">3</text:span>. Validação Nativa (Sem JavaScript)</text:h>
        <text:p text:style-name="P2">Você pode impedir que o usuário envie o formulário com dados errados ou em branco usando atributos de validação do próprio HTML5:</text:p>
        <text:list text:style-name="L3">
          <text:list-item>
            <text:p text:style-name="P11"><text:span text:style-name="Source_20_Text"><text:span text:style-name="T3">required</text:span></text:span><text:span text:style-name="T1">:</text:span> Torna o preenchimento do campo obrigatório.</text:p>
          </text:list-item>
          <text:list-item>
            <text:p text:style-name="P11"><text:span text:style-name="Source_20_Text"><text:span text:style-name="T3">minlength</text:span></text:span><text:span text:style-name="T1"> e </text:span><text:span text:style-name="Source_20_Text"><text:span text:style-name="T3">maxlength</text:span></text:span><text:span text:style-name="T1">:</text:span> Definem o limite mínimo e máximo de caracteres.</text:p>
          </text:list-item>
          <text:list-item>
            <text:p text:style-name="P11"><text:span text:style-name="Source_20_Text"><text:span text:style-name="T3">min</text:span></text:span><text:span text:style-name="T1"> e </text:span><text:span text:style-name="Source_20_Text"><text:span text:style-name="T3">max</text:span></text:span><text:span text:style-name="T1">:</text:span> Para campos numéricos ou de data, define os valores limites.</text:p>
          </text:list-item>
          <text:list-item>
            <text:p text:style-name="P11"><text:span text:style-name="Source_20_Text"><text:span text:style-name="T3">pattern</text:span></text:span><text:span text:style-name="T1">:</text:span> Permite usar Expressões Regulares (RegEx) para validar formatos muito específicos (como um formato exato de CPF ou telefone).</text:p>
          </text:list-item>
        </text:list>
        <text:p text:style-name="P2">HTML</text:p>
        <text:p text:style-name="P4"><text:span text:style-name="Source_20_Text"><text:span text:style-name="T2">&lt;input type="password" name="senha" minlength="8" required&gt;</text:span></text:span></text:p>
        <text:p text:style-name="P12">💡 <text:span text:style-name="T1">Dica de ouro sobre Acessibilidade:</text:span></text:p>
        <text:p text:style-name="P12">Sempre utilize a tag <text:span text:style-name="Source_20_Text"><text:span text:style-name="T2">&lt;button type="submit"&gt;</text:span></text:span> para enviar o formulário em vez de um link comum (<text:span text:style-name="Source_20_Text"><text:span text:style-name="T2">&lt;a&gt;</text:span></text:span>) ou um input genérico. Isso garante que o usuário consiga enviar o formulário apenas apertando a tecla "Enter" do teclado, facilitando a navegação de quem não usa mouse.</text:p>
      </text:section>
      <text:p text:style-name="P1"/>
      <text:h text:style-name="P13" text:outline-level="2">Tag input</text:h>
      <text:p text:style-name="P14"><text:span text:style-name="T2">Para um designer de UI/UX ou um desenvolvedor focado na experiência do usuário, a tag </text:span><text:span text:style-name="Source_20_Text"><text:span text:style-name="T2">&lt;input&gt;</text:span></text:span><text:span text:style-name="T2"> é a joia da coroa do HTML5. Ela não é apenas um campo onde o usuário digita; ela determina </text:span><text:span text:style-name="T3">como o usuário interage com o sistema</text:span><text:span text:style-name="T2">, dita o comportamento dos teclados móveis e afeta diretamente a taxa de conversão de um formulário.</text:span></text:p>
      <text:p text:style-name="P1"/>
      <text:section text:style-name="Sect1" text:name="model-response-message-contentr_2c43d4550e2a4ea1">
        <text:p text:style-name="P15"><text:span text:style-name="T2">Abaixo, preparei um guia detalhado com os </text:span><text:span text:style-name="Source_20_Text"><text:span text:style-name="T2">type</text:span></text:span><text:span text:style-name="T2"> mais relevantes para UI/UX, explicando o impacto visual, comportamental e de acessibilidade de cada um.</text:span></text:p>
        <text:h text:style-name="P3" text:outline-level="2">1. <text:bookmark-start text:name="__DdeLink__1_1123844209"/>Entrada de Texto e Dados Pessoais<text:bookmark-end text:name="__DdeLink__1_1123844209"/></text:h>
        <text:h text:style-name="P16" text:outline-level="3"><text:span text:style-name="Source_20_Text"><text:span text:style-name="T2">type="text"</text:span></text:span></text:h>
        <text:p text:style-name="P2">O campo genérico padrão.</text:p>
        <text:list text:style-name="L4">
          <text:list-item>
            <text:p text:style-name="P17"><text:span text:style-name="T3">Foco UI/UX:</text:span><text:span text:style-name="T2"> Deve ser usado apenas quando não houver um tipo mais específico. Evite deixá-lo sem o atributo </text:span><text:span text:style-name="Source_20_Text"><text:span text:style-name="T2">autocomplete</text:span></text:span><text:span text:style-name="T2"> adequado (ex: </text:span><text:span text:style-name="Source_20_Text"><text:span text:style-name="T2">autocomplete="name"</text:span></text:span><text:span text:style-name="T2"> ou </text:span><text:span text:style-name="Source_20_Text"><text:span text:style-name="T2">autocomplete="username"</text:span></text:span><text:span text:style-name="T2">), pois o preenchimento automático economiza cliques do usuário.</text:span></text:p>
          </text:list-item>
        </text:list>
        <text:h text:style-name="P16" text:outline-level="3"><text:span text:style-name="Source_20_Text"><text:span text:style-name="T2">type="email"</text:span></text:span></text:h>
        <text:list text:style-name="L5">
          <text:list-item>
            <text:p text:style-name="P18"><text:span text:style-name="T3">O impacto em UX:</text:span><text:span text:style-name="T2"> Em dispositivos móveis (iOS e Android), este tipo muda o teclado nativo para exibir o caractere </text:span><text:span text:style-name="Source_20_Text"><text:span text:style-name="T2">@</text:span></text:span><text:span text:style-name="T2"> e o ponto (</text:span><text:span text:style-name="Source_20_Text"><text:span text:style-name="T2">.</text:span></text:span><text:span text:style-name="T2">) na tela principal, sem que o usuário precise alternar de teclado.</text:span></text:p>
          </text:list-item>
          <text:list-item>
            <text:p text:style-name="P18"><text:span text:style-name="T3">Validação:</text:span><text:span text:style-name="T2"> O navegador impede o envio se faltar o </text:span><text:span text:style-name="Source_20_Text"><text:span text:style-name="T2">@</text:span></text:span><text:span text:style-name="T2"> ou o domínio, poupando o desenvolvimento de validações complexas em JavaScript para erros simples.</text:span></text:p>
          </text:list-item>
        </text:list>
        <text:h text:style-name="P16" text:outline-level="3"><text:span text:style-name="Source_20_Text"><text:span text:style-name="T2">type="password"</text:span></text:span></text:h>
        <text:list text:style-name="L6">
          <text:list-item>
            <text:p text:style-name="P19"><text:span text:style-name="T1">O impacto em UX:</text:span> Ofusca os caracteres digitados.</text:p>
          </text:list-item>
          <text:list-item>
            <text:p text:style-name="P20"><text:span text:style-name="T3">Boa prática de UI:</text:span><text:span text:style-name="T2"> Sempre projete um padrão visual de "Olho" (ícone para revelar/esconder a senha). O HTML esconde os caracteres, mas a alternância dinâmica entre </text:span><text:span text:style-name="Source_20_Text"><text:span text:style-name="T2">type="password"</text:span></text:span><text:span text:style-name="T2"> e </text:span><text:span text:style-name="Source_20_Text"><text:span text:style-name="T2">type="text"</text:span></text:span><text:span text:style-name="T2"> via JavaScript para mostrar a senha melhora drasticamente a experiência, evitando erros de digitação.</text:span></text:p>
          </text:list-item>
        </text:list>
        <text:h text:style-name="P3" text:outline-level="2"><text:soft-page-break/>2. Seleção de Opções e Decisões</text:h>
        <text:h text:style-name="P16" text:outline-level="3"><text:span text:style-name="Source_20_Text"><text:span text:style-name="T2">type="checkbox"</text:span></text:span><text:span text:style-name="T6"> vs </text:span><text:span text:style-name="Source_20_Text"><text:span text:style-name="T2">type="radio"</text:span></text:span></text:h>
        <text:p text:style-name="P2">Estes dois tipos são frequentemente confundidos, mas possuem regras psicológicas de UX estritas:</text:p>
        <text:list text:style-name="L7">
          <text:list-item>
            <text:p text:style-name="P21"><text:span text:style-name="Source_20_Text"><text:span text:style-name="T3">radio</text:span></text:span><text:span text:style-name="T3"> (Seleção Única):</text:span><text:span text:style-name="T2"> Use quando o usuário deve escolher </text:span><text:span text:style-name="T3">apenas uma</text:span><text:span text:style-name="T2"> opção de um grupo (ex: Forma de pagamento: Crédito, Débito ou Pix). Todos devem compartilhar o mesmo </text:span><text:span text:style-name="Source_20_Text"><text:span text:style-name="T2">name</text:span></text:span><text:span text:style-name="T2">.</text:span></text:p>
          </text:list-item>
          <text:list-item>
            <text:p text:style-name="P21"><text:span text:style-name="Source_20_Text"><text:span text:style-name="T3">checkbox</text:span></text:span><text:span text:style-name="T3"> (Seleção Múltipla/Confirmação):</text:span><text:span text:style-name="T2"> Use quando o usuário pode escolher várias opções ou para aceites binários (ex: "Aceito os Termos de Uso").</text:span></text:p>
          </text:list-item>
        </text:list>
        <text:p text:style-name="P2">[Image comparing UX use cases for radio buttons showing single choice versus checkboxes showing multiple choices]</text:p>
        <text:p text:style-name="P22">🎨 <text:span text:style-name="T3">Nota de UI:</text:span><text:span text:style-name="T2"> Os estilos nativos de checkbox e radio variam muito entre navegadores (Chrome, Safari, Firefox). Em UI/UX, é padrão "escondê-los" visualmente e usar a tag </text:span><text:span text:style-name="Source_20_Text"><text:span text:style-name="T2">&lt;label&gt;</text:span></text:span><text:span text:style-name="T2"> acoplada para desenhar componentes customizados e idênticos em qualquer tela.</text:span></text:p>
        <text:h text:style-name="P3" text:outline-level="2">3. Controles Numéricos e Quantidades</text:h>
        <text:h text:style-name="P16" text:outline-level="3"><text:span text:style-name="Source_20_Text"><text:span text:style-name="T2">type="number"</text:span></text:span></text:h>
        <text:list text:style-name="L8">
          <text:list-item>
            <text:p text:style-name="P23"><text:span text:style-name="T1">O impacto em UX:</text:span> Força o teclado numérico em dispositivos móveis. Inclui pequenas setas nativas para aumentar/diminuir o valor no desktop.</text:p>
          </text:list-item>
          <text:list-item>
            <text:p text:style-name="P24"><text:span text:style-name="T3">Atributos cruciais:</text:span><text:span text:style-name="T2"> </text:span><text:span text:style-name="Source_20_Text"><text:span text:style-name="T2">min</text:span></text:span><text:span text:style-name="T2">, </text:span><text:span text:style-name="Source_20_Text"><text:span text:style-name="T2">max</text:span></text:span><text:span text:style-name="T2"> e </text:span><text:span text:style-name="Source_20_Text"><text:span text:style-name="T2">step</text:span></text:span><text:span text:style-name="T2"> (o intervalo de aumento, ex: </text:span><text:span text:style-name="Source_20_Text"><text:span text:style-name="T2">step="0.5"</text:span></text:span><text:span text:style-name="T2">).</text:span></text:p>
          </text:list-item>
          <text:list-item>
            <text:p text:style-name="P24"><text:span text:style-name="T3">Crítica de UX:</text:span><text:span text:style-name="T2"> As setinhas nativas do desktop costumam ser muito pequenas e difíceis de clicar. Muitas vezes, designers preferem criar botões customizados de </text:span><text:span text:style-name="Source_20_Text"><text:span text:style-name="T2">+</text:span></text:span><text:span text:style-name="T2"> e </text:span><text:span text:style-name="Source_20_Text"><text:span text:style-name="T2">-</text:span></text:span><text:span text:style-name="T2"> via JavaScript por questões de usabilidade.</text:span></text:p>
          </text:list-item>
        </text:list>
        <text:h text:style-name="P16" text:outline-level="3"><text:span text:style-name="Source_20_Text"><text:span text:style-name="T2">type="range"</text:span></text:span></text:h>
        <text:p text:style-name="P2">Cria uma barra de rolagem horizontal (<text:span text:style-name="T4">slider</text:span>).</text:p>
        <text:list text:style-name="L9">
          <text:list-item>
            <text:p text:style-name="P25"><text:span text:style-name="T1">O impacto em UX:</text:span> Excelente para seleções imprecisas ou de intensidade (ex: Volume, Distância em um app de entregas, Filtro de preço de hotel).</text:p>
          </text:list-item>
          <text:list-item>
            <text:p text:style-name="P26"><text:span text:style-name="T3">Parceiro ideal:</text:span><text:span text:style-name="T2"> Sempre deve vir acompanhado de uma tag </text:span><text:span text:style-name="Source_20_Text"><text:span text:style-name="T2">&lt;output&gt;</text:span></text:span><text:span text:style-name="T2"> para mostrar ao usuário o valor exato selecionado em tempo real conforme ele arrasta o controle.</text:span></text:p>
          </text:list-item>
        </text:list>
        <text:h text:style-name="P3" text:outline-level="2"><text:soft-page-break/>4. Dados Temporais e Escolhas Avançadas</text:h>
        <text:h text:style-name="P16" text:outline-level="3"><text:span text:style-name="Source_20_Text"><text:span text:style-name="T2">type="date"</text:span></text:span></text:h>
        <text:list text:style-name="L10">
          <text:list-item>
            <text:p text:style-name="P27"><text:span text:style-name="T1">O impacto em UX:</text:span> Abre o seletor de calendário nativo do dispositivo do usuário (o seletor do iOS é incrivelmente fluido e familiar para o usuário da Apple).</text:p>
          </text:list-item>
          <text:list-item>
            <text:p text:style-name="P27"><text:span text:style-name="T1">Vantagem:</text:span> Dispensa a necessidade de carregar bibliotecas pesadas de terceiros (como jQuery UI ou Datepickers complexos), melhorando o carregamento da página.</text:p>
          </text:list-item>
        </text:list>
        <text:h text:style-name="P16" text:outline-level="3"><text:span text:style-name="Source_20_Text"><text:span text:style-name="T2">type="tel"</text:span></text:span></text:h>
        <text:list text:style-name="L11">
          <text:list-item>
            <text:p text:style-name="P28"><text:span text:style-name="T3">O impacto em UX:</text:span><text:span text:style-name="T2"> </text:span><text:span text:style-name="T3">Crucial para mobile.</text:span><text:span text:style-name="T2"> Diferente do </text:span><text:span text:style-name="Source_20_Text"><text:span text:style-name="T2">type="number"</text:span></text:span><text:span text:style-name="T2">, o </text:span><text:span text:style-name="Source_20_Text"><text:span text:style-name="T2">type="tel"</text:span></text:span><text:span text:style-name="T2"> abre o teclado numérico telefônico tradicional (com teclas grandes, de 0 a 9, além de caracteres como </text:span><text:span text:style-name="Source_20_Text"><text:span text:style-name="T2">*</text:span></text:span><text:span text:style-name="T2"> e </text:span><text:span text:style-name="Source_20_Text"><text:span text:style-name="T2">#</text:span></text:span><text:span text:style-name="T2">). É o tipo ideal para campos de CPF, CNPJ e Telefones.</text:span></text:p>
          </text:list-item>
        </text:list>
        <text:h text:style-name="P16" text:outline-level="3"><text:span text:style-name="Source_20_Text"><text:span text:style-name="T2">type="search"</text:span></text:span></text:h>
        <text:list text:style-name="L12">
          <text:list-item>
            <text:p text:style-name="P29"><text:span text:style-name="T3">O impacto em UX:</text:span><text:span text:style-name="T2"> Visualmente semelhante ao </text:span><text:span text:style-name="Source_20_Text"><text:span text:style-name="T2">text</text:span></text:span><text:span text:style-name="T2">, mas adiciona um ícone de "X" no canto direito do campo quando o usuário começa a digitar, permitindo limpar a busca com um único clique. No teclado mobile, o botão "Ir" ou "Enter" é substituído por uma lupa ou pela palavra "Buscar".</text:span></text:p>
          </text:list-item>
        </text:list>
        <text:h text:style-name="P3" text:outline-level="2">Tabela de Referência Rápida para o Designer de UI</text:h>
        <table:table table:name="Tabela1" table:style-name="Tabela1">
          <table:table-column table:style-name="Tabela1.A"/>
          <table:table-column table:style-name="Tabela1.B"/>
          <table:table-column table:style-name="Tabela1.C"/>
          <table:table-header-rows>
            <table:table-row>
              <table:table-cell table:style-name="Tabela1.A1" office:value-type="string">
                <text:p text:style-name="P30"><text:span text:style-name="Strong_20_Emphasis"><text:span text:style-name="T2">Tipo de Input</text:span></text:span></text:p>
              </table:table-cell>
              <table:table-cell table:style-name="Tabela1.A1" office:value-type="string">
                <text:p text:style-name="P30"><text:span text:style-name="Strong_20_Emphasis"><text:span text:style-name="T2">Gatilho de Teclado Mobile</text:span></text:span></text:p>
              </table:table-cell>
              <table:table-cell table:style-name="Tabela1.A1" office:value-type="string">
                <text:p text:style-name="P30"><text:span text:style-name="Strong_20_Emphasis"><text:span text:style-name="T2">Melhor Caso de Uso em UI/UX</text:span></text:span></text:p>
              </table:table-cell>
            </table:table-row>
          </table:table-header-rows>
          <table:table-row>
            <table:table-cell table:style-name="Tabela1.A1" office:value-type="string">
              <text:p text:style-name="P31"><text:span text:style-name="Source_20_Text"><text:span text:style-name="T2">email</text:span></text:span></text:p>
            </table:table-cell>
            <table:table-cell table:style-name="Tabela1.A1" office:value-type="string">
              <text:p text:style-name="P31"><text:span text:style-name="T2">Letras + </text:span><text:span text:style-name="Source_20_Text"><text:span text:style-name="T2">@</text:span></text:span><text:span text:style-name="T2"> + </text:span><text:span text:style-name="Source_20_Text"><text:span text:style-name="T2">.</text:span></text:span></text:p>
            </table:table-cell>
            <table:table-cell table:style-name="Tabela1.A1" office:value-type="string">
              <text:p text:style-name="P32">Logins e Newsletters.</text:p>
            </table:table-cell>
          </table:table-row>
          <table:table-row>
            <table:table-cell table:style-name="Tabela1.A1" office:value-type="string">
              <text:p text:style-name="P31"><text:span text:style-name="Source_20_Text"><text:span text:style-name="T2">tel</text:span></text:span></text:p>
            </table:table-cell>
            <table:table-cell table:style-name="Tabela1.A1" office:value-type="string">
              <text:p text:style-name="P32">Teclado de discagem (Gigante)</text:p>
            </table:table-cell>
            <table:table-cell table:style-name="Tabela1.A1" office:value-type="string">
              <text:p text:style-name="P32">Telefone, CPF, CEP, Códigos de Verificação (OTP).</text:p>
            </table:table-cell>
          </table:table-row>
          <table:table-row>
            <table:table-cell table:style-name="Tabela1.A1" office:value-type="string">
              <text:p text:style-name="P31"><text:span text:style-name="Source_20_Text"><text:span text:style-name="T2">number</text:span></text:span></text:p>
            </table:table-cell>
            <table:table-cell table:style-name="Tabela1.A1" office:value-type="string">
              <text:p text:style-name="P32">Teclado Numérico Comum</text:p>
            </table:table-cell>
            <table:table-cell table:style-name="Tabela1.A1" office:value-type="string">
              <text:p text:style-name="P32">Quantidade de itens no carrinho, Idade.</text:p>
            </table:table-cell>
          </table:table-row>
          <table:table-row>
            <table:table-cell table:style-name="Tabela1.A1" office:value-type="string">
              <text:p text:style-name="P31"><text:span text:style-name="Source_20_Text"><text:span text:style-name="T2">range</text:span></text:span></text:p>
            </table:table-cell>
            <table:table-cell table:style-name="Tabela1.A1" office:value-type="string">
              <text:p text:style-name="P32">Slider nativo</text:p>
            </table:table-cell>
            <table:table-cell table:style-name="Tabela1.A1" office:value-type="string">
              <text:p text:style-name="P32">Filtros de preço, Ajuste de raio de distância.</text:p>
            </table:table-cell>
          </table:table-row>
          <table:table-row>
            <table:table-cell table:style-name="Tabela1.A1" office:value-type="string">
              <text:p text:style-name="P31"><text:span text:style-name="Source_20_Text"><text:span text:style-name="T2">search</text:span></text:span></text:p>
            </table:table-cell>
            <table:table-cell table:style-name="Tabela1.A1" office:value-type="string">
              <text:p text:style-name="P32">Teclado com botão <text:soft-page-break/>"Buscar"</text:p>
            </table:table-cell>
            <table:table-cell table:style-name="Tabela1.A1" office:value-type="string">
              <text:p text:style-name="P32">Barras de pesquisa no topo do site.<text:soft-page-break/></text:p>
            </table:table-cell>
          </table:table-row>
        </table:table>
        <text:h text:style-name="P3" text:outline-level="2">O Toque Final de UX: Microinterações de Foco</text:h>
        <text:p text:style-name="P15"><text:span text:style-name="T2">Em termos de UI, o estado de </text:span><text:span text:style-name="Source_20_Text"><text:span text:style-name="T2">:focus</text:span></text:span><text:span text:style-name="T2"> (quando o usuário clica ou toca no input para digitar) nunca deve ser ignorado.</text:span></text:p>
        <text:p text:style-name="P2">Navegadores adicionam uma borda azul padrão que pode arruinar o design. A boa prática é criar uma transição suave usando CSS para indicar que o campo está ativo:</text:p>
        <text:p text:style-name="P2">CSS</text:p>
        <text:p text:style-name="P33"><text:span text:style-name="Source_20_Text"><text:span text:style-name="T2">input {</text:span></text:span></text:p>
        <text:p text:style-name="P33"><text:span text:style-name="Source_20_Text"><text:s text:c="2"/></text:span><text:span text:style-name="Source_20_Text"><text:span text:style-name="T2">border: 2px solid #ccc;</text:span></text:span></text:p>
        <text:p text:style-name="P33"><text:span text:style-name="Source_20_Text"><text:s text:c="2"/></text:span><text:span text:style-name="Source_20_Text"><text:span text:style-name="T2">transition: border-color 0.3s ease;</text:span></text:span></text:p>
        <text:p text:style-name="P34"><text:span text:style-name="Source_20_Text"><text:span text:style-name="T2">}</text:span></text:span></text:p>
        <text:p text:style-name="P34"/>
        <text:p text:style-name="P33"><text:span text:style-name="Source_20_Text"><text:span text:style-name="T2">input:focus {</text:span></text:span></text:p>
        <text:p text:style-name="P33"><text:span text:style-name="Source_20_Text"><text:s text:c="2"/></text:span><text:span text:style-name="Source_20_Text"><text:span text:style-name="T2">border-color: #6200ee; /* Cor da sua marca */</text:span></text:span></text:p>
        <text:p text:style-name="P33"><text:span text:style-name="Source_20_Text"><text:s text:c="2"/></text:span><text:span text:style-name="Source_20_Text"><text:span text:style-name="T2">outline: none; <text:s text:c="8"/>/* Remove a borda padrão feia do navegador */</text:span></text:span></text:p>
        <text:p text:style-name="P34"><text:span text:style-name="Source_20_Text"><text:span text:style-name="T2">}</text:span></text:span></text:p>
      </text:section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5-29T00:19:17.359442748</meta:creation-date>
    <dc:date>2026-05-29T00:32:31.304064555</dc:date>
    <dc:creator>João António</dc:creator>
    <meta:editing-duration>PT13M15S</meta:editing-duration>
    <meta:editing-cycles>6</meta:editing-cycles>
    <meta:generator>LibreOffice/26.2.2.2$Linux_X86_64 LibreOffice_project/620$Build-2</meta:generator>
    <meta:document-statistic meta:table-count="1" meta:image-count="0" meta:object-count="0" meta:page-count="6" meta:paragraph-count="103" meta:word-count="1289" meta:character-count="7928" meta:non-whitespace-character-count="6745"/>
  </office:meta>
</office:document-meta>
</file>