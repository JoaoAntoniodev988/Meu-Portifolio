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979cm"/>
    </style:style>
    <style:style style:name="Tabela1.B" style:family="table-column">
      <style:table-column-properties style:column-width="3.865cm"/>
    </style:style>
    <style:style style:name="Tabela1.C" style:family="table-column">
      <style:table-column-properties style:column-width="8.156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ela1.8" style:family="table-row">
      <style:table-row-properties style:min-row-height="1.704cm"/>
    </style:style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7">
      <style:paragraph-properties fo:margin-left="0cm" fo:margin-right="0cm" fo:text-indent="0cm" style:auto-text-indent="false"/>
    </style:style>
    <style:style style:name="P21" style:family="paragraph" style:parent-style-name="Preformatted_20_Text" style:list-style-name="L17">
      <style:paragraph-properties fo:margin-top="0cm" fo:margin-bottom="0.247cm" style:contextual-spacing="false" fo:line-height="115%"/>
    </style:style>
    <style:style style:name="P22" style:family="paragraph" style:parent-style-name="Text_20_body" style:list-style-name="L18">
      <style:text-properties fo:font-weight="bold"/>
    </style:style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7">
      <style:text-properties fo:font-weight="bold"/>
    </style:style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Preformatted_20_Text">
      <style:paragraph-properties fo:margin-top="0cm" fo:margin-bottom="0.247cm" style:contextual-spacing="false" fo:line-height="115%"/>
    </style:style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itle">
      <style:paragraph-properties fo:line-height="115%" fo:text-align="left" style:justify-single-word="false" fo:break-before="page"/>
      <style:text-properties style:font-name="Liberation Serif"/>
    </style:style>
    <style:style style:name="P46" style:family="paragraph" style:parent-style-name="Heading_20_2">
      <style:text-properties style:font-name="Liberation Serif"/>
    </style:style>
    <style:style style:name="P47" style:family="paragraph" style:parent-style-name="Text_20_body">
      <style:paragraph-properties fo:line-height="115%" fo:text-align="justify" style:justify-single-word="false"/>
      <style:text-properties style:font-name="Liberation Serif"/>
    </style:style>
    <style:style style:name="P48" style:family="paragraph" style:parent-style-name="Heading_20_3">
      <style:paragraph-properties fo:line-height="115%" fo:text-align="justify" style:justify-single-word="false"/>
    </style:style>
    <style:style style:name="P49" style:family="paragraph" style:parent-style-name="Text_20_body" style:list-style-name="L37">
      <style:paragraph-properties fo:line-height="115%" fo:text-align="justify" style:justify-single-word="false"/>
    </style:style>
    <style:style style:name="P50" style:family="paragraph" style:parent-style-name="Text_20_body">
      <style:paragraph-properties fo:line-height="115%" fo:text-align="justify" style:justify-single-word="false"/>
    </style:style>
    <style:style style:name="P5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erif"/>
    </style:style>
    <style:style style:name="P52" style:family="paragraph" style:parent-style-name="Preformatted_20_Text">
      <style:paragraph-properties fo:margin-top="0cm" fo:margin-bottom="0.247cm" style:contextual-spacing="false" fo:line-height="115%" fo:text-align="justify" style:justify-single-word="false"/>
    </style:style>
    <style:style style:name="P53" style:family="paragraph" style:parent-style-name="Text_20_body" style:list-style-name="L38">
      <style:paragraph-properties fo:line-height="115%" fo:text-align="justify" style:justify-single-word="false"/>
    </style:style>
    <style:style style:name="P54" style:family="paragraph" style:parent-style-name="Quotations">
      <style:paragraph-properties fo:margin-top="0cm" fo:margin-bottom="0.247cm" style:contextual-spacing="false" fo:line-height="115%" fo:text-align="justify" style:justify-single-word="false"/>
      <style:text-properties style:font-name="Liberation Serif"/>
    </style:style>
    <style:style style:name="P55" style:family="paragraph" style:parent-style-name="Quotations" style:list-style-name="L39">
      <style:paragraph-properties fo:margin-top="0cm" fo:margin-bottom="0.247cm" style:contextual-spacing="false" fo:line-height="115%" fo:text-align="justify" style:justify-single-word="false"/>
    </style:style>
    <style:style style:name="P56" style:family="paragraph" style:parent-style-name="Heading_20_2">
      <style:paragraph-properties fo:line-height="115%" fo:text-align="justify" style:justify-single-word="false"/>
    </style:style>
    <style:style style:name="P57" style:family="paragraph" style:parent-style-name="Text_20_body" style:list-style-name="L40">
      <style:paragraph-properties fo:line-height="115%" fo:text-align="justify" style:justify-single-word="false"/>
    </style:style>
    <style:style style:name="P58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Liberation Serif"/>
    </style:style>
    <style:style style:name="P59" style:family="paragraph" style:parent-style-name="Heading_20_2">
      <style:paragraph-properties fo:line-height="115%" fo:text-align="justify" style:justify-single-word="false"/>
      <style:text-properties style:font-name="Liberation Serif"/>
    </style:style>
    <style:style style:name="P6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333333" loext:opacity="100%" style:font-name="Liberation Serif" fo:font-weight="bold" style:font-weight-asian="bold" style:font-weight-complex="bold"/>
    </style:style>
    <style:style style:name="P61" style:family="paragraph" style:parent-style-name="Text_20_body" style:list-style-name="L41">
      <style:paragraph-properties fo:line-height="115%" fo:text-align="justify" style:justify-single-word="false"/>
    </style:style>
    <style:style style:name="P62" style:family="paragraph" style:parent-style-name="Text_20_body" style:list-style-name="L42">
      <style:paragraph-properties fo:line-height="115%" fo:text-align="justify" style:justify-single-word="false"/>
    </style:style>
    <style:style style:name="P63" style:family="paragraph" style:parent-style-name="Text_20_body" style:list-style-name="L43">
      <style:paragraph-properties fo:line-height="115%" fo:text-align="justify" style:justify-single-word="false"/>
      <style:text-properties style:font-name="Liberation Serif"/>
    </style:style>
    <style:style style:name="P64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officeooo:paragraph-rsid="002086ba"/>
    </style:style>
    <style:style style:name="P65" style:family="paragraph" style:parent-style-name="Heading_20_2">
      <style:paragraph-properties fo:line-height="150%" fo:text-align="justify" style:justify-single-word="false"/>
      <style:text-properties style:font-name="Liberation Serif"/>
    </style:style>
    <style:style style:name="P66" style:family="paragraph" style:parent-style-name="Heading_20_2">
      <style:paragraph-properties fo:line-height="150%" fo:text-align="justify" style:justify-single-word="false"/>
      <style:text-properties style:font-name="Liberation Serif" officeooo:paragraph-rsid="000c481a"/>
    </style:style>
    <style:style style:name="P67" style:family="paragraph" style:parent-style-name="Text_20_body">
      <style:paragraph-properties fo:line-height="115%" fo:text-align="justify" style:justify-single-word="false"/>
      <style:text-properties officeooo:paragraph-rsid="000c481a"/>
    </style:style>
    <style:style style:name="P68" style:family="paragraph" style:parent-style-name="Text_20_body">
      <style:paragraph-properties fo:line-height="115%" fo:text-align="justify" style:justify-single-word="false"/>
      <style:text-properties style:font-name="Liberation Serif" officeooo:paragraph-rsid="000c481a"/>
    </style:style>
    <style:style style:name="P69" style:family="paragraph" style:parent-style-name="Heading_20_3">
      <style:paragraph-properties fo:line-height="150%" fo:text-align="justify" style:justify-single-word="false"/>
      <style:text-properties style:font-name="Liberation Serif" officeooo:paragraph-rsid="000c481a"/>
    </style:style>
    <style:style style:name="P70" style:family="paragraph" style:parent-style-name="Text_20_body" style:list-style-name="L44">
      <style:paragraph-properties fo:line-height="115%" fo:text-align="justify" style:justify-single-word="false"/>
      <style:text-properties style:font-name="Liberation Serif" officeooo:paragraph-rsid="000c481a"/>
    </style:style>
    <style:style style:name="P71" style:family="paragraph" style:parent-style-name="Heading_20_3">
      <style:paragraph-properties fo:line-height="150%"/>
      <style:text-properties style:font-name="Liberation Serif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15%" fo:text-align="left" style:justify-single-word="false" fo:text-indent="0cm" style:auto-text-indent="false"/>
      <style:text-properties officeooo:paragraph-rsid="000c481a"/>
    </style:style>
    <style:style style:name="P73" style:family="paragraph" style:parent-style-name="Table_20_Contents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officeooo:paragraph-rsid="000c481a"/>
    </style:style>
    <style:style style:name="P74" style:family="paragraph" style:parent-style-name="Table_20_Contents">
      <style:paragraph-properties fo:margin-left="0cm" fo:margin-right="0cm" fo:margin-top="0cm" fo:margin-bottom="0.247cm" style:contextual-spacing="false" fo:line-height="115%" fo:text-align="left" style:justify-single-word="false" fo:text-indent="0cm" style:auto-text-indent="false"/>
      <style:text-properties style:font-name="Liberation Serif" officeooo:paragraph-rsid="000c481a"/>
    </style:style>
    <style:style style:name="P75" style:family="paragraph" style:parent-style-name="Table_20_Contents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style:font-name="Liberation Serif" officeooo:paragraph-rsid="000c481a"/>
    </style:style>
    <style:style style:name="P76" style:family="paragraph" style:parent-style-name="Heading_20_3">
      <style:text-properties style:font-name="Liberation Serif"/>
    </style:style>
    <style:style style:name="P77" style:family="paragraph" style:parent-style-name="Text_20_body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style:font-name="Liberation Serif" officeooo:paragraph-rsid="000c481a"/>
    </style:style>
    <style:style style:name="P78" style:family="paragraph" style:parent-style-name="Heading_20_4">
      <style:text-properties style:font-name="Liberation Serif"/>
    </style:style>
    <style:style style:name="P79" style:family="paragraph" style:parent-style-name="Text_20_body" style:list-style-name="L45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padding="0cm" fo:border="none"/>
      <style:text-properties officeooo:paragraph-rsid="000c481a"/>
    </style:style>
    <style:style style:name="P80" style:family="paragraph" style:parent-style-name="Text_20_body" style:list-style-name="L46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padding="0cm" fo:border="none"/>
      <style:text-properties officeooo:paragraph-rsid="000c481a"/>
    </style:style>
    <style:style style:name="P81" style:family="paragraph" style:parent-style-name="Text_20_body" style:list-style-name="L47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padding="0cm" fo:border="none"/>
      <style:text-properties officeooo:paragraph-rsid="000c481a"/>
    </style:style>
    <style:style style:name="P82" style:family="paragraph" style:parent-style-name="Quotations">
      <style:paragraph-properties fo:margin-left="1cm" fo:margin-right="1cm" fo:margin-top="0cm" fo:margin-bottom="0.499cm" style:contextual-spacing="false" fo:line-height="115%" fo:text-align="justify" style:justify-single-word="false" fo:text-indent="0cm" style:auto-text-indent="false"/>
      <style:text-properties officeooo:paragraph-rsid="000c481a"/>
    </style:style>
    <style:style style:name="P83" style:family="paragraph" style:parent-style-name="Text_20_body" style:list-style-name="L48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padding="0cm" fo:border="none"/>
      <style:text-properties officeooo:paragraph-rsid="000c481a"/>
    </style:style>
    <style:style style:name="P84" style:family="paragraph" style:parent-style-name="Heading_20_2">
      <style:paragraph-properties fo:line-height="115%" fo:text-align="justify" style:justify-single-word="false"/>
      <style:text-properties style:font-name="Liberation Serif" officeooo:paragraph-rsid="000c481a"/>
    </style:style>
    <style:style style:name="P85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Liberation Serif" officeooo:paragraph-rsid="000c481a"/>
    </style:style>
    <style:style style:name="P86" style:family="paragraph" style:parent-style-name="Text_20_body" style:list-style-name="L49">
      <style:paragraph-properties fo:line-height="115%" fo:text-align="justify" style:justify-single-word="false"/>
      <style:text-properties officeooo:paragraph-rsid="000c481a"/>
    </style:style>
    <style:style style:name="P87" style:family="paragraph" style:parent-style-name="Text_20_body" style:list-style-name="L50">
      <style:paragraph-properties fo:line-height="115%" fo:text-align="justify" style:justify-single-word="false"/>
      <style:text-properties officeooo:paragraph-rsid="000c481a"/>
    </style:style>
    <style:style style:name="P88" style:family="paragraph" style:parent-style-name="Quotations">
      <style:paragraph-properties fo:margin-top="0cm" fo:margin-bottom="0.247cm" style:contextual-spacing="false" fo:line-height="115%" fo:text-align="justify" style:justify-single-word="false"/>
      <style:text-properties officeooo:paragraph-rsid="000c481a"/>
    </style:style>
    <style:style style:name="P89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tyle="italic"/>
    </style:style>
    <style:style style:name="T7" style:family="text">
      <style:text-properties fo:color="#333333" loext:opacity="100%" style:font-name="Liberation Serif" fo:font-weight="bold" style:font-weight-asian="bold" style:font-weight-complex="bold"/>
    </style:style>
    <style:style style:name="T8" style:family="text">
      <style:text-properties style:font-name="Liberation Serif" officeooo:rsid="000bd29a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fo:font-weight="bold" style:font-style-asian="italic" style:font-style-complex="italic"/>
    </style:style>
    <style:style style:name="T11" style:family="text">
      <style:text-properties style:font-name="Liberation Serif" fo:font-weight="bold" officeooo:rsid="002086ba" style:font-weight-asian="bold" style:font-weight-complex="bold"/>
    </style:style>
    <style:style style:name="T12" style:family="text">
      <style:text-properties fo:color="#f10d0c" loext:opacity="100%" style:font-name="Liberation Serif"/>
    </style:style>
    <style:style style:name="T13" style:family="text">
      <style:text-properties fo:color="#00a933" loext:opacity="100%"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a das melhores formas de dominar o HTML para construir aplicações web é entender como as tags são classificadas. Em vez de decorar centenas de tags soltas, os desenvolvedores e designers de UI/UX organizam-nas por <text:span text:style-name="T1">comportamento estrutural (Visual)</text:span> e por <text:span text:style-name="T1">função semântica (Significado)</text:span>.</text:p>
      <text:p text:style-name="Text_20_body">Aqui está a classificação completa e definitiva para o seu fluxo de estudos:</text:p>
      <text:h text:style-name="P1" text:outline-level="2">1. Classificação por Comportamento Visual (Display)</text:h>
      <text:p text:style-name="Text_20_body">Esta é a classificação mais importante para quem lida com layout, pois dita como a tag se posiciona na tela antes de você aplicar qualquer CSS.</text:p>
      <text:h text:style-name="P2" text:outline-level="3">Tags de Bloco (<text:span text:style-name="Source_20_Text">Block-level</text:span>)</text:h>
      <text:p text:style-name="Text_20_body">Essas tags começam obrigatoriamente em uma <text:span text:style-name="T1">nova linha</text:span> e ocupam <text:span text:style-name="T1">100% da largura</text:span> disponível do container pai, empilhando-se verticalmente.</text:p>
      <text:list text:style-name="L1">
        <text:list-item>
          <text:p text:style-name="P3"><text:span text:style-name="T1">Comportamento:</text:span> Aceitam margens (<text:span text:style-name="Source_20_Text">margin</text:span>) e larguras/alturas (<text:span text:style-name="Source_20_Text">width</text:span>/<text:span text:style-name="Source_20_Text">height</text:span>) definidas.</text:p>
        </text:list-item>
        <text:list-item>
          <text:p text:style-name="P3"><text:span text:style-name="T1">Principais exemplos:</text:span> <text:span text:style-name="Source_20_Text">&lt;div&gt;</text:span>, <text:span text:style-name="Source_20_Text">&lt;p&gt;</text:span>, <text:span text:style-name="Source_20_Text">&lt;h1&gt;</text:span> a <text:span text:style-name="Source_20_Text">&lt;h6&gt;</text:span>, <text:span text:style-name="Source_20_Text">&lt;header&gt;</text:span>, <text:span text:style-name="Source_20_Text">&lt;footer&gt;</text:span>, <text:span text:style-name="Source_20_Text">&lt;section&gt;</text:span>, <text:span text:style-name="Source_20_Text">&lt;ul&gt;</text:span>, <text:span text:style-name="Source_20_Text">&lt;li&gt;</text:span>.</text:p>
        </text:list-item>
      </text:list>
      <text:h text:style-name="P2" text:outline-level="3">Tags em Linha (<text:span text:style-name="Source_20_Text">Inline</text:span>)</text:h>
      <text:p text:style-name="Text_20_body">Essas tags não começam em uma nova linha. Elas ocupam <text:span text:style-name="T1">apenas a largura necessária</text:span> para envolver o seu próprio conteúdo e ficam lado a lado com outros elementos.</text:p>
      <text:list text:style-name="L2">
        <text:list-item>
          <text:p text:style-name="P4"><text:span text:style-name="T1">Comportamento:</text:span> <text:span text:style-name="T1">Não</text:span> aceitam propriedades de altura (<text:span text:style-name="Source_20_Text">height</text:span>) ou largura (<text:span text:style-name="Source_20_Text">width</text:span>), e as margens verticais não empurram outros elementos.</text:p>
        </text:list-item>
        <text:list-item>
          <text:p text:style-name="P4"><text:span text:style-name="T1">Principais exemplos:</text:span> <text:span text:style-name="Source_20_Text">&lt;span&gt;</text:span>, <text:span text:style-name="Source_20_Text">&lt;a&gt;</text:span>, <text:span text:style-name="Source_20_Text">&lt;strong&gt;</text:span>, <text:span text:style-name="Source_20_Text">&lt;em&gt;</text:span>, <text:span text:style-name="Source_20_Text">&lt;img&gt;</text:span>, <text:span text:style-name="Source_20_Text">&lt;small&gt;</text:span>.</text:p>
        </text:list-item>
      </text:list>
      <text:h text:style-name="P1" text:outline-level="2">2. Classificação Semântica (Estrutura do Layout)</text:h>
      <text:p text:style-name="Text_20_body">As tags semânticas dizem ao navegador e aos motores de busca (como o Google) exatamente o que cada parte do seu aplicativo faz.</text:p>
      <text:list text:style-name="L3">
        <text:list-item>
          <text:p text:style-name="P5"><text:span text:style-name="Source_20_Text"><text:span text:style-name="T1">&lt;header&gt;</text:span></text:span><text:span text:style-name="T1">:</text:span> Define o cabeçalho de uma página ou de uma seção (geralmente contém logo e menu).</text:p>
        </text:list-item>
        <text:list-item>
          <text:p text:style-name="P5"><text:span text:style-name="Source_20_Text"><text:span text:style-name="T1">&lt;nav&gt;</text:span></text:span><text:span text:style-name="T1">:</text:span> Bloco de links de navegação/menus.</text:p>
        </text:list-item>
        <text:list-item>
          <text:p text:style-name="P5"><text:span text:style-name="Source_20_Text"><text:span text:style-name="T1">&lt;main&gt;</text:span></text:span><text:span text:style-name="T1">:</text:span> O conteúdo principal e exclusivo daquela página. Só deve existir um por página.</text:p>
        </text:list-item>
        <text:list-item>
          <text:p text:style-name="P5"><text:span text:style-name="Source_20_Text"><text:span text:style-name="T1">&lt;section&gt;</text:span></text:span><text:span text:style-name="T1">:</text:span> Define uma seção genérica de conteúdo agrupado por um tema.</text:p>
        </text:list-item>
        <text:list-item>
          <text:p text:style-name="P5"><text:span text:style-name="Source_20_Text"><text:span text:style-name="T1">&lt;article&gt;</text:span></text:span><text:span text:style-name="T1">:</text:span> Um conteúdo independente e autocontido (ex: um card de produto, um post de blog).</text:p>
        </text:list-item>
        <text:list-item>
          <text:p text:style-name="P5"><text:span text:style-name="Source_20_Text"><text:span text:style-name="T1">&lt;aside&gt;</text:span></text:span><text:span text:style-name="T1">:</text:span> Conteúdo relacionado de forma indireta (ex: barras laterais, banners de anúncio).</text:p>
        </text:list-item>
        <text:list-item>
          <text:p text:style-name="P5"><text:span text:style-name="T1">:</text:span> O rodapé da página (direitos autorais, links de contato).</text:p>
        </text:list-item>
      </text:list>
      <text:h text:style-name="P1" text:outline-level="2"><text:soft-page-break/>3. Classificação por Conteúdo e Função</text:h>
      <text:p text:style-name="Text_20_body">Dividindo as tags pelas tarefas que elas executam dentro da aplicação:</text:p>
      <text:h text:style-name="P2" text:outline-level="3">Metadados (Configuração Oculta)</text:h>
      <text:p text:style-name="Text_20_body">Ficam estritamente dentro da tag <text:span text:style-name="Source_20_Text">&lt;head&gt;</text:span>. Elas não aparecem na tela, mas configuram o app.</text:p>
      <text:list text:style-name="L4">
        <text:list-item>
          <text:p text:style-name="P6"><text:span text:style-name="Source_20_Text">&lt;html&gt;</text:span>: Raiz do documento.</text:p>
        </text:list-item>
        <text:list-item>
          <text:p text:style-name="P6"><text:span text:style-name="Source_20_Text">&lt;head&gt;</text:span>: Container de metadados.</text:p>
        </text:list-item>
        <text:list-item>
          <text:p text:style-name="P6"><text:span text:style-name="Source_20_Text">&lt;meta&gt;</text:span>: Informações como charset, autor e configurações de viewport (responsividade).</text:p>
        </text:list-item>
        <text:list-item>
          <text:p text:style-name="P6"><text:span text:style-name="Source_20_Text">&lt;title&gt;</text:span>: O título que aparece na aba do navegador.</text:p>
        </text:list-item>
        <text:list-item>
          <text:p text:style-name="P6"><text:span text:style-name="Source_20_Text">&lt;link&gt;</text:span>: Usado para conectar arquivos externos (como o seu arquivo de CSS).</text:p>
        </text:list-item>
      </text:list>
      <text:h text:style-name="P2" text:outline-level="3">Estruturação de Texto</text:h>
      <text:list text:style-name="L5">
        <text:list-item>
          <text:p text:style-name="P7"><text:span text:style-name="Source_20_Text">&lt;h1&gt;</text:span> até <text:span text:style-name="Source_20_Text">&lt;h6&gt;</text:span>: Títulos em ordem de importância hierárquica.</text:p>
        </text:list-item>
        <text:list-item>
          <text:p text:style-name="P7"><text:span text:style-name="Source_20_Text">&lt;p&gt;</text:span>: Parágrafos de texto.</text:p>
        </text:list-item>
        <text:list-item>
          <text:p text:style-name="P7"><text:span text:style-name="Source_20_Text">&lt;ul&gt;</text:span> e <text:span text:style-name="Source_20_Text">&lt;ol&gt;</text:span>: Listas não ordenadas (com marcadores) e ordenadas (numeradas).</text:p>
        </text:list-item>
        <text:list-item>
          <text:p text:style-name="P7"><text:span text:style-name="Source_20_Text">&lt;li&gt;</text:span>: Os itens da lista.</text:p>
        </text:list-item>
        <text:list-item>
          <text:p text:style-name="P7"><text:span text:style-name="Source_20_Text">&lt;br&gt;</text:span>: Quebra de linha manual.</text:p>
        </text:list-item>
      </text:list>
      <text:h text:style-name="P2" text:outline-level="3">Mídia e Incorporação (Elementos Embebidos)</text:h>
      <text:p text:style-name="Text_20_body">Tags que trazem recursos externos para dentro do seu app.</text:p>
      <text:list text:style-name="L6">
        <text:list-item>
          <text:p text:style-name="P8"><text:span text:style-name="Source_20_Text">&lt;img&gt;</text:span>: Renderiza imagens na tela.</text:p>
        </text:list-item>
        <text:list-item>
          <text:p text:style-name="P8"><text:span text:style-name="Source_20_Text">&lt;audio&gt;</text:span> e <text:span text:style-name="Source_20_Text">&lt;video&gt;</text:span>: Players nativos de mídia.</text:p>
        </text:list-item>
        <text:list-item>
          <text:p text:style-name="P8"><text:span text:style-name="Source_20_Text">&lt;iframe&gt;</text:span>: Incorpora uma segunda página web completa dentro da sua.</text:p>
        </text:list-item>
      </text:list>
      <text:h text:style-name="P2" text:outline-level="3">Formulários e Interatividade (Captura de Dados)</text:h>
      <text:p text:style-name="Text_20_body">Essenciais para sistemas web que recebem dados do usuário.</text:p>
      <text:list text:style-name="L7">
        <text:list-item>
          <text:p text:style-name="P9"><text:span text:style-name="Source_20_Text">&lt;form&gt;</text:span>: Declara a área do formulário.</text:p>
        </text:list-item>
        <text:list-item>
          <text:p text:style-name="P9"><text:span text:style-name="Source_20_Text">&lt;input&gt;</text:span>: Campo de entrada (pode ser texto, senha, e-mail, checkbox, etc.).</text:p>
        </text:list-item>
        <text:list-item>
          <text:p text:style-name="P9"><text:span text:style-name="Source_20_Text">&lt;textarea&gt;</text:span>: Campo de texto multilinha (para mensagens longas).</text:p>
        </text:list-item>
        <text:list-item>
          <text:p text:style-name="P9"><text:span text:style-name="Source_20_Text">&lt;button&gt;</text:span>: Botão de ação ou envio.</text:p>
        </text:list-item>
        <text:list-item>
          <text:p text:style-name="P9"><text:span text:style-name="Source_20_Text">&lt;select&gt;</text:span> e <text:span text:style-name="Source_20_Text">&lt;option&gt;</text:span>: Menus de escolha (Dropdowns).</text:p>
        </text:list-item>
        <text:list-item>
          <text:p text:style-name="P9"><text:span text:style-name="Source_20_Text">&lt;label&gt;</text:span>: Dá um nome acessível a um campo de input.</text:p>
        </text:list-item>
      </text:list>
      <text:h text:style-name="P1" text:outline-level="2"><text:soft-page-break/>4. Elementos Agrupadores Neutros (Não Semânticos)</text:h>
      <text:p text:style-name="Text_20_body">São os "coringas" do desenvolvimento. Eles não possuem nenhum significado de texto ou valor para o Google, mas servem exclusivamente para que você possa aplicar <text:span text:style-name="T1">Flexbox</text:span>, <text:span text:style-name="T1">CSS Grid</text:span> ou estilizações específicas.</text:p>
      <text:list text:style-name="L8">
        <text:list-item>
          <text:p text:style-name="P10"><text:span text:style-name="Source_20_Text"><text:span text:style-name="T1">&lt;div&gt;</text:span></text:span><text:span text:style-name="T1">:</text:span> Um container de bloco neutro. Usado para agrupar elementos e criar estruturas de layout.</text:p>
        </text:list-item>
        <text:list-item>
          <text:p text:style-name="P10"><text:span text:style-name="Source_20_Text"><text:span text:style-name="T1">&lt;span&gt;</text:span></text:span><text:span text:style-name="T1">:</text:span> Um container em linha neutro. Usado para aplicar estilos a palavras específicas dentro de um parágrafo, por exemplo.</text:p>
        </text:list-item>
      </text:list>
      <text:p text:style-name="Text_20_body">No entanto, para ser <text:span text:style-name="T1">estritamente completa</text:span>, a especificação oficial do HTML5 (mantida pela WHATWG) divide todos os elementos em categorias baseadas em um modelo de conteúdo mais complexo e abstrato. Muitas tags pertencem a mais de uma categoria ao mesmo tempo.</text:p>
      <text:p text:style-name="Text_20_body">Aqui está a <text:span text:style-name="T1">classificação científica e definitiva</text:span> do HTML5:</text:p>
      <text:h text:style-name="P1" text:outline-level="2">O Modelo de Conteúdo Oficial do HTML5</text:h>
      <text:p text:style-name="Text_20_body">A especificação oficial divide as tags em <text:span text:style-name="T1">7 categorias principais</text:span> interconectadas. Para entender visualmente, pense nelas como círculos que se sobrepõem (um diagrama de Venn):</text:p>
      <text:h text:style-name="P2" text:outline-level="3">1. Conteúdo de Fluxo (<text:span text:style-name="Source_20_Text">Flow Content</text:span>)</text:h>
      <text:p text:style-name="Text_20_body">É a maior categoria de todas. Compreende quase todos os elementos que são renderizados no corpo da página (<text:span text:style-name="Source_20_Text">&lt;body&gt;</text:span>). Se uma tag pode ser colocada dentro do fluxo comum do texto ou do layout, ela é <text:span text:style-name="T2">Flow Content</text:span>.</text:p>
      <text:list text:style-name="L9">
        <text:list-item>
          <text:p text:style-name="P11"><text:span text:style-name="T1">Exemplos:</text:span> <text:span text:style-name="Source_20_Text">&lt;div&gt;</text:span>, <text:span text:style-name="Source_20_Text">&lt;a&gt;</text:span>, <text:span text:style-name="Source_20_Text">&lt;p&gt;</text:span>, <text:span text:style-name="Source_20_Text">&lt;img&gt;</text:span>, <text:span text:style-name="Source_20_Text">&lt;ul&gt;</text:span>, <text:span text:style-name="Source_20_Text">&lt;section&gt;</text:span>, etc.</text:p>
        </text:list-item>
      </text:list>
      <text:h text:style-name="P2" text:outline-level="3">2. Conteúdo de Fraseado (<text:span text:style-name="Source_20_Text">Phrasing Content</text:span>)</text:h>
      <text:p text:style-name="Text_20_body">É o texto do documento, bem como os elementos que marcam esse texto dentro de um parágrafo. É o equivalente técnico às antigas tags <text:span text:style-name="T2">inline</text:span>.</text:p>
      <text:list text:style-name="L10">
        <text:list-item>
          <text:p text:style-name="P12"><text:span text:style-name="T1">Exemplos:</text:span> <text:span text:style-name="Source_20_Text">&lt;span&gt;</text:span>, <text:span text:style-name="Source_20_Text">&lt;strong&gt;</text:span>, <text:span text:style-name="Source_20_Text">&lt;em&gt;</text:span>, <text:span text:style-name="Source_20_Text">&lt;a&gt;</text:span>, <text:span text:style-name="Source_20_Text">&lt;mark&gt;</text:span>, <text:span text:style-name="Source_20_Text">&lt;small&gt;</text:span>.</text:p>
        </text:list-item>
      </text:list>
      <text:h text:style-name="P2" text:outline-level="3">3. Conteúdo Seccionável (<text:span text:style-name="Source_20_Text">Sectioning Content</text:span>)</text:h>
      <text:p text:style-name="Text_20_body">Elementos que criam um escopo ou uma divisão na estrutura do documento, definindo explicitamente as seções no mapa do site (Outline). Cada um deles pode ter seu próprio cabeçalho e rodapé.</text:p>
      <text:list text:style-name="L11">
        <text:list-item>
          <text:p text:style-name="P13"><text:span text:style-name="T1">Exemplos:</text:span> <text:span text:style-name="Source_20_Text">&lt;article&gt;</text:span>, <text:span text:style-name="Source_20_Text">&lt;aside&gt;</text:span>, <text:span text:style-name="Source_20_Text">&lt;nav&gt;</text:span>, <text:span text:style-name="Source_20_Text">&lt;section&gt;</text:span>.</text:p>
        </text:list-item>
        <text:list-item>
          <text:p text:style-name="P13"><text:span text:style-name="T2">Nota:</text:span> Curiosamente, <text:span text:style-name="Source_20_Text">&lt;div&gt;</text:span>, <text:span text:style-name="Source_20_Text">&lt;header&gt;</text:span> e <text:span text:style-name="Source_20_Text">&lt;footer&gt;</text:span> <text:span text:style-name="T1">não</text:span> são <text:span text:style-name="T2">Sectioning Content</text:span>, são apenas <text:span text:style-name="T2">Flow Content</text:span>.</text:p>
        </text:list-item>
      </text:list>
      <text:h text:style-name="P2" text:outline-level="3">4. Conteúdo de Cabeçalho (<text:span text:style-name="Source_20_Text">Heading Content</text:span>)</text:h>
      <text:p text:style-name="Text_20_body">Define o título de uma seção (seja a página inteira ou um bloco seccionável).</text:p>
      <text:list text:style-name="L12">
        <text:list-item>
          <text:p text:style-name="P14"><text:span text:style-name="T1">Exemplos:</text:span> <text:span text:style-name="Source_20_Text">&lt;h1&gt;</text:span>, <text:span text:style-name="Source_20_Text">&lt;h2&gt;</text:span>, <text:span text:style-name="Source_20_Text">&lt;h3&gt;</text:span>, <text:span text:style-name="Source_20_Text">&lt;h4&gt;</text:span>, <text:span text:style-name="Source_20_Text">&lt;h5&gt;</text:span>, <text:span text:style-name="Source_20_Text">&lt;h6&gt;</text:span>.</text:p>
        </text:list-item>
      </text:list>
      <text:h text:style-name="P2" text:outline-level="3"><text:soft-page-break/>5. Conteúdo Incorporado (<text:span text:style-name="Source_20_Text">Embedded Content</text:span>)</text:h>
      <text:p text:style-name="Text_20_body">Elementos que importam e inserem outro recurso ou outra linguagem dentro do documento HTML.</text:p>
      <text:list text:style-name="L13">
        <text:list-item>
          <text:p text:style-name="P15"><text:span text:style-name="T1">Exemplos:</text:span> <text:span text:style-name="Source_20_Text">&lt;img&gt;</text:span>, <text:span text:style-name="Source_20_Text">&lt;iframe&gt;</text:span>, <text:span text:style-name="Source_20_Text">&lt;video&gt;</text:span>, <text:span text:style-name="Source_20_Text">&lt;audio&gt;</text:span>, <text:span text:style-name="Source_20_Text">&lt;canvas&gt;</text:span>, <text:span text:style-name="Source_20_Text">&lt;svg&gt;</text:span>.</text:p>
        </text:list-item>
      </text:list>
      <text:h text:style-name="P2" text:outline-level="3">6. Conteúdo Interativo (<text:span text:style-name="Source_20_Text">Interactive Content</text:span>)</text:h>
      <text:p text:style-name="Text_20_body">Elementos que foram feitos especificamente para que o usuário interaja com eles (clicando, digitando, enviando informações).</text:p>
      <text:list text:style-name="L14">
        <text:list-item>
          <text:p text:style-name="P16"><text:span text:style-name="T1">Exemplos:</text:span> <text:span text:style-name="Source_20_Text">&lt;a&gt;</text:span> (com atributo <text:span text:style-name="Source_20_Text">href</text:span>), <text:span text:style-name="Source_20_Text">&lt;button&gt;</text:span>, <text:span text:style-name="Source_20_Text">&lt;input&gt;</text:span>, <text:span text:style-name="Source_20_Text">&lt;select&gt;</text:span>, <text:span text:style-name="Source_20_Text">&lt;textarea&gt;</text:span>, <text:span text:style-name="Source_20_Text">&lt;details&gt;</text:span>.</text:p>
        </text:list-item>
      </text:list>
      <text:h text:style-name="P2" text:outline-level="3">7. Conteúdo de Metadados (<text:span text:style-name="Source_20_Text">Metadata Content</text:span>)</text:h>
      <text:p text:style-name="Text_20_body">Elementos que configuram o comportamento do restante do documento, definem estilos, scripts ou criam conexões com outros recursos. Eles geralmente não aparecem visualmente na página.</text:p>
      <text:list text:style-name="L15">
        <text:list-item>
          <text:p text:style-name="P17"><text:span text:style-name="T1">Exemplos:</text:span> <text:span text:style-name="Source_20_Text">&lt;link&gt;</text:span>, <text:span text:style-name="Source_20_Text">&lt;meta&gt;</text:span>, <text:span text:style-name="Source_20_Text">&lt;script&gt;</text:span>, <text:span text:style-name="Source_20_Text">&lt;style&gt;</text:span>, <text:span text:style-name="Source_20_Text">&lt;title&gt;</text:span>.</text:p>
        </text:list-item>
      </text:list>
      <text:h text:style-name="P1" text:outline-level="2">Categorias Especiais e Menos Comuns</text:h>
      <text:p text:style-name="Text_20_body">Para fechar a lista completa, existem subcategorias técnicas:</text:p>
      <text:list text:style-name="L16">
        <text:list-item>
          <text:p text:style-name="P18"><text:span text:style-name="T1">Conteúdo Associado a Formulários (</text:span><text:span text:style-name="Source_20_Text"><text:span text:style-name="T1">Form-associated content</text:span></text:span><text:span text:style-name="T1">):</text:span> Tags que pertencem a um formulário e têm uma relação direta de envio de dados (ex: <text:span text:style-name="Source_20_Text">&lt;input&gt;</text:span>, <text:span text:style-name="Source_20_Text">&lt;button&gt;</text:span>, <text:span text:style-name="Source_20_Text">&lt;label&gt;</text:span>, <text:span text:style-name="Source_20_Text">&lt;output&gt;</text:span>).</text:p>
        </text:list-item>
        <text:list-item>
          <text:p text:style-name="P18"><text:span text:style-name="T1">Elementos Transparentes:</text:span> Elementos cujo modelo de conteúdo depende do que está dentro deles. O maior exemplo é a tag de link <text:span text:style-name="Source_20_Text">&lt;a&gt;</text:span>. Se você colocar uma <text:span text:style-name="Source_20_Text">&lt;div&gt;</text:span> dentro de um <text:span text:style-name="Source_20_Text">&lt;a&gt;</text:span>, o link se comporta como bloco; se colocar um texto, se comporta como fraseado.</text:p>
        </text:list-item>
      </text:list>
      <text:p text:style-name="Text_20_body">Se você estivesse criando um navegador do zero ou uma ferramenta de automação (como um <text:span text:style-name="T2">web scraper</text:span>), precisaria dessa classificação técnica. Mas para projetar e programar aplicativos, a divisão entre <text:span text:style-name="T1">Bloco/Linha</text:span> e <text:span text:style-name="T1">Semântica</text:span> (a que vimos primeiro) continua sendo o seu melhor mapa mental!</text:p>
      <text:p text:style-name="Text_20_body">No caso do CSS, a classificação não é feita por "tags" (já que isso pertence ao HTML), mas sim pela forma como estruturamos e aplicamos as regras de estilo. O ecossistema do CSS é classificado sob duas óticas principais: <text:span text:style-name="T1">Como ele é escrito e aplicado</text:span> (Sintaxe e Arquitetura) e <text:span text:style-name="T1">Como as propriedades se dividem por função</text:span> (Módulos Oficiais).</text:p>
      <text:p text:style-name="Text_20_body">Aqui está o mapa completo de classificação do CSS:</text:p>
      <text:h text:style-name="P1" text:outline-level="2">1. Classificação por Forma de Aplicação (Onde o CSS vive)</text:h>
      <text:p text:style-name="Text_20_body">O CSS pode ser injetado em um projeto web de três maneiras distintas:</text:p>
      <text:list text:style-name="L17">
        <text:list-item>
          <text:p text:style-name="P19"><text:span text:style-name="T1">CSS Inline:</text:span> Escrito diretamente no atributo <text:span text:style-name="Source_20_Text">style</text:span> de uma tag HTML. Tem o maior peso de prioridade, mas quebra o princípio de organização.</text:p>
          <text:p text:style-name="P20">HTML</text:p>
          <text:p text:style-name="P21"><text:span text:style-name="Source_20_Text">&lt;p style="color: blue; font-size: 16px;"&gt;Texto Inline&lt;/p&gt;</text:span></text:p>
        </text:list-item>
        <text:list-item>
          <text:p text:style-name="P19"><text:soft-page-break/><text:span text:style-name="T1">CSS Interno (ou Incorporado):</text:span> Escrito dentro da tag <text:span text:style-name="Source_20_Text">&lt;style&gt;</text:span>, geralmente inserida no <text:span text:style-name="Source_20_Text">&lt;head&gt;</text:span> do documento HTML. É útil para páginas únicas.</text:p>
          <text:p text:style-name="P20">HTML</text:p>
          <text:p text:style-name="P21"><text:span text:style-name="Source_20_Text">&lt;style&gt;</text:span></text:p>
          <text:p text:style-name="P21"><text:span text:style-name="Source_20_Text"><text:s text:c="2"/>p { color: blue; }</text:span></text:p>
          <text:p text:style-name="P21"><text:span text:style-name="Source_20_Text">&lt;/style&gt;</text:span></text:p>
        </text:list-item>
        <text:list-item>
          <text:p text:style-name="P19"><text:span text:style-name="T1">CSS Externo:</text:span> Escrito em um arquivo separado com a extensão <text:span text:style-name="Source_20_Text">.css</text:span> e conectado ao HTML via tag <text:span text:style-name="Source_20_Text">&lt;link&gt;</text:span>. É o padrão da indústria por permitir reutilizar o código em todo o site.</text:p>
          <text:p text:style-name="P20">HTML</text:p>
          <text:p text:style-name="P21"><text:span text:style-name="Source_20_Text">&lt;link rel="stylesheet" href="style.css"&gt;</text:span></text:p>
        </text:list-item>
      </text:list>
      <text:h text:style-name="P1" text:outline-level="2">2. Classificação dos Seletores (Como o CSS encontra o HTML)</text:h>
      <text:p text:style-name="Text_20_body">Os seletores são a engrenagem que diz ao CSS <text:span text:style-name="T2">quem</text:span> deve ser estilizado. Eles são classificados em cinco grandes grupos:</text:p>
      <text:list text:style-name="L18">
        <text:list-item>
          <text:p text:style-name="P22">Seletores Básicos:</text:p>
          <text:list>
            <text:list-item>
              <text:p text:style-name="P23"><text:span text:style-name="T2">Tipo/Tag:</text:span> Alvo é a tag diretamente (<text:span text:style-name="Source_20_Text">p</text:span>, <text:span text:style-name="Source_20_Text">div</text:span>, <text:span text:style-name="Source_20_Text">h1</text:span>).</text:p>
            </text:list-item>
            <text:list-item>
              <text:p text:style-name="P23"><text:span text:style-name="T2">Classe:</text:span> Alvo são elementos com um atributo <text:span text:style-name="Source_20_Text">class</text:span> específico (ex: <text:span text:style-name="Source_20_Text">.meu-card</text:span>).</text:p>
            </text:list-item>
            <text:list-item>
              <text:p text:style-name="P23"><text:span text:style-name="T2">ID:</text:span> Alvo é um elemento único com aquele <text:span text:style-name="Source_20_Text">id</text:span> (ex: <text:span text:style-name="Source_20_Text">#menu-principal</text:span>).</text:p>
            </text:list-item>
            <text:list-item>
              <text:p text:style-name="P23"><text:span text:style-name="T2">Universal:</text:span> Representado por um asterisco (<text:span text:style-name="Source_20_Text">*</text:span>), seleciona absolutamente tudo na página.</text:p>
            </text:list-item>
          </text:list>
        </text:list-item>
        <text:list-item>
          <text:p text:style-name="P23"><text:span text:style-name="T1">Seletores Combinadores:</text:span> Explicam a relação entre os elementos (ex: <text:span text:style-name="Source_20_Text">div p</text:span> seleciona parágrafos dentro de divs; <text:span text:style-name="Source_20_Text">div &gt; p</text:span> seleciona apenas parágrafos que são filhos diretos de uma div).</text:p>
        </text:list-item>
        <text:list-item>
          <text:p text:style-name="P23"><text:span text:style-name="T1">Seletores de Atributo:</text:span> Selecionam elementos com base na presença ou valor de um atributo (ex: <text:span text:style-name="Source_20_Text">input[type="text"]</text:span>).</text:p>
        </text:list-item>
        <text:list-item>
          <text:p text:style-name="P23"><text:span text:style-name="T1">Pseudo-classes:</text:span> Classificam o <text:span text:style-name="T1">estado</text:span> temporário de um elemento (ex: <text:span text:style-name="Source_20_Text">:hover</text:span> quando o mouse passa por cima, <text:span text:style-name="Source_20_Text">:focus</text:span> quando o campo é clicado, <text:span text:style-name="Source_20_Text">:nth-child()</text:span> para selecionar itens pares ou ímpares).</text:p>
        </text:list-item>
        <text:list-item>
          <text:p text:style-name="P23"><text:span text:style-name="T1">Pseudo-elementos:</text:span> Selecionam e estilizam uma <text:span text:style-name="T1">parte específica</text:span> de um elemento (ex: <text:span text:style-name="Source_20_Text">::before</text:span> para injetar conteúdo antes do bloco, <text:span text:style-name="Source_20_Text">::first-letter</text:span> para estilizar a primeira letra de um texto).</text:p>
        </text:list-item>
      </text:list>
      <text:h text:style-name="P1" text:outline-level="2">3. Classificação Oficial por Módulos (W3C)</text:h>
      <text:p text:style-name="Text_20_body">Antigamente (no CSS2), o CSS era um documento único. A partir do <text:span text:style-name="T1">CSS3</text:span>, o consórcio internacional (W3C) dividiu a linguagem em <text:span text:style-name="T1">Módulos Independentes</text:span> para que pudessem evoluir separadamente. Hoje, as propriedades do CSS são classificadas nestes grandes blocos funcionais:</text:p>
      <text:h text:style-name="P2" text:outline-level="3"><text:soft-page-break/>Box Model (Modelo de Caixa)</text:h>
      <text:p text:style-name="Text_20_body">A classificação mais vital para o entendimento visual do CSS. Toda tag HTML é processada pelo navegador como uma caixa retangular composta por 4 camadas essenciais.</text:p>
      <text:list text:style-name="L19">
        <text:list-item>
          <text:p text:style-name="P24"><text:span text:style-name="T1">Content:</text:span> O texto ou imagem em si.</text:p>
        </text:list-item>
        <text:list-item>
          <text:p text:style-name="P24"><text:span text:style-name="T1">Padding:</text:span> O espaçamento interno (entre o conteúdo e a borda).</text:p>
        </text:list-item>
        <text:list-item>
          <text:p text:style-name="P24"><text:span text:style-name="T1">Border:</text:span> A linha que contorna a caixa.</text:p>
        </text:list-item>
        <text:list-item>
          <text:p text:style-name="P24"><text:span text:style-name="T1">Margin:</text:span> O espaçamento externo (afasta uma caixa da outra).</text:p>
        </text:list-item>
      </text:list>
      <text:h text:style-name="P2" text:outline-level="3">Layout Systems (Sistemas de Posicionamento)</text:h>
      <text:p text:style-name="Text_20_body">Propriedades que ditam como os blocos se organizam no espaço tridimensional ou bidimensional da tela.</text:p>
      <text:list text:style-name="L20">
        <text:list-item>
          <text:p text:style-name="P25"><text:span text:style-name="T1">Display Tradicional:</text:span> Propriedades clássicas como <text:span text:style-name="Source_20_Text">block</text:span>, <text:span text:style-name="Source_20_Text">inline</text:span>, <text:span text:style-name="Source_20_Text">inline-block</text:span> e <text:span text:style-name="Source_20_Text">none</text:span>.</text:p>
        </text:list-item>
        <text:list-item>
          <text:p text:style-name="P25"><text:span text:style-name="T1">Flexbox (1D):</text:span> Focado na distribuição e alinhamento de itens em uma única direção.</text:p>
        </text:list-item>
        <text:list-item>
          <text:p text:style-name="P25"><text:span text:style-name="T1">CSS Grid (2D):</text:span> Focado no desenho de malhas estruturais complexas com linhas e colunas.</text:p>
        </text:list-item>
        <text:list-item>
          <text:p text:style-name="P25"><text:span text:style-name="T1">Posicionamento (</text:span><text:span text:style-name="Source_20_Text"><text:span text:style-name="T1">position</text:span></text:span><text:span text:style-name="T1">):</text:span> Métodos de tirar o elemento do fluxo padrão (valores como <text:span text:style-name="Source_20_Text">static</text:span>, <text:span text:style-name="Source_20_Text">relative</text:span>, <text:span text:style-name="Source_20_Text">absolute</text:span>, <text:span text:style-name="Source_20_Text">fixed</text:span> e <text:span text:style-name="Source_20_Text">sticky</text:span>).</text:p>
        </text:list-item>
      </text:list>
      <text:h text:style-name="P2" text:outline-level="3">Tipografia e Texto</text:h>
      <text:p text:style-name="Text_20_body">Propriedades focadas na legibilidade e design das fontes.</text:p>
      <text:list text:style-name="L21">
        <text:list-item>
          <text:p text:style-name="P26"><text:span text:style-name="T1">Família e Estilo:</text:span> <text:span text:style-name="Source_20_Text">font-family</text:span>, <text:span text:style-name="Source_20_Text">font-size</text:span>, <text:span text:style-name="Source_20_Text">font-weight</text:span> (negrito).</text:p>
        </text:list-item>
        <text:list-item>
          <text:p text:style-name="P26"><text:span text:style-name="T1">Formatação:</text:span> <text:span text:style-name="Source_20_Text">text-align</text:span> (alinhamento), <text:span text:style-name="Source_20_Text">line-height</text:span> (espaçamento entre linhas), <text:span text:style-name="Source_20_Text">letter-spacing</text:span> (espaçamento entre letras).</text:p>
        </text:list-item>
      </text:list>
      <text:h text:style-name="P2" text:outline-level="3">Efeitos Visuais, Cores e Estilização</text:h>
      <text:p text:style-name="Text_20_body">Cuidam da estética pura da interface.</text:p>
      <text:list text:style-name="L22">
        <text:list-item>
          <text:p text:style-name="P27"><text:span text:style-name="T1">Cores e Fundos:</text:span> <text:span text:style-name="Source_20_Text">color</text:span> (cor do texto), <text:span text:style-name="Source_20_Text">background-color</text:span>, <text:span text:style-name="Source_20_Text">background-image</text:span>, <text:span text:style-name="Source_20_Text">opacity</text:span>.</text:p>
        </text:list-item>
        <text:list-item>
          <text:p text:style-name="P27"><text:span text:style-name="T1">Filtros e Sombras:</text:span> <text:span text:style-name="Source_20_Text">box-shadow</text:span> (sombra em blocos), <text:span text:style-name="Source_20_Text">text-shadow</text:span> (sombra em textos), <text:span text:style-name="Source_20_Text">filter</text:span> (desfoque, saturação).</text:p>
        </text:list-item>
      </text:list>
      <text:h text:style-name="P2" text:outline-level="3">Transições e Animações (Movimento)</text:h>
      <text:p text:style-name="Text_20_body">Permitem criar interfaces dinâmicas que reagem às ações do usuário.</text:p>
      <text:list text:style-name="L23">
        <text:list-item>
          <text:p text:style-name="P28"><text:span text:style-name="Source_20_Text"><text:span text:style-name="T1">transition</text:span></text:span><text:span text:style-name="T1">:</text:span> Cria suavidade quando uma propriedade muda (ex: mudar de cor gradualmente ao passar o mouse).</text:p>
        </text:list-item>
        <text:list-item>
          <text:p text:style-name="P28"><text:span text:style-name="Source_20_Text"><text:span text:style-name="T1">animation</text:span></text:span><text:span text:style-name="T1"> e </text:span><text:span text:style-name="Source_20_Text"><text:span text:style-name="T1">@keyframes</text:span></text:span><text:span text:style-name="T1">:</text:span> Permite criar coreografias complexas de movimento que rodam sozinhas na tela.</text:p>
        </text:list-item>
      </text:list>
      <text:h text:style-name="P1" text:outline-level="2"><text:soft-page-break/>4. Classificação por Unidades de Medida</text:h>
      <text:p text:style-name="Text_20_body">O CSS classifica o tamanho das coisas usando dois tipos de unidades:</text:p>
      <text:list text:style-name="L24">
        <text:list-item>
          <text:p text:style-name="P29"><text:span text:style-name="T1">Unidades Absolutas:</text:span> Não mudam de tamanho baseadas em nenhum outro fator da tela.</text:p>
          <text:list>
            <text:list-item>
              <text:p text:style-name="P29"><text:span text:style-name="T2">Exemplo principal:</text:span> <text:span text:style-name="Source_20_Text">px</text:span> (Píxeis). Muito usada para bordas ou elementos que precisam de rigidez.</text:p>
            </text:list-item>
          </text:list>
        </text:list-item>
        <text:list-item>
          <text:p text:style-name="P29"><text:span text:style-name="T1">Unidades Relativas:</text:span> Adaptam-se ao tamanho da tela do usuário ou ao tamanho da fonte do navegador, sendo cruciais para a acessibilidade e responsividade.</text:p>
          <text:list>
            <text:list-item>
              <text:p text:style-name="P29"><text:span text:style-name="Source_20_Text">em</text:span> e <text:span text:style-name="Source_20_Text">rem</text:span>: Baseadas no tamanho da fonte (geralmente 1rem = 16px).</text:p>
            </text:list-item>
            <text:list-item>
              <text:p text:style-name="P29"><text:span text:style-name="Source_20_Text">vw</text:span> e <text:span text:style-name="Source_20_Text">vh</text:span>: Baseadas na largura (<text:span text:style-name="Source_20_Text">Viewport Width</text:span>) e altura (<text:span text:style-name="Source_20_Text">Viewport Height</text:span>) da tela do dispositivo do usuário (ex: <text:span text:style-name="Source_20_Text">100vh</text:span> significa 100% da altura da tela).</text:p>
            </text:list-item>
            <text:list-item>
              <text:p text:style-name="P29"><text:span text:style-name="Source_20_Text">%</text:span>: Relativa ao tamanho do elemento pai.</text:p>
            </text:list-item>
          </text:list>
        </text:list-item>
      </text:list>
      <text:p text:style-name="Text_20_body">Aprofundar os <text:span text:style-name="T1">Sistemas de Layout (Layout Systems)</text:span> é o passo definitivo para entender como o navegador renderiza interfaces. No CSS moderno, nós não apenas "empurramos" elementos com margens; nós escolhemos um <text:span text:style-name="T1">algoritmo de posicionamento</text:span> para gerenciar o espaço.</text:p>
      <text:p text:style-name="Text_20_body">A evolução do CSS nos trouxe quatro grandes sistemas de layout. Vamos dissecá-los do mais tradicional ao mais avançado:</text:p>
      <text:h text:style-name="P1" text:outline-level="2">1. O Fluxo Normal e Posicionamento Tradicional (<text:span text:style-name="Source_20_Text">position</text:span>)</text:h>
      <text:p text:style-name="Text_20_body">Por padrão, o HTML renderiza os elementos um atrás do outro (o chamado <text:span text:style-name="T2">Normal Flow</text:span>). A propriedade <text:span text:style-name="Source_20_Text">position</text:span> permite que você quebre essa regra e manipule o elemento no espaço tridimensional da tela.</text:p>
      <text:h text:style-name="P2" text:outline-level="3">Os 5 Valores de <text:span text:style-name="Source_20_Text">position</text:span>:</text:h>
      <text:list text:style-name="L25">
        <text:list-item>
          <text:p text:style-name="P30"><text:span text:style-name="Source_20_Text"><text:span text:style-name="T1">static</text:span></text:span><text:span text:style-name="T1"> (Padrão):</text:span> O elemento segue o fluxo natural do documento. Propriedades como <text:span text:style-name="Source_20_Text">top</text:span>, <text:span text:style-name="Source_20_Text">bottom</text:span>, <text:span text:style-name="Source_20_Text">left</text:span>, <text:span text:style-name="Source_20_Text">right</text:span> ou <text:span text:style-name="Source_20_Text">z-index</text:span> <text:span text:style-name="T1">não funcionam</text:span> aqui.</text:p>
        </text:list-item>
        <text:list-item>
          <text:p text:style-name="P30"><text:span text:style-name="Source_20_Text"><text:span text:style-name="T1">relative</text:span></text:span><text:span text:style-name="T1">:</text:span> O elemento permanece no fluxo normal, mas você ganha o poder de movê-lo usando <text:span text:style-name="Source_20_Text">top/left/etc.</text:span> <text:span text:style-name="T1">em relação à sua própria posição original</text:span>. O espaço original dele continua ocupado, como um "fantasma".</text:p>
        </text:list-item>
        <text:list-item>
          <text:p text:style-name="P30"><text:span text:style-name="Source_20_Text"><text:span text:style-name="T1">absolute</text:span></text:span><text:span text:style-name="T1">:</text:span> O elemento é completamente removido do fluxo normal da página (as outras tags fingem que ele não existe). Ele se posiciona <text:span text:style-name="T1">em relação ao elemento pai mais próximo que possua um </text:span><text:span text:style-name="Source_20_Text"><text:span text:style-name="T1">position</text:span></text:span><text:span text:style-name="T1"> diferente de </text:span><text:span text:style-name="Source_20_Text"><text:span text:style-name="T1">static</text:span></text:span> (geralmente usamos <text:span text:style-name="Source_20_Text">position: relative</text:span> no pai por causa disso).</text:p>
        </text:list-item>
        <text:list-item>
          <text:p text:style-name="P30"><text:span text:style-name="Source_20_Text"><text:span text:style-name="T1">fixed</text:span></text:span><text:span text:style-name="T1">:</text:span> Também sai do fluxo, mas se posiciona <text:span text:style-name="T1">em relação à janela do navegador (viewport)</text:span>. Ele fica congelado no mesmo lugar, mesmo que o usuário role a página (comum em menus de topo ou botões de chat/WhatsApp).</text:p>
        </text:list-item>
        <text:list-item>
          <text:p text:style-name="P30"><text:soft-page-break/><text:span text:style-name="Source_20_Text"><text:span text:style-name="T1">sticky</text:span></text:span><text:span text:style-name="T1">:</text:span> Um híbrido brilhante. Ele se comporta como <text:span text:style-name="Source_20_Text">relative</text:span> até que a página seja rolada e ele atinja uma coordenada específica (ex: <text:span text:style-name="Source_20_Text">top: 0</text:span>), momento em que ele "gruda" na tela como <text:span text:style-name="Source_20_Text">fixed</text:span> até que o seu container pai termine.</text:p>
        </text:list-item>
      </text:list>
      <text:h text:style-name="P1" text:outline-level="2">2. O Modelo de Exibição Tradicional (<text:span text:style-name="Source_20_Text">display: block / inline</text:span>)</text:h>
      <text:p text:style-name="Text_20_body">Antes do Flexbox e do Grid, o layout dependia puramente de como a caixa se comportava horizontalmente:</text:p>
      <text:list text:style-name="L26">
        <text:list-item>
          <text:p text:style-name="P31"><text:span text:style-name="Source_20_Text"><text:span text:style-name="T1">display: block</text:span></text:span><text:span text:style-name="T1">:</text:span> Ocupa toda a largura da linha. Força a quebra de linha. Aceita <text:span text:style-name="Source_20_Text">width</text:span>, <text:span text:style-name="Source_20_Text">height</text:span>, <text:span text:style-name="Source_20_Text">margin</text:span> e <text:span text:style-name="Source_20_Text">padding</text:span>.</text:p>
        </text:list-item>
        <text:list-item>
          <text:p text:style-name="P31"><text:span text:style-name="Source_20_Text"><text:span text:style-name="T1">display: inline</text:span></text:span><text:span text:style-name="T1">:</text:span> Ocupa apenas o tamanho do seu conteúdo. Não quebra linha. <text:span text:style-name="T1">Ignora</text:span> as propriedades <text:span text:style-name="Source_20_Text">width</text:span> e <text:span text:style-name="Source_20_Text">height</text:span>.</text:p>
        </text:list-item>
        <text:list-item>
          <text:p text:style-name="P31"><text:span text:style-name="Source_20_Text"><text:span text:style-name="T1">display: inline-block</text:span></text:span><text:span text:style-name="T1">:</text:span> O melhor dos dois mundos antigos. O elemento flui na linha como um texto (<text:span text:style-name="Source_20_Text">inline</text:span>), mas aceita configurações de tamanho e espaçamento como um bloco (<text:span text:style-name="Source_20_Text">block</text:span>). Era muito usado para criar grades de produtos antes dos sistemas modernos.</text:p>
        </text:list-item>
      </text:list>
      <text:h text:style-name="P1" text:outline-level="2">3. Flexbox (Flex Layout) - Unidimensional</text:h>
      <text:p text:style-name="Text_20_body">Ativado com <text:span text:style-name="Source_20_Text">display: flex</text:span>, este sistema foi projetado para distribuir o espaço e alinhar itens em <text:span text:style-name="T1">uma única dimensão</text:span> (ou uma linha por vez, ou uma coluna por vez).</text:p>
      <text:p text:style-name="Text_20_body">O grande segredo do Flexbox é a dinâmica entre o <text:span text:style-name="T1">Pai (Flex Container)</text:span> e os <text:span text:style-name="T1">Filhos (Flex Items)</text:span>. O pai dita a regra geral de alinhamento, mas o filho pode ter propriedades de elasticidade:</text:p>
      <text:list text:style-name="L27">
        <text:list-item>
          <text:p text:style-name="P32"><text:span text:style-name="T1">O alinhamento inteligente:</text:span> Com <text:span text:style-name="Source_20_Text">justify-content</text:span> (eixo principal) e <text:span text:style-name="Source_20_Text">align-items</text:span> (eixo transversal), você resolve o pesadelo histórico do CSS que era centralizar um elemento vertical e horizontalmente.</text:p>
        </text:list-item>
        <text:list-item>
          <text:p text:style-name="P33">Elasticidade dos filhos:</text:p>
          <text:list>
            <text:list-item>
              <text:p text:style-name="P32"><text:span text:style-name="Source_20_Text">flex-grow</text:span>: Define o quanto o filho pode esticar para preencher o espaço que sobrou.</text:p>
            </text:list-item>
            <text:list-item>
              <text:p text:style-name="P32"><text:span text:style-name="Source_20_Text">flex-shrink</text:span>: Define o quanto ele aceita encolher para não quebrar o layout se a tela diminuir.</text:p>
            </text:list-item>
          </text:list>
        </text:list-item>
      </text:list>
      <text:h text:style-name="P1" text:outline-level="2">4. CSS Grid Layout - Bidimensional</text:h>
      <text:p text:style-name="Text_20_body">Ativado com <text:span text:style-name="Source_20_Text">display: grid</text:span>, este é o sistema mais robusto do CSS. Ele foi projetado para gerenciar <text:span text:style-name="T1">linhas e colunas simultaneamente</text:span>, permitindo que você crie o "esqueleto" ou a macroestrutura de uma página inteira de forma muito mais simples.</text:p>
      <text:p text:style-name="Text_20_body">Enquanto no Flexbox o layout é ditado pelo tamanho do conteúdo dos filhos, no Grid o layout é ditado por uma <text:span text:style-name="T1">malha invisível criada no elemento pai</text:span>.</text:p>
      <text:list text:style-name="L28">
        <text:list-item>
          <text:p text:style-name="P34"><text:soft-page-break/><text:span text:style-name="T1">A revolução da unidade </text:span><text:span text:style-name="Source_20_Text"><text:span text:style-name="T1">fr</text:span></text:span><text:span text:style-name="T1">:</text:span> Permite distribuir o espaço em frações exatas, matando a necessidade de calcular porcentagens complexas.</text:p>
        </text:list-item>
        <text:list-item>
          <text:p text:style-name="P34"><text:span text:style-name="T1">Responsividade sem Media Queries:</text:span> Usando funções combinadas como <text:span text:style-name="Source_20_Text">grid-template-columns: repeat(auto-fit, minmax(200px, 1fr))</text:span>, o navegador recalcula e quebra as colunas sozinho baseado no tamanho da tela do usuário.</text:p>
        </text:list-item>
      </text:list>
      <text:h text:style-name="P1" text:outline-level="2">Qual sistema escolher? (A Regra de Ouro da UI/UX)</text:h>
      <text:p text:style-name="Text_20_body">Um bom desenvolvedor front-end combina esses sistemas na mesma página. O fluxo de decisão geralmente segue este padrão:</text:p>
      <text:list text:style-name="L29">
        <text:list-item>
          <text:p text:style-name="P35"><text:span text:style-name="T1">A macroestrutura da página</text:span> (Cabeçalho, Barra Lateral, Conteúdo Principal, Rodapé): <text:span text:style-name="T1">Use CSS Grid</text:span>.</text:p>
        </text:list-item>
        <text:list-item>
          <text:p text:style-name="P35"><text:span text:style-name="T1">Os componentes internos</text:span> (Menu de navegação, alinhamento de ícone com texto, grupo de botões dentro de um card): <text:span text:style-name="T1">Use Flexbox</text:span>.</text:p>
        </text:list-item>
        <text:list-item>
          <text:p text:style-name="P35"><text:span text:style-name="T1">Elementos flutuantes ou fixos</text:span> (Modais, menus que grudam no topo, botão de 'voltar ao topo', badges de notificação sobre um ícone): <text:span text:style-name="T1">Use </text:span><text:span text:style-name="Source_20_Text"><text:span text:style-name="T1">position: absolute / fixed / sticky</text:span></text:span>.</text:p>
        </text:list-item>
      </text:list>
      <text:p text:style-name="Text_20_body">Se os <text:span text:style-name="T1">Sistemas de Layout</text:span> moldam a estrutura e o esqueleto da sua interface, a <text:span text:style-name="T1">Tipografia e o Texto</text:span> dão voz, personalidade e legibilidade à aplicação. Na engenharia de software e no design de UI/UX, o texto não é apenas "letra"; ele é tratado como uma série de caixas e vetores que impactam diretamente a experiência do usuário e a acessibilidade.</text:p>
      <text:p text:style-name="Text_20_body">Vamos dissecar este assunto dividindo-o em quatro pilares fundamentais do CSS:</text:p>
      <text:h text:style-name="P1" text:outline-level="2">1. O Gerenciamento de Fontes (Font Face e Famílias)</text:h>
      <text:p text:style-name="Text_20_body">O navegador precisa saber de onde puxar o desenho da letra. Classificamos as fontes em três origens e cinco famílias genéricas.</text:p>
      <text:h text:style-name="P2" text:outline-level="3">Origem das Fontes:</text:h>
      <text:list text:style-name="L30">
        <text:list-item>
          <text:p text:style-name="P36"><text:span text:style-name="T1">Fontes do Sistema (System Fonts):</text:span> Fontes que já estão instaladas no computador ou celular do usuário (ex: Arial, Helvetica, San Francisco). São ultrarrápidas porque não exigem download.</text:p>
        </text:list-item>
        <text:list-item>
          <text:p text:style-name="P36"><text:span text:style-name="T1">Fontes Web (Web Fonts):</text:span> Fontes baixadas dinamicamente via serviços como Google Fonts (usando a tag <text:span text:style-name="Source_20_Text">&lt;link&gt;</text:span> ou <text:span text:style-name="Source_20_Text">@import</text:span> no CSS).</text:p>
        </text:list-item>
        <text:list-item>
          <text:p text:style-name="P36"><text:span text:style-name="T1">Fontes Locais (</text:span><text:span text:style-name="Source_20_Text"><text:span text:style-name="T1">@font-face</text:span></text:span><text:span text:style-name="T1">):</text:span> Arquivos de fonte (geralmente nos formatos <text:span text:style-name="Source_20_Text">.woff2</text:span> ou <text:span text:style-name="Source_20_Text">.woff</text:span>) que você armazena no seu próprio servidor e declara manualmente no CSS.</text:p>
        </text:list-item>
      </text:list>
      <text:h text:style-name="P2" text:outline-level="3">As Famílias Genéricas (Fallback):</text:h>
      <text:p text:style-name="Text_20_body">Ao definir a propriedade <text:span text:style-name="Source_20_Text">font-family</text:span>, sempre terminamos com uma família genérica de segurança. Se a sua fonte principal falhar, o navegador usa a equivalente do sistema:</text:p>
      <text:p text:style-name="P37">CSS</text:p>
      <text:p text:style-name="P38"><text:span text:style-name="Source_20_Text">h1 {</text:span></text:p>
      <text:p text:style-name="P38"><text:soft-page-break/><text:span text:style-name="Source_20_Text"><text:s text:c="2"/>/* O navegador tenta carregar a Inter. Se não conseguir, tenta a Helvetica. </text:span></text:p>
      <text:p text:style-name="P38"><text:span text:style-name="Source_20_Text"><text:s text:c="5"/>Se falhar, usa qualquer fonte sem serifa padrão do sistema do usuário. */</text:span></text:p>
      <text:p text:style-name="P38"><text:span text:style-name="Source_20_Text"><text:s text:c="2"/>font-family: 'Inter', 'Helvetica', sans-serif;</text:span></text:p>
      <text:p text:style-name="P38"><text:span text:style-name="Source_20_Text">}</text:span></text:p>
      <text:h text:style-name="P1" text:outline-level="2">2. Propriedades de Estilização da Fonte (<text:span text:style-name="Source_20_Text">font-*</text:span>)</text:h>
      <text:p text:style-name="Text_20_body">Estas propriedades alteram a anatomia e o peso do caractere em si:</text:p>
      <text:list text:style-name="L31">
        <text:list-item>
          <text:p text:style-name="P39"><text:span text:style-name="Source_20_Text"><text:span text:style-name="T1">font-size</text:span></text:span><text:span text:style-name="T1">:</text:span> Controla o tamanho da fonte.</text:p>
          <text:list>
            <text:list-item>
              <text:p text:style-name="P39"><text:span text:style-name="T2">Boa Prática de UI:</text:span> Evite usar <text:span text:style-name="Source_20_Text">px</text:span>. Use <text:span text:style-name="Source_20_Text"><text:span text:style-name="T1">rem</text:span></text:span> para que o texto se ajuste caso o usuário mude o tamanho padrão do navegador por motivos de acessibilidade visual.</text:p>
            </text:list-item>
          </text:list>
        </text:list-item>
        <text:list-item>
          <text:p text:style-name="P39"><text:span text:style-name="Source_20_Text"><text:span text:style-name="T1">font-weight</text:span></text:span><text:span text:style-name="T1">:</text:span> Controla a espessura (negrito). Pode ser definido por palavras (<text:span text:style-name="Source_20_Text">normal</text:span>, <text:span text:style-name="Source_20_Text">bold</text:span>) ou por valores numéricos de 100 a 900 (onde <text:span text:style-name="Source_20_Text">400</text:span> é o texto regular e <text:span text:style-name="Source_20_Text">700</text:span> é o negrito padrão).</text:p>
        </text:list-item>
        <text:list-item>
          <text:p text:style-name="P39"><text:span text:style-name="Source_20_Text"><text:span text:style-name="T1">font-style</text:span></text:span><text:span text:style-name="T1">:</text:span> Usado essencialmente para aplicar o itálico (<text:span text:style-name="Source_20_Text">italic</text:span>).</text:p>
        </text:list-item>
        <text:list-item>
          <text:p text:style-name="P39"><text:span text:style-name="Source_20_Text"><text:span text:style-name="T1">line-height</text:span></text:span><text:span text:style-name="T1">:</text:span> Controla o espaçamento vertical entre as linhas de um parágrafo.</text:p>
          <text:list>
            <text:list-item>
              <text:p text:style-name="P39"><text:span text:style-name="T2">Regra de Ouro de Acessibilidade:</text:span> Para textos longos, o <text:span text:style-name="Source_20_Text">line-height</text:span> deve ser cerca de <text:span text:style-name="T1">1.5</text:span> a <text:span text:style-name="T1">1.6</text:span> vezes o tamanho da fonte (ex: <text:span text:style-name="Source_20_Text">line-height: 1.5;</text:span> sem unidade). Valores menores que isso espremem as letras e dificultam a leitura de pessoas com dislexia.</text:p>
            </text:list-item>
          </text:list>
        </text:list-item>
      </text:list>
      <text:h text:style-name="P1" text:outline-level="2">3. Propriedades de Formatação e Fluxo de Texto (<text:span text:style-name="Source_20_Text">text-*</text:span>)</text:h>
      <text:p text:style-name="Text_20_body">Estas propriedades gerenciam como o bloco de texto se comporta em relação ao espaço disponível no layout:</text:p>
      <text:list text:style-name="L32">
        <text:list-item>
          <text:p text:style-name="P40"><text:span text:style-name="Source_20_Text"><text:span text:style-name="T1">text-align</text:span></text:span><text:span text:style-name="T1">:</text:span> Alinha o texto horizontalmente (<text:span text:style-name="Source_20_Text">left</text:span>, <text:span text:style-name="Source_20_Text">right</text:span>, <text:span text:style-name="Source_20_Text">center</text:span>, <text:span text:style-name="Source_20_Text">justify</text:span>).</text:p>
          <text:list>
            <text:list-item>
              <text:p text:style-name="P40"><text:span text:style-name="T2">Dica de UX:</text:span> Evite usar <text:span text:style-name="Source_20_Text">justify</text:span> (justificado) na web. Como a web não faz hifenização automática perfeita como os livros impressos, o texto justificado cria "rios de espaço em branco" entre as palavras, prejudicando a leitura cognitiva.</text:p>
            </text:list-item>
          </text:list>
        </text:list-item>
        <text:list-item>
          <text:p text:style-name="P40"><text:span text:style-name="Source_20_Text"><text:span text:style-name="T1">text-transform</text:span></text:span><text:span text:style-name="T1">:</text:span> Modifica a caixa do texto de forma dinâmica, independentemente de como foi digitado no HTML (<text:span text:style-name="Source_20_Text">uppercase</text:span> para TUDO MAIÚSCULO, <text:span text:style-name="Source_20_Text">lowercase</text:span> para minúsculo, <text:span text:style-name="Source_20_Text">capitalize</text:span> para a Primeira Letra De Cada Palavra).</text:p>
        </text:list-item>
        <text:list-item>
          <text:p text:style-name="P40"><text:span text:style-name="Source_20_Text"><text:span text:style-name="T1">text-decoration</text:span></text:span><text:span text:style-name="T1">:</text:span> Controla linhas ornamentais. Usamos <text:span text:style-name="Source_20_Text">text-decoration: none;</text:span> para remover aquele sublinhado padrão dos links (<text:span text:style-name="Source_20_Text">&lt;a&gt;</text:span>), ou <text:span text:style-name="Source_20_Text">underline</text:span> para adicioná-lo de volta por motivos de acessibilidade em elementos clicáveis.</text:p>
        </text:list-item>
      </text:list>
      <text:h text:style-name="P1" text:outline-level="2">4. Técnicas Avançadas de UI: Transbordo de Texto (Overflow)</text:h>
      <text:p text:style-name="Text_20_body">Um dos maiores pesadelos em interfaces dinâmicas (onde o texto vem de um banco de dados e você não sabe o tamanho dele) é o texto quebrar o layout por ser grande demais para o card. O CSS resolve isso com três propriedades combinadas:</text:p>
      <text:h text:style-name="P2" text:outline-level="3"><text:soft-page-break/>O Efeito de Reticências (<text:span text:style-name="Source_20_Text">Ellipsis</text:span>)</text:h>
      <text:p text:style-name="Text_20_body">Para cortar um texto longo que deveria ocupar apenas uma única linha e adicionar os três pontinhos (<text:span text:style-name="Source_20_Text">...</text:span>) automaticamente, usamos este trio no CSS:</text:p>
      <text:p text:style-name="P37">CSS</text:p>
      <text:p text:style-name="P38"><text:span text:style-name="Source_20_Text">.card-titulo {</text:span></text:p>
      <text:p text:style-name="P38"><text:span text:style-name="Source_20_Text"><text:s text:c="2"/>white-space: nowrap; <text:s text:c="4"/>/* Impede o texto de quebrar para a linha de baixo */</text:span></text:p>
      <text:p text:style-name="P38"><text:span text:style-name="Source_20_Text"><text:s text:c="2"/>overflow: hidden; <text:s text:c="7"/>/* Esconde o que passar dos limites da caixa */</text:span></text:p>
      <text:p text:style-name="P38"><text:span text:style-name="Source_20_Text"><text:s text:c="2"/>text-overflow: ellipsis; /* Adiciona os "..." no final do corte */</text:span></text:p>
      <text:p text:style-name="P38"><text:span text:style-name="Source_20_Text">}</text:span></text:p>
      <text:h text:style-name="P2" text:outline-level="3">Quebra de Palavras Longas (<text:span text:style-name="Source_20_Text">word-break</text:span>)</text:h>
      <text:p text:style-name="Text_20_body">Se o seu usuário digitar um link gigantesco ou uma palavra alemã imensa sem espaços, ela pode estourar a tela horizontalmente. Para forçar o navegador a quebrar uma palavra ao meio se ela for maior que o container, usamos:</text:p>
      <text:p text:style-name="P37">CSS</text:p>
      <text:p text:style-name="P38"><text:span text:style-name="Source_20_Text">p {</text:span></text:p>
      <text:p text:style-name="P38"><text:span text:style-name="Source_20_Text"><text:s text:c="2"/>word-break: break-word; /* Abre a palavra e joga o restante para baixo se necessário */</text:span></text:p>
      <text:p text:style-name="P38"><text:span text:style-name="Source_20_Text">}</text:span></text:p>
      <text:p text:style-name="Text_20_body">Se a <text:span text:style-name="T1">Tipografia</text:span> dá voz à sua aplicação, as <text:span text:style-name="T1">Transições e Animações</text:span> dão alma e ritmo. No CSS moderno e no design de UI/UX, o movimento não serve apenas para deixar o site "bonito". Ele possui uma função cognitiva crucial: guiar os olhos do usuário, fornecer feedback visual instantâneo (como um botão que afunda levemente ao ser clicado) e explicar a relação espacial entre os elementos (como um menu lateral que desliza de fora da tela).</text:p>
      <text:p text:style-name="Text_20_body">No CSS, dividimos o movimento em duas grandes categorias: <text:span text:style-name="T1">Transições</text:span> (mudanças suaves induzidas por uma ação) e <text:span text:style-name="T1">Animações</text:span> (movimentos complexos e independentes).</text:p>
      <text:h text:style-name="P1" text:outline-level="2">1. CSS Transitions (Transições Suaves)</text:h>
      <text:p text:style-name="Text_20_body">Uma transição acontece quando um elemento muda de um estado A para um estado B através de um gatilho (como o usuário passando o mouse com <text:span text:style-name="Source_20_Text">:hover</text:span>, ou focando em um campo com <text:span text:style-name="Source_20_Text">:focus</text:span>). Sem a transição, a mudança é instantânea e abrupta; com ela, o navegador calcula os quadros intermediários para criar suavidade.</text:p>
      <text:p text:style-name="Text_20_body">A propriedade <text:span text:style-name="Source_20_Text">transition</text:span> é um atalho que combina quatro propriedades essenciais:</text:p>
      <text:p text:style-name="P37">CSS</text:p>
      <text:p text:style-name="P38"><text:span text:style-name="Source_20_Text">.botao {</text:span></text:p>
      <text:p text:style-name="P38"><text:span text:style-name="Source_20_Text"><text:s text:c="2"/>background-color: #6200ee;</text:span></text:p>
      <text:p text:style-name="P38"><text:span text:style-name="Source_20_Text"><text:s text:c="2"/>/* Atalho: propriedade | duração | função de tempo | atraso */</text:span></text:p>
      <text:p text:style-name="P38"><text:span text:style-name="Source_20_Text"><text:s text:c="2"/>transition: background-color 0.3s ease-in-out 0s;</text:span></text:p>
      <text:p text:style-name="P38"><text:soft-page-break/><text:span text:style-name="Source_20_Text">}</text:span></text:p>
      <text:p text:style-name="P38"/>
      <text:p text:style-name="P38"><text:span text:style-name="Source_20_Text">.botao:hover {</text:span></text:p>
      <text:p text:style-name="P38"><text:span text:style-name="Source_20_Text"><text:s text:c="2"/>background-color: #03dac6; /* Muda de cor suavemente ao passar o mouse */</text:span></text:p>
      <text:p text:style-name="P38"><text:span text:style-name="Source_20_Text">}</text:span></text:p>
      <text:h text:style-name="P2" text:outline-level="3">Os 4 Pilares da Transição:</text:h>
      <text:list text:style-name="L33">
        <text:list-item>
          <text:p text:style-name="P41"><text:span text:style-name="Source_20_Text"><text:span text:style-name="T1">transition-property</text:span></text:span><text:span text:style-name="T1">:</text:span> Qual propriedade CSS deve ser suavizada (ex: <text:span text:style-name="Source_20_Text">background-color</text:span>, <text:span text:style-name="Source_20_Text">transform</text:span>, <text:span text:style-name="Source_20_Text">opacity</text:span>).</text:p>
          <text:list>
            <text:list-item>
              <text:p text:style-name="P41"><text:span text:style-name="T2">Dica de Performance:</text:span> Evite usar <text:span text:style-name="Source_20_Text">all</text:span>. Foque apenas nas propriedades que estão mudando. Mudar <text:span text:style-name="Source_20_Text">width</text:span> ou <text:span text:style-name="Source_20_Text">height</text:span> força o navegador a recalcular o layout da página inteira (<text:span text:style-name="T2">Layout Thrashing</text:span>). Prefira animar <text:span text:style-name="Source_20_Text">transform</text:span> e <text:span text:style-name="Source_20_Text">opacity</text:span>, que usam aceleração de hardware (GPU).</text:p>
            </text:list-item>
          </text:list>
        </text:list-item>
        <text:list-item>
          <text:p text:style-name="P41"><text:span text:style-name="Source_20_Text"><text:span text:style-name="T1">transition-duration</text:span></text:span><text:span text:style-name="T1">:</text:span> Quanto tempo o movimento vai durar. Geralmente medido em segundos (<text:span text:style-name="Source_20_Text">0.3s</text:span>) ou milissegundos (<text:span text:style-name="Source_20_Text">300ms</text:span>). Para microinterações de UI (como botões e menus), o tempo ideal de mercado fica entre <text:span text:style-name="T1">200ms e 400ms</text:span>. Mais do que isso deixa a sensação de que o sistema está lento.</text:p>
        </text:list-item>
        <text:list-item>
          <text:p text:style-name="P41"><text:span text:style-name="Source_20_Text"><text:span text:style-name="T1">transition-delay</text:span></text:span><text:span text:style-name="T1">:</text:span> Quanto tempo o navegador deve esperar antes de começar o movimento.</text:p>
        </text:list-item>
        <text:list-item>
          <text:p text:style-name="P41"><text:span text:style-name="Source_20_Text"><text:span text:style-name="T1">transition-timing-function</text:span></text:span><text:span text:style-name="T1">:</text:span> Define o ritmo da aceleração do movimento. É aqui que injetamos realismo e física na interface.</text:p>
        </text:list-item>
      </text:list>
      <text:h text:style-name="P1" text:outline-level="2">2. Funções de Tempo e Curvas Bézier (<text:span text:style-name="Source_20_Text">Timing Functions</text:span>)</text:h>
      <text:p text:style-name="Text_20_body">No mundo real, nada se move em velocidade constante do início ao fim; as coisas aceleram e desaceleram devido à fricção e gravidade. No CSS, controlamos isso através de curvas matemáticas conhecidas como <text:span text:style-name="T1">Cubic Bézier</text:span>:</text:p>
      <text:list text:style-name="L34">
        <text:list-item>
          <text:p text:style-name="P42"><text:span text:style-name="Source_20_Text"><text:span text:style-name="T1">linear</text:span></text:span><text:span text:style-name="T1">:</text:span> Velocidade idêntica do início ao fim. Soa artificial e mecânica para elementos de interface.</text:p>
        </text:list-item>
        <text:list-item>
          <text:p text:style-name="P42"><text:span text:style-name="Source_20_Text"><text:span text:style-name="T1">ease</text:span></text:span><text:span text:style-name="T1"> (Padrão):</text:span> Começa rápido e desacelera no final. É a curva mais natural para a maioria das interações.</text:p>
        </text:list-item>
        <text:list-item>
          <text:p text:style-name="P42"><text:span text:style-name="Source_20_Text"><text:span text:style-name="T1">ease-in</text:span></text:span><text:span text:style-name="T1">:</text:span> Começa devagar e acelera no final. Ideal para elementos que estão <text:span text:style-name="T1">saindo</text:span> da tela (como um alerta que some).</text:p>
        </text:list-item>
        <text:list-item>
          <text:p text:style-name="P42"><text:span text:style-name="Source_20_Text"><text:span text:style-name="T1">ease-out</text:span></text:span><text:span text:style-name="T1">:</text:span> Começa rápido e desacelera no final. Ideal para elementos que estão <text:span text:style-name="T1">entrando</text:span> na tela (dá a sensação de que o elemento veio voando e freou de forma suave).</text:p>
        </text:list-item>
        <text:list-item>
          <text:p text:style-name="P42"><text:span text:style-name="Source_20_Text"><text:span text:style-name="T1">cubic-bezier(x1, y1, x2, y2)</text:span></text:span><text:span text:style-name="T1">:</text:span> Permite criar sua própria curva personalizada. Com ela, você pode fazer efeitos como o <text:span text:style-name="T2">Bounce</text:span> (o elemento passa um pouco do destino final e volta, imitando uma mola).</text:p>
        </text:list-item>
      </text:list>
      <text:h text:style-name="P1" text:outline-level="2"><text:soft-page-break/>3. CSS Animations &amp; @keyframes (Animações Complexas)</text:h>
      <text:p text:style-name="Text_20_body">Enquanto as transições precisam de um gatilho e mudam apenas de um ponto inicial para um ponto final, as <text:span text:style-name="T1">Animações</text:span> rodam sozinhas (se você quiser) e podem passar por múltiplos estados de movimentação.</text:p>
      <text:p text:style-name="Text_20_body">Para criar uma animação, usamos um processo em duas etapas: desenhamos a coreografia usando a regra <text:span text:style-name="Source_20_Text">@keyframes</text:span> e depois aplicamos essa dança ao elemento através da propriedade <text:span text:style-name="Source_20_Text">animation</text:span>.</text:p>
      <text:p text:style-name="P37">CSS</text:p>
      <text:p text:style-name="P38"><text:span text:style-name="Source_20_Text">/* Passo 1: Definindo os passos da coreografia */</text:span></text:p>
      <text:p text:style-name="P38"><text:span text:style-name="Source_20_Text">@keyframes flutuar {</text:span></text:p>
      <text:p text:style-name="P38"><text:span text:style-name="Source_20_Text"><text:s text:c="2"/>0% { transform: translateY(0); }</text:span></text:p>
      <text:p text:style-name="P38"><text:span text:style-name="Source_20_Text"><text:s text:c="2"/>50% { transform: translateY(-10px); } /* Sobe 10px no meio do caminho */</text:span></text:p>
      <text:p text:style-name="P38"><text:span text:style-name="Source_20_Text"><text:s text:c="2"/>100% { transform: translateY(0); } <text:s text:c="3"/>/* Volta para o lugar original */</text:span></text:p>
      <text:p text:style-name="P38"><text:span text:style-name="Source_20_Text">}</text:span></text:p>
      <text:p text:style-name="P38"/>
      <text:p text:style-name="P38"><text:span text:style-name="Source_20_Text">/* Passo 2: Aplicando a coreografia ao elemento */</text:span></text:p>
      <text:p text:style-name="P38"><text:span text:style-name="Source_20_Text">.card-destaque {</text:span></text:p>
      <text:p text:style-name="P38"><text:span text:style-name="Source_20_Text"><text:s text:c="2"/>/* Nome | Duração | Ritmo | Repetição (Infinita) */</text:span></text:p>
      <text:p text:style-name="P38"><text:span text:style-name="Source_20_Text"><text:s text:c="2"/>animation: flutuar 3s ease-in-out infinite;</text:span></text:p>
      <text:p text:style-name="P38"><text:span text:style-name="Source_20_Text">}</text:span></text:p>
      <text:h text:style-name="P2" text:outline-level="3">Propriedades fundamentais do <text:span text:style-name="Source_20_Text">animation</text:span>:</text:h>
      <text:list text:style-name="L35">
        <text:list-item>
          <text:p text:style-name="P43"><text:span text:style-name="Source_20_Text"><text:span text:style-name="T1">animation-iteration-count</text:span></text:span><text:span text:style-name="T1">:</text:span> Quantas vezes a animação deve rodar. Pode ser um número (ex: <text:span text:style-name="Source_20_Text">3</text:span>) ou <text:span text:style-name="Source_20_Text">infinite</text:span>.</text:p>
        </text:list-item>
        <text:list-item>
          <text:p text:style-name="P43"><text:span text:style-name="Source_20_Text"><text:span text:style-name="T1">animation-direction</text:span></text:span><text:span text:style-name="T1">:</text:span> Se a animação deve resetar ao terminar ou fazer o caminho reverso. O valor <text:span text:style-name="Source_20_Text">alternate</text:span> faz o elemento ir e voltar de forma contínua (perfeito para efeitos de pulsação ou flutuação).</text:p>
        </text:list-item>
        <text:list-item>
          <text:p text:style-name="P43"><text:span text:style-name="Source_20_Text"><text:span text:style-name="T1">animation-fill-mode</text:span></text:span><text:span text:style-name="T1">:</text:span> Define o que acontece com o elemento antes da animação começar ou depois que ela termina. O valor <text:span text:style-name="Source_20_Text">forwards</text:span> é muito usado porque força o elemento a <text:span text:style-name="T1">ficar permanentemente no estado final</text:span> do último frame da animação, impedindo-o de "piscar" de volta para o estilo original do CSS.</text:p>
        </text:list-item>
      </text:list>
      <text:h text:style-name="P1" text:outline-level="2">4. O Aliado Indispensável do Movimento: <text:span text:style-name="Source_20_Text">transform</text:span></text:h>
      <text:p text:style-name="Text_20_body">Se você quer mover coisas na tela com alta performance gráfica, a propriedade <text:span text:style-name="Source_20_Text">transform</text:span> é sua melhor amiga. Ela permite alterar a geometria do elemento sem afetar os vizinhos ao redor:</text:p>
      <text:list text:style-name="L36">
        <text:list-item>
          <text:p text:style-name="P44"><text:span text:style-name="Source_20_Text"><text:span text:style-name="T1">translate(x, y)</text:span></text:span><text:span text:style-name="T1">:</text:span> Move o elemento nos eixos horizontal e vertical (ex: <text:span text:style-name="Source_20_Text">transform: translateY(-50%);</text:span>).</text:p>
        </text:list-item>
        <text:list-item>
          <text:p text:style-name="P44"><text:soft-page-break/><text:span text:style-name="Source_20_Text"><text:span text:style-name="T1">scale(fator)</text:span></text:span><text:span text:style-name="T1">:</text:span> Aumenta ou diminui o tamanho visual (ex: <text:span text:style-name="Source_20_Text">transform: scale(1.05);</text:span> para dar um leve zoom em um card focado).</text:p>
        </text:list-item>
        <text:list-item>
          <text:p text:style-name="P44"><text:span text:style-name="Source_20_Text"><text:span text:style-name="T1">rotate(graus)</text:span></text:span><text:span text:style-name="T1">:</text:span> Gira o elemento (ex: <text:span text:style-name="Source_20_Text">transform: rotate(45deg);</text:span> para fazer um ícone de "X" virar uma seta).</text:p>
        </text:list-item>
      </text:list>
      <text:p text:style-name="Text_20_body"/>
      <text:p text:style-name="P45">HTML: Elementos Fundamentais de Conteúdo</text:p>
      <text:h text:style-name="P46" text:outline-level="2">1. Tags de Texto: Hierarquia e Fluxo</text:h>
      <text:p text:style-name="P47">O texto de uma página precisa de ordem. O navegador e os motores de busca leem o teu documento de cima para baixo, procurando entender quais são os assuntos principais.</text:p>
      <text:h text:style-name="P48" text:outline-level="3"><text:span text:style-name="T3">Títulos (</text:span><text:span text:style-name="Source_20_Text"><text:span text:style-name="T3">&lt;h1&gt;</text:span></text:span><text:span text:style-name="T3"> a </text:span><text:span text:style-name="Source_20_Text"><text:span text:style-name="T3">&lt;h6&gt;</text:span></text:span><text:span text:style-name="T3">)</text:span></text:h>
      <text:p text:style-name="P47">Servem para ditar a importância dos títulos e subtítulos.</text:p>
      <text:list text:style-name="L37">
        <text:list-item>
          <text:p text:style-name="P49"><text:span text:style-name="Source_20_Text"><text:span text:style-name="T4">&lt;h1&gt;</text:span></text:span><text:span text:style-name="T3">: É o título principal da página. </text:span><text:span text:style-name="T4">Regra de ouro:</text:span><text:span text:style-name="T3"> Usa apenas um </text:span><text:span text:style-name="Source_20_Text"><text:span text:style-name="T3">&lt;h1&gt;</text:span></text:span><text:span text:style-name="T3"> por página (geralmente o nome do artigo ou o tema central do site).</text:span></text:p>
        </text:list-item>
        <text:list-item>
          <text:p text:style-name="P49"><text:span text:style-name="Source_20_Text"><text:span text:style-name="T4">&lt;h2&gt;</text:span></text:span><text:span text:style-name="T4"> a </text:span><text:span text:style-name="Source_20_Text"><text:span text:style-name="T4">&lt;h6&gt;</text:span></text:span><text:span text:style-name="T3">: São os subtítulos e sub-subtítulos. Funcionam como os capítulos e subcapítulos de um livro.</text:span></text:p>
        </text:list-item>
      </text:list>
      <text:h text:style-name="P48" text:outline-level="3"><text:span text:style-name="T3">Parágrafos (</text:span><text:span text:style-name="Source_20_Text"><text:span text:style-name="T3">&lt;p&gt;</text:span></text:span><text:span text:style-name="T3">)</text:span></text:h>
      <text:p text:style-name="P50"><text:span text:style-name="T3">Qualquer bloco de texto comum deve ser encapsulado por um </text:span><text:span text:style-name="Source_20_Text"><text:span text:style-name="T3">&lt;p&gt;</text:span></text:span><text:span text:style-name="T3">. O navegador encarrega-se automaticamente de adicionar um pequeno espaço em branco abaixo de cada parágrafo para que a leitura não fique cansativa.</text:span></text:p>
      <text:p text:style-name="P51">HTML</text:p>
      <text:p text:style-name="P52"><text:span text:style-name="Source_20_Text"><text:span text:style-name="T3">&lt;h1&gt;Guia de Sobrevivência em Marte&lt;/h1&gt;</text:span></text:span></text:p>
      <text:p text:style-name="P52"><text:span text:style-name="Source_20_Text"><text:span text:style-name="T3">&lt;h2&gt;1. Preparação Psicológica&lt;/h2&gt;</text:span></text:span></text:p>
      <text:p text:style-name="P52"><text:span text:style-name="Source_20_Text"><text:span text:style-name="T3">&lt;p&gt;Viver no planeta vermelho exige resiliência. O isolamento é o maior desafio para os primeiros astronautas.&lt;/p&gt;</text:span></text:span></text:p>
      <text:h text:style-name="P46" text:outline-level="2">2. Tags de Ênfase: Sentido vs. Visual</text:h>
      <text:p text:style-name="P50"><text:span text:style-name="T3">Aqui está o primeiro grande teste da tua mentalidade semântica. Visualmente, </text:span><text:span text:style-name="Source_20_Text"><text:span text:style-name="T5">&lt;strong&gt;</text:span></text:span><text:span text:style-name="T3"> deixa o texto em negrito e </text:span><text:span text:style-name="Source_20_Text"><text:span text:style-name="T3">&lt;em&gt;</text:span></text:span><text:span text:style-name="T3"> deixa em itálico. Mas </text:span><text:span text:style-name="T4">nunca</text:span><text:span text:style-name="T3"> as deves usar apenas pelo efeito visual.</text:span></text:p>
      <text:list text:style-name="L38">
        <text:list-item>
          <text:p text:style-name="P53"><text:span text:style-name="Source_20_Text"><text:span text:style-name="T4">&lt;strong&gt;</text:span></text:span><text:span text:style-name="T4"> (Importância Forte):</text:span><text:span text:style-name="T3"> Diz ao navegador que aquela palavra ou trecho é crucial no contexto. Um leitor de tela lerá essa palavra com um tom de voz mais firme ou destacado.</text:span></text:p>
        </text:list-item>
        <text:list-item>
          <text:p text:style-name="P53"><text:span text:style-name="Source_20_Text"><text:span text:style-name="T4">&lt;em&gt;</text:span></text:span><text:span text:style-name="T4"> (Ênfase Enfática):</text:span><text:span text:style-name="T3"> Altera o significado da frase com base na entonação (ênfase verbal).</text:span></text:p>
        </text:list-item>
      </text:list>
      <text:p text:style-name="P54">💡 <text:span text:style-name="T1">Exemplo prático de semântica:</text:span></text:p>
      <text:list text:style-name="L39">
        <text:list-item>
          <text:p text:style-name="P55"><text:span text:style-name="T3">Com </text:span><text:span text:style-name="Source_20_Text"><text:span text:style-name="T5">&lt;strong&gt;</text:span></text:span><text:span text:style-name="T3">: Cuidado, este produto é </text:span><text:span text:style-name="T4">altamente inflamável</text:span><text:span text:style-name="T3">. (Importância/Alerta)</text:span></text:p>
        </text:list-item>
        <text:list-item>
          <text:p text:style-name="P55"><text:span text:style-name="T3">Com </text:span><text:span text:style-name="Source_20_Text"><text:span text:style-name="T5">&lt;em&gt;</text:span></text:span><text:span text:style-name="T3">: Eu não disse que </text:span><text:span text:style-name="T6">tu</text:span><text:span text:style-name="T3"> estavas errado. (Ênfase na palavra "tu", mudando o sentido da frase).</text:span></text:p>
        </text:list-item>
      </text:list>
      <text:h text:style-name="P56" text:outline-level="2"><text:soft-page-break/><text:span text:style-name="T3">3. Conectando a Web: Links (</text:span><text:span text:style-name="Source_20_Text"><text:span text:style-name="T3">&lt;a&gt;</text:span></text:span><text:span text:style-name="T3">) e Imagens (</text:span><text:span text:style-name="Source_20_Text"><text:span text:style-name="T3">&lt;img&gt;</text:span></text:span><text:span text:style-name="T3">)</text:span></text:h>
      <text:p text:style-name="P47">Estas duas tags introduzem o conceito de <text:span text:style-name="T1">atributos</text:span>, que são configurações extras que passamos dentro da tag de abertura.</text:p>
      <text:h text:style-name="P48" text:outline-level="3"><text:span text:style-name="T3">Links (</text:span><text:span text:style-name="Source_20_Text"><text:span text:style-name="T3">&lt;a&gt;</text:span></text:span><text:span text:style-name="T3"> de </text:span><text:span text:style-name="T6">Anchor</text:span><text:span text:style-name="T3">)</text:span></text:h>
      <text:p text:style-name="P50"><text:span text:style-name="T3">A tag </text:span><text:span text:style-name="Source_20_Text"><text:span text:style-name="T3">&lt;a&gt;</text:span></text:span><text:span text:style-name="T3"> cria hiperligações. Ela precisa obrigatoriamente do atributo </text:span><text:span text:style-name="Source_20_Text"><text:span text:style-name="T3">href</text:span></text:span><text:span text:style-name="T3"> (hypertext reference), que aponta para onde o utilizador será levado ao clicar.</text:span></text:p>
      <text:h text:style-name="P48" text:outline-level="3"><text:span text:style-name="T3">Imagens (</text:span><text:span text:style-name="Source_20_Text"><text:span text:style-name="T3">&lt;img&gt;</text:span></text:span><text:span text:style-name="T3">)</text:span></text:h>
      <text:p text:style-name="P50"><text:span text:style-name="T3">Ao contrário da maioria das tags, a </text:span><text:span text:style-name="Source_20_Text"><text:span text:style-name="T3">&lt;img&gt;</text:span></text:span><text:span text:style-name="T3"> é uma </text:span><text:span text:style-name="T4">tag autossuficiente</text:span><text:span text:style-name="T3"> (não tem tag de fecho </text:span><text:span text:style-name="Source_20_Text"><text:span text:style-name="T3">&lt;/img&gt;</text:span></text:span><text:span text:style-name="T3">). Ela precisa de dois atributos fundamentais:</text:span></text:p>
      <text:list text:style-name="L40">
        <text:list-item>
          <text:p text:style-name="P57"><text:span text:style-name="Source_20_Text"><text:span text:style-name="T3">src</text:span></text:span><text:span text:style-name="T3"> (source): O caminho ou link da imagem.</text:span></text:p>
        </text:list-item>
        <text:list-item>
          <text:p text:style-name="P57"><text:span text:style-name="Source_20_Text"><text:span text:style-name="T3">alt</text:span></text:span><text:span text:style-name="T3"> (alternative text): A descrição da imagem. </text:span><text:span text:style-name="T4">Este atributo é obrigatório por lei de acessibilidade.</text:span><text:span text:style-name="T3"> Se a imagem não carregar ou se o utilizador for invisual, o leitor de tela lerá o texto do </text:span><text:span text:style-name="Source_20_Text"><text:span text:style-name="T3">alt</text:span></text:span><text:span text:style-name="T3">.</text:span></text:p>
        </text:list-item>
      </text:list>
      <text:p text:style-name="P51">HTML</text:p>
      <text:p text:style-name="P52"><text:span text:style-name="Source_20_Text"><text:span text:style-name="T3">&lt;p&gt;Visite o nosso &lt;a href="https://nasa.gov"&gt;site oficial&lt;/a&gt;.&lt;/p&gt;</text:span></text:span></text:p>
      <text:p text:style-name="P52"><text:span text:style-name="Source_20_Text"><text:span text:style-name="T3">&lt;img src="marte.jpg" alt="Fotografia do solo avermelhado de Marte com o robô Rover ao fundo."&gt;</text:span></text:span></text:p>
      <text:h text:style-name="P56" text:outline-level="2"><text:span text:style-name="T3">4. Organização: Listas (</text:span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 e </text:span><text:span text:style-name="Source_20_Text"><text:span text:style-name="T3">&lt;li&gt;</text:span></text:span><text:span text:style-name="T3">)</text:span></text:h>
      <text:p text:style-name="P47">Listas são excelentes para scannability (facilidade de leitura rápida). No HTML, estruturar uma lista exige sempre o trabalho em equipa de duas tags.</text:p>
      <text:h text:style-name="P48" text:outline-level="3"><text:span text:style-name="T3">Listas Não Ordenadas (</text:span><text:span text:style-name="Source_20_Text"><text:span text:style-name="T3">&lt;ul&gt;</text:span></text:span><text:span text:style-name="T3">)</text:span></text:h>
      <text:p text:style-name="P47">Usadas quando a ordem dos fatores não altera o resultado (ex: lista de compras, ingredientes de uma receita, ou menus de navegação). O navegador exibe-as com bolinhas (bullet points).</text:p>
      <text:h text:style-name="P48" text:outline-level="3"><text:span text:style-name="T3">Listas Ordenadas (</text:span><text:span text:style-name="Source_20_Text"><text:span text:style-name="T3">&lt;ol&gt;</text:span></text:span><text:span text:style-name="T3">)</text:span></text:h>
      <text:p text:style-name="P47">Usadas quando a sequência é estrita e obrigatória (ex: um passo a passo, um ranking de jogos, instruções de instalação). O navegador numera-as automaticamente (1, 2, 3...).</text:p>
      <text:h text:style-name="P48" text:outline-level="3"><text:span text:style-name="T3">O Item da Lista (</text:span><text:span text:style-name="Source_20_Text"><text:span text:style-name="T3">&lt;li&gt;</text:span></text:span><text:span text:style-name="T3">)</text:span></text:h>
      <text:p text:style-name="P50"><text:span text:style-name="T3">Tanto dentro de </text:span><text:span text:style-name="Source_20_Text"><text:span text:style-name="T3">&lt;ul&gt;</text:span></text:span><text:span text:style-name="T3"> quanto de </text:span><text:span text:style-name="Source_20_Text"><text:span text:style-name="T3">&lt;ol&gt;</text:span></text:span><text:span text:style-name="T3">, cada item da lista </text:span><text:span text:style-name="T4">tem de estar</text:span><text:span text:style-name="T3"> obrigatoriamente dentro de uma tag </text:span><text:span text:style-name="Source_20_Text"><text:span text:style-name="T3">&lt;li&gt;</text:span></text:span><text:span text:style-name="T3"> (list item).</text:span></text:p>
      <text:p text:style-name="P51">HTML</text:p>
      <text:p text:style-name="P52"><text:span text:style-name="Source_20_Text"><text:span text:style-name="T3">&lt;h3&gt;O que levar para Marte (Lista Não Ordenada):&lt;/h3&gt;</text:span></text:span></text:p>
      <text:p text:style-name="P52"><text:span text:style-name="Source_20_Text"><text:span text:style-name="T3">&lt;ul&gt;</text:span></text:span></text:p>
      <text:p text:style-name="P52"><text:span text:style-name="Source_20_Text"><text:span text:style-name="T3"><text:s text:c="4"/>&lt;li&gt;Fato espacial secundário&lt;/li&gt;</text:span></text:span></text:p>
      <text:p text:style-name="P52"><text:soft-page-break/><text:span text:style-name="Source_20_Text"><text:span text:style-name="T3"><text:s text:c="4"/>&lt;li&gt;Protetor solar fator 500&lt;/li&gt;</text:span></text:span></text:p>
      <text:p text:style-name="P52"><text:span text:style-name="Source_20_Text"><text:span text:style-name="T3"><text:s text:c="4"/>&lt;li&gt;Sementes de batata&lt;/li&gt;</text:span></text:span></text:p>
      <text:p text:style-name="P52"><text:span text:style-name="Source_20_Text"><text:span text:style-name="T3">&lt;/ul&gt;</text:span></text:span></text:p>
      <text:p text:style-name="P58"/>
      <text:p text:style-name="P52"><text:span text:style-name="Source_20_Text"><text:span text:style-name="T3">&lt;h3&gt;Passo a Passo para Ligar o Foguete (Lista Ordenada):&lt;/h3&gt;</text:span></text:span></text:p>
      <text:p text:style-name="P52"><text:span text:style-name="Source_20_Text"><text:span text:style-name="T3">&lt;ol&gt;</text:span></text:span></text:p>
      <text:p text:style-name="P52"><text:span text:style-name="Source_20_Text"><text:span text:style-name="T3"><text:s text:c="4"/>&lt;li&gt;Verificar os níveis de oxigénio.&lt;/li&gt;</text:span></text:span></text:p>
      <text:p text:style-name="P52"><text:span text:style-name="Source_20_Text"><text:span text:style-name="T3"><text:s text:c="4"/>&lt;li&gt;Pressionar o botão vermelho de ignição.&lt;/li&gt;</text:span></text:span></text:p>
      <text:p text:style-name="P52"><text:span text:style-name="Source_20_Text"><text:span text:style-name="T3"><text:s text:c="4"/>&lt;li&gt;Apertar o cinto de segurança.&lt;/li&gt;</text:span></text:span></text:p>
      <text:p text:style-name="P52"><text:span text:style-name="Source_20_Text"><text:span text:style-name="T3">&lt;/ol&gt;</text:span></text:span></text:p>
      <text:h text:style-name="P59" text:outline-level="2">Resumo Visual: Tudo Junto na Prática</text:h>
      <text:p text:style-name="P47">Abaixo encontras um exemplo de como todos estes elementos se encaixam harmoniosamente respeitando as regras de aninhamento:</text:p>
      <text:p text:style-name="P60">HTML</text:p>
      <text:p text:style-name="P52"><text:span text:style-name="Source_20_Text"><text:span text:style-name="T7">&lt;!DOCTYPE html&gt;</text:span></text:span></text:p>
      <text:p text:style-name="P52"><text:span text:style-name="Source_20_Text"><text:span text:style-name="T7">&lt;html lang="pt-BR"&gt;</text:span></text:span></text:p>
      <text:p text:style-name="P52"><text:span text:style-name="Source_20_Text"><text:span text:style-name="T7">&lt;head&gt;</text:span></text:span></text:p>
      <text:p text:style-name="P52"><text:span text:style-name="Source_20_Text"><text:span text:style-name="T7"><text:s text:c="4"/>&lt;meta charset="UTF-8"&gt;</text:span></text:span></text:p>
      <text:p text:style-name="P52"><text:span text:style-name="Source_20_Text"><text:span text:style-name="T7"><text:s text:c="4"/>&lt;title&gt;Minha Primeira Base HTML&lt;/title&gt;</text:span></text:span></text:p>
      <text:p text:style-name="P52"><text:span text:style-name="Source_20_Text"><text:span text:style-name="T7">&lt;/head&gt;</text:span></text:span></text:p>
      <text:p text:style-name="P52"><text:span text:style-name="Source_20_Text"><text:span text:style-name="T7">&lt;body&gt;</text:span></text:span></text:p>
      <text:p text:style-name="P52"><text:span text:style-name="Source_20_Text"><text:span text:style-name="T3"><text:s text:c="4"/></text:span></text:span><text:span text:style-name="Source_20_Text"><text:span text:style-name="T7">&lt;h1&gt;Explorando o Universo&lt;/h1&gt;</text:span></text:span></text:p>
      <text:p text:style-name="P52"><text:span text:style-name="Source_20_Text"><text:span text:style-name="T7"><text:s text:c="4"/>&lt;p&gt;A astronomia permite-nos olhar para o passado e tentar adivinhar o futuro do nosso cosmos. Existem &lt;strong&gt;três pilares&lt;/strong&gt; que todo o astrónomo amador deve conhecer.&lt;/p&gt;</text:span></text:span></text:p>
      <text:p text:style-name="P52"><text:span text:style-name="Source_20_Text"><text:span text:style-name="T7"><text:s text:c="4"/>&lt;h2&gt;1. Equipamento Básico&lt;/h2&gt;</text:span></text:span></text:p>
      <text:p text:style-name="P52"><text:span text:style-name="Source_20_Text"><text:span text:style-name="T7"><text:s text:c="4"/>&lt;p&gt;Antes de comprar um telescópio caro, comece por observar o céu a olho nu ou com binóculos de boa qualidade. Veja a lista do que precisa:&lt;/p</text:span></text:span></text:p>
      <text:p text:style-name="P52"><text:span text:style-name="Source_20_Text"><text:span text:style-name="T7"><text:s text:c="4"/>&lt;ul&gt;</text:span></text:span></text:p>
      <text:p text:style-name="P52"><text:span text:style-name="Source_20_Text"><text:span text:style-name="T7"><text:s text:c="8"/>&lt;li&gt;Um mapa estelar (pode ser uma app no telemóvel).&lt;/li&gt;</text:span></text:span></text:p>
      <text:p text:style-name="P52"><text:span text:style-name="Source_20_Text"><text:span text:style-name="T7"><text:s text:c="8"/>&lt;li&gt;Lanterna com luz vermelha (para não ofuscar as pupilas).&lt;/li&gt;</text:span></text:span></text:p>
      <text:p text:style-name="P52"><text:span text:style-name="Source_20_Text"><text:span text:style-name="T7"><text:s text:c="8"/>&lt;li&gt;Roupas quentes (as noites de observação são frias).&lt;/li&gt;</text:span></text:span></text:p>
      <text:p text:style-name="P52"><text:span text:style-name="Source_20_Text"><text:span text:style-name="T7"><text:s text:c="4"/>&lt;/ul&gt;</text:span></text:span></text:p>
      <text:p text:style-name="P52"><text:span text:style-name="Source_20_Text"><text:span text:style-name="T7"/></text:span></text:p>
      <text:p text:style-name="P52"><text:span text:style-name="Source_20_Text"><text:span text:style-name="T7"><text:s text:c="4"/>&lt;p&gt;Para ler mais dicas de observação, aceda ao &lt;a href="https://exemplo.com/guia"&gt;Guia do Astrónomo Amador&lt;/a&gt;.&lt;/p&gt;</text:span></text:span></text:p>
      <text:p text:style-name="P52"><text:span text:style-name="Source_20_Text"><text:span text:style-name="T7"><text:s text:c="4"/>&lt;h2&gt;2. A Lua&lt;/h2&gt;</text:span></text:span></text:p>
      <text:p text:style-name="P52"><text:soft-page-break/><text:span text:style-name="Source_20_Text"><text:span text:style-name="T7"><text:s text:c="4"/>&lt;p&gt;A Lua é o nosso alvo mais fácil e impressionante. &lt;em&gt;Nunca&lt;/em&gt; tente olhar diretamente para o Sol sem filtros apropriados, mas a Lua pode ser observada sem perigos.&lt;/p&gt;</text:span></text:span></text:p>
      <text:p text:style-name="P52"><text:span text:style-name="Source_20_Text"><text:span text:style-name="T7"><text:s text:c="4"/></text:span></text:span></text:p>
      <text:p text:style-name="P52"><text:span text:style-name="Source_20_Text"><text:span text:style-name="T7"><text:s text:c="4"/>&lt;img src="lua-crateras.jpg" alt="Fotografia detalhada da superfície da lua exibindo as suas principais crateras em tons de cinza."&gt;</text:span></text:span></text:p>
      <text:p text:style-name="P52"><text:span text:style-name="Source_20_Text"><text:span text:style-name="T7">&lt;/body&gt;</text:span></text:span></text:p>
      <text:p text:style-name="P52"><text:span text:style-name="Source_20_Text"><text:span text:style-name="T7">&lt;/html&gt;</text:span></text:span></text:p>
      <text:h text:style-name="P59" text:outline-level="2">A Arquitetura Macro de um Site</text:h>
      <text:p text:style-name="P47">Uma página web moderna e semanticamente correta divide-se, geralmente, em três grandes zonas: o <text:span text:style-name="T1">Cabeçalho Global</text:span>, o <text:span text:style-name="T1">Conteúdo Principal</text:span> (que pode conter subdivisões) e o <text:span text:style-name="T1">Rodapé Global</text:span>. Vamos analisar como estas zonas se estruturam na prática:</text:p>
      <text:h text:style-name="P48" text:outline-level="3"><text:span text:style-name="T3">1. A Zona de Identificação e Navegação (</text:span><text:span text:style-name="Source_20_Text"><text:span text:style-name="T3">&lt;header&gt;</text:span></text:span><text:span text:style-name="T3"> e </text:span><text:span text:style-name="Source_20_Text"><text:span text:style-name="T3">&lt;nav&gt;</text:span></text:span><text:span text:style-name="T3">)</text:span></text:h>
      <text:p text:style-name="P47">Esta é a primeira zona que o navegador e os motores de busca leem. Ela situa o utilizador sobre onde ele está.</text:p>
      <text:list text:style-name="L41">
        <text:list-item>
          <text:p text:style-name="P61"><text:span text:style-name="T3">O </text:span><text:span text:style-name="Source_20_Text"><text:span text:style-name="T5">&lt;header&gt;</text:span></text:span><text:span text:style-name="T3"> principal do site deve conter o logotipo ou o nome da empresa (</text:span><text:span text:style-name="Source_20_Text"><text:span text:style-name="T3">&lt;h1&gt;</text:span></text:span><text:span text:style-name="T3">) e, quase sempre, o menu de navegação.</text:span></text:p>
        </text:list-item>
        <text:list-item>
          <text:p text:style-name="P61"><text:span text:style-name="T3">O </text:span><text:span text:style-name="Source_20_Text"><text:span text:style-name="T5">&lt;nav&gt;</text:span></text:span><text:span text:style-name="T3"> envolve a lista (</text:span><text:span text:style-name="Source_20_Text"><text:span text:style-name="T3">&lt;ul&gt;</text:span></text:span><text:span text:style-name="T3">) de links que levam às outras páginas do site (Início, Sobre, Serviços, Contato).</text:span></text:p>
        </text:list-item>
      </text:list>
      <text:h text:style-name="P48" text:outline-level="3"><text:span text:style-name="T3">2. A Zona de Conteúdo Único (</text:span><text:span text:style-name="Source_20_Text"><text:span text:style-name="T3">&lt;main&gt;</text:span></text:span><text:span text:style-name="T3">)</text:span></text:h>
      <text:p text:style-name="P50"><text:span text:style-name="T3">É aqui que a mágica acontece. Tudo o que muda quando saltas de uma página para outra do site fica dentro do </text:span><text:span text:style-name="Source_20_Text"><text:span text:style-name="T3">&lt;main&gt;</text:span></text:span><text:span text:style-name="T3">.</text:span></text:p>
      <text:list text:style-name="L42">
        <text:list-item>
          <text:p text:style-name="P62"><text:span text:style-name="T4">Regra de Ouro:</text:span><text:span text:style-name="T3"> O </text:span><text:span text:style-name="Source_20_Text"><text:span text:style-name="T3">&lt;main&gt;</text:span></text:span><text:span text:style-name="T3"> não se deve repetir no teu site. O </text:span><text:span text:style-name="Source_20_Text"><text:span text:style-name="T3">&lt;header&gt;</text:span></text:span><text:span text:style-name="T3"> e o </text:span><text:span text:style-name="Source_20_Text"><text:span text:style-name="T3">&lt;footer&gt;</text:span></text:span><text:span text:style-name="T3"> são os mesmos em todas as páginas, mas o </text:span><text:span text:style-name="Source_20_Text"><text:span text:style-name="T3">&lt;main&gt;</text:span></text:span><text:span text:style-name="T3"> é exclusivo de cada uma.</text:span></text:p>
        </text:list-item>
        <text:list-item>
          <text:p text:style-name="P62"><text:span text:style-name="T3">Dentro do </text:span><text:span text:style-name="Source_20_Text"><text:span text:style-name="T3">&lt;main&gt;</text:span></text:span><text:span text:style-name="T3">, organizas a informação usando as tags: </text:span><text:span text:style-name="Source_20_Text"><text:span text:style-name="T3">&lt;section&gt;</text:span></text:span><text:span text:style-name="T3"> para separar blocos temáticos e </text:span><text:span text:style-name="Source_20_Text"><text:span text:style-name="T3">&lt;article&gt;</text:span></text:span><text:span text:style-name="T3"> para conteúdos que fazem sentido sozinhos.</text:span></text:p>
        </text:list-item>
      </text:list>
      <text:h text:style-name="P48" text:outline-level="3"><text:span text:style-name="T3">3. A Zona Correlata (</text:span><text:span text:style-name="Source_20_Text"><text:span text:style-name="T3">&lt;aside&gt;</text:span></text:span><text:span text:style-name="T3">)</text:span></text:h>
      <text:p text:style-name="P50"><text:span text:style-name="T3">Nem tudo na página principal é o conteúdo central. Um </text:span><text:span text:style-name="Source_20_Text"><text:span text:style-name="T3">&lt;aside&gt;</text:span></text:span><text:span text:style-name="T3"> serve para colocar informações secundárias, como:</text:span></text:p>
      <text:list text:style-name="L43">
        <text:list-item>
          <text:p text:style-name="P63">Uma barra lateral com anúncios.</text:p>
        </text:list-item>
        <text:list-item>
          <text:p text:style-name="P63">Uma lista de "Artigos mais lidos".</text:p>
        </text:list-item>
        <text:list-item>
          <text:p text:style-name="P63">Um pequeno perfil do autor com um link para as redes sociais.</text:p>
        </text:list-item>
      </text:list>
      <text:h text:style-name="P48" text:outline-level="3"><text:soft-page-break/><text:span text:style-name="T3">4. A Zona de Encerramento (</text:span><text:span text:style-name="Source_20_Text"><text:span text:style-name="T3">&lt;footer&gt;</text:span></text:span><text:span text:style-name="T3">)</text:span></text:h>
      <text:p text:style-name="P47">O rodapé fecha o documento. É o local ideal para colocar dados institucionais que não precisam de destaque no topo, como o CNPJ/NIF da empresa, direitos autorais, links para termos de uso e um mapa do site simplificado.</text:p>
      <text:h text:style-name="P59" text:outline-level="2">Estrutura de um Site Completo na Prática</text:h>
      <text:p text:style-name="P47">Imagina que estamos a criar a página inicial (Home) de um portal de tecnologia e estilo de vida. Repara em como as tags de layout (macro) abraçam as tags de texto e listas (micro) que estudaste:</text:p>
      <text:p text:style-name="P52"><text:bookmark-start text:name="__DdeLink__3_3147029182"/><text:span text:style-name="Source_20_Text"><text:span text:style-name="T7">HTML</text:span></text:span></text:p>
      <text:p text:style-name="P52"><text:span text:style-name="Source_20_Text"><text:span text:style-name="T7">&lt;!DOCTYPE html&gt;</text:span></text:span></text:p>
      <text:p text:style-name="P52"><text:span text:style-name="Source_20_Text"><text:span text:style-name="T7">&lt;html lang="pt-BR"&gt;</text:span></text:span></text:p>
      <text:p text:style-name="P52"><text:span text:style-name="Source_20_Text"><text:span text:style-name="T7">&lt;head&gt;</text:span></text:span></text:p>
      <text:p text:style-name="P52"><text:span text:style-name="Source_20_Text"><text:span text:style-name="T7"><text:s text:c="4"/>&lt;meta charset="UTF-8"&gt;</text:span></text:span></text:p>
      <text:p text:style-name="P52"><text:span text:style-name="Source_20_Text"><text:span text:style-name="T7"><text:s text:c="4"/>&lt;title&gt;Portal TecnoVida - Home&lt;/title&gt;</text:span></text:span></text:p>
      <text:p text:style-name="P52"><text:span text:style-name="Source_20_Text"><text:span text:style-name="T7">&lt;/head&gt;</text:span></text:span></text:p>
      <text:p text:style-name="P52"><text:span text:style-name="Source_20_Text"><text:span text:style-name="T7">&lt;body&gt;</text:span></text:span></text:p>
      <text:p text:style-name="P52"><text:span text:style-name="Source_20_Text"><text:span text:style-name="T7"><text:s text:c="4"/>&lt;header&gt;</text:span></text:span></text:p>
      <text:p text:style-name="P52"><text:span text:style-name="Source_20_Text"><text:span text:style-name="T7"><text:s text:c="8"/>&lt;h1&gt;TecnoVida&lt;/h1&gt;</text:span></text:span></text:p>
      <text:p text:style-name="P52"><text:span text:style-name="Source_20_Text"><text:span text:style-name="T7"><text:s text:c="8"/>&lt;p&gt;O teu portal de tecnologia e bem-estar.&lt;/p&gt;</text:span></text:span></text:p>
      <text:p text:style-name="P52"><text:span text:style-name="Source_20_Text"><text:span text:style-name="T7"><text:s text:c="8"/>&lt;nav&gt;</text:span></text:span></text:p>
      <text:p text:style-name="P52"><text:span text:style-name="Source_20_Text"><text:span text:style-name="T7"><text:s text:c="12"/>&lt;ul&gt;</text:span></text:span></text:p>
      <text:p text:style-name="P52"><text:span text:style-name="Source_20_Text"><text:span text:style-name="T7"><text:s text:c="16"/>&lt;li&gt;&lt;a href="index.html"&gt;Home&lt;/a&gt;&lt;/li&gt;</text:span></text:span></text:p>
      <text:p text:style-name="P52"><text:span text:style-name="Source_20_Text"><text:span text:style-name="T7"><text:s text:c="16"/>&lt;li&gt;&lt;a href="tecnologia.html"&gt;Tecnologia&lt;/a&gt;&lt;/li&gt;</text:span></text:span></text:p>
      <text:p text:style-name="P52"><text:span text:style-name="Source_20_Text"><text:span text:style-name="T7"><text:s text:c="16"/>&lt;li&gt;&lt;a href="saude.html"&gt;Saúde&lt;/a&gt;&lt;/li&gt;</text:span></text:span></text:p>
      <text:p text:style-name="P52"><text:span text:style-name="Source_20_Text"><text:span text:style-name="T7"><text:s text:c="16"/>&lt;li&gt;&lt;a href="contacto.html"&gt;Contacto&lt;/a&gt;&lt;/li&gt;</text:span></text:span></text:p>
      <text:p text:style-name="P52"><text:span text:style-name="Source_20_Text"><text:span text:style-name="T7"><text:s text:c="12"/>&lt;/ul&gt;</text:span></text:span></text:p>
      <text:p text:style-name="P52"><text:span text:style-name="Source_20_Text"><text:span text:style-name="T7"><text:s text:c="8"/>&lt;/nav&gt;</text:span></text:span></text:p>
      <text:p text:style-name="P52"><text:span text:style-name="Source_20_Text"><text:span text:style-name="T7"><text:s text:c="4"/>&lt;/header&gt;</text:span></text:span></text:p>
      <text:p text:style-name="P52"><text:span text:style-name="Source_20_Text"><text:span text:style-name="T7"><text:s text:c="4"/>&lt;main&gt;</text:span></text:span></text:p>
      <text:p text:style-name="P52"><text:span text:style-name="Source_20_Text"><text:span text:style-name="T7"><text:s text:c="8"/>&lt;section&gt;</text:span></text:span></text:p>
      <text:p text:style-name="P52"><text:span text:style-name="Source_20_Text"><text:span text:style-name="T7"><text:s text:c="12"/>&lt;h2&gt;Destaque da Semana&lt;/h2&gt;</text:span></text:span></text:p>
      <text:p text:style-name="P52"><text:span text:style-name="Source_20_Text"><text:span text:style-name="T7"><text:s text:c="12"/>&lt;article&gt;</text:span></text:span></text:p>
      <text:p text:style-name="P52"><text:span text:style-name="Source_20_Text"><text:span text:style-name="T7"><text:s text:c="16"/>&lt;h3&gt;Como a Inteligência Artificial mudou as rotinas em 2026&lt;/h3&gt;</text:span></text:span></text:p>
      <text:p text:style-name="P64"><text:span text:style-name="Source_20_Text"><text:span text:style-name="T7"><text:s text:c="16"/>&lt;p&gt;Este ano, as ferramentas de IA tornaram-se assistentes invisíveis no nosso dia a dia. Desde a gestão</text:span></text:span></text:p>
      <text:p text:style-name="P64"><text:span text:style-name="Source_20_Text"><text:span text:style-name="T7">do frigorífico até à criação de treinos personalizados...&lt;/p&gt;</text:span></text:span></text:p>
      <text:p text:style-name="P52"><text:span text:style-name="Source_20_Text"><text:span text:style-name="T7"><text:s text:c="16"/>&lt;a href="artigo-ia.html"&gt;Ler artigo completo&lt;/a&gt;</text:span></text:span></text:p>
      <text:p text:style-name="P52"><text:soft-page-break/><text:span text:style-name="Source_20_Text"><text:span text:style-name="T7"><text:s text:c="12"/>&lt;/article&gt;</text:span></text:span></text:p>
      <text:p text:style-name="P52"><text:span text:style-name="Source_20_Text"><text:span text:style-name="T7"><text:s text:c="8"/>&lt;/section&gt;</text:span></text:span></text:p>
      <text:p text:style-name="P52"><text:span text:style-name="Source_20_Text"><text:span text:style-name="T7"><text:s text:c="8"/>&lt;section&gt;</text:span></text:span></text:p>
      <text:p text:style-name="P52"><text:span text:style-name="Source_20_Text"><text:span text:style-name="T7"><text:s text:c="12"/>&lt;h2&gt;Últimas Novidades&lt;/h2&gt;</text:span></text:span></text:p>
      <text:p text:style-name="P52"><text:span text:style-name="Source_20_Text"><text:span text:style-name="T7"><text:s text:c="12"/>&lt;article&gt;</text:span></text:span></text:p>
      <text:p text:style-name="P52"><text:span text:style-name="Source_20_Text"><text:span text:style-name="T7"><text:s text:c="16"/>&lt;h3&gt;5 Apps para Organizar a tua Dieta&lt;/h3&gt;</text:span></text:span></text:p>
      <text:p text:style-name="P52"><text:span text:style-name="Source_20_Text"><text:span text:style-name="T7"><text:s text:c="16"/>&lt;p&gt;Manter uma alimentação saudável ficou mais fácil com estas novas aplicações gratuitas.&lt;/p&gt;</text:span></text:span></text:p>
      <text:p text:style-name="P52"><text:span text:style-name="Source_20_Text"><text:span text:style-name="T7"><text:s text:c="16"/>&lt;a href="artigo-apps.html"&gt;Saber mais&lt;/a&gt;</text:span></text:span></text:p>
      <text:p text:style-name="P52"><text:span text:style-name="Source_20_Text"><text:span text:style-name="T7"><text:s text:c="12"/>&lt;/article&gt;</text:span></text:span></text:p>
      <text:p text:style-name="P52"><text:span text:style-name="Source_20_Text"><text:span text:style-name="T7"><text:s text:c="12"/>&lt;article&gt;</text:span></text:span></text:p>
      <text:p text:style-name="P52"><text:span text:style-name="Source_20_Text"><text:span text:style-name="T7"><text:s text:c="16"/>&lt;h3&gt;O Guia do Monitor Ergonómico&lt;/h3&gt;</text:span></text:span></text:p>
      <text:p text:style-name="P52"><text:span text:style-name="Source_20_Text"><text:span text:style-name="T7"><text:s text:c="16"/>&lt;p&gt;Passas muitas horas à frente do computador? Descobre como ajustar o teu monitor para evitar dores nas costas.&lt;/p&gt;</text:span></text:span></text:p>
      <text:p text:style-name="P52"><text:span text:style-name="Source_20_Text"><text:span text:style-name="T7"><text:s text:c="16"/>&lt;a href="artigo-monitor.html"&gt;Saber mais&lt;/a&gt;</text:span></text:span></text:p>
      <text:p text:style-name="P52"><text:span text:style-name="Source_20_Text"><text:span text:style-name="T7"><text:s text:c="12"/>&lt;/article&gt;</text:span></text:span></text:p>
      <text:p text:style-name="P52"><text:span text:style-name="Source_20_Text"><text:span text:style-name="T7"><text:s text:c="8"/>&lt;/section&gt;</text:span></text:span></text:p>
      <text:p text:style-name="P52"><text:span text:style-name="Source_20_Text"><text:span text:style-name="T7"><text:s text:c="4"/>&lt;/main&gt;</text:span></text:span></text:p>
      <text:p text:style-name="P52"><text:span text:style-name="Source_20_Text"><text:span text:style-name="T7"><text:s text:c="4"/>&lt;aside&gt;</text:span></text:span></text:p>
      <text:p text:style-name="P52"><text:span text:style-name="Source_20_Text"><text:span text:style-name="T7"><text:s text:c="8"/>&lt;h2&gt;Newsletter&lt;/h2&gt;</text:span></text:span></text:p>
      <text:p text:style-name="P52"><text:span text:style-name="Source_20_Text"><text:span text:style-name="T7"><text:s text:c="8"/>&lt;p&gt;Subscreve para receberes as novidades diretamente no teu e-mail.&lt;/p&gt;</text:span></text:span></text:p>
      <text:p text:style-name="P52"><text:span text:style-name="Source_20_Text"><text:span text:style-name="T7"><text:s text:c="8"/>&lt;h2&gt;Parceiros&lt;/h2&gt;</text:span></text:span></text:p>
      <text:p text:style-name="P52"><text:span text:style-name="Source_20_Text"><text:span text:style-name="T7"><text:s text:c="8"/>&lt;ul&gt;</text:span></text:span></text:p>
      <text:p text:style-name="P52"><text:span text:style-name="Source_20_Text"><text:span text:style-name="T7"><text:s text:c="12"/>&lt;li&gt;&lt;a href="https://exemplo1.com"&gt;Escola de Código&lt;/a&gt;&lt;/li&gt;</text:span></text:span></text:p>
      <text:p text:style-name="P52"><text:span text:style-name="Source_20_Text"><text:span text:style-name="T7"><text:s text:c="12"/>&lt;li&gt;&lt;a href="https://exemplo2.com"&gt;Revista Saúde Viva&lt;/a&gt;&lt;/li&gt;</text:span></text:span></text:p>
      <text:p text:style-name="P52"><text:span text:style-name="Source_20_Text"><text:span text:style-name="T7"><text:s text:c="8"/>&lt;/ul&gt;</text:span></text:span></text:p>
      <text:p text:style-name="P52"><text:span text:style-name="Source_20_Text"><text:span text:style-name="T7"><text:s text:c="4"/>&lt;/aside&gt;</text:span></text:span></text:p>
      <text:p text:style-name="P52"><text:span text:style-name="Source_20_Text"><text:span text:style-name="T7"><text:s text:c="4"/>&lt;footer&gt;</text:span></text:span></text:p>
      <text:p text:style-name="P52"><text:span text:style-name="Source_20_Text"><text:span text:style-name="T7"><text:s text:c="8"/>&lt;p&gt;&amp;copy; 2026 Portal TecnoVida. Todos os direitos reservados.&lt;/p&gt;</text:span></text:span></text:p>
      <text:p text:style-name="P52"><text:span text:style-name="Source_20_Text"><text:span text:style-name="T7"><text:s text:c="8"/>&lt;p&gt;Contacto: info@tecnovida.com | Lisboa, Portugal&lt;/p&gt;</text:span></text:span></text:p>
      <text:p text:style-name="P52"><text:span text:style-name="Source_20_Text"><text:span text:style-name="T7"><text:s text:c="4"/>&lt;/footer&gt;</text:span></text:span></text:p>
      <text:p text:style-name="P52"><text:span text:style-name="Source_20_Text"><text:span text:style-name="T7">&lt;/body&gt;</text:span></text:span></text:p>
      <text:p text:style-name="P52"><text:span text:style-name="Source_20_Text"><text:span text:style-name="T7">&lt;/html&gt;</text:span></text:span><text:bookmark-end text:name="__DdeLink__3_3147029182"/></text:p>
      <text:h text:style-name="P65" text:outline-level="2">O Segredo do Sucesso: O Esboço Prévio</text:h>
      <text:p text:style-name="P47">Um erro muito comum de quem está a começar é abrir o editor de código e tentar adivinhar as tags à medida que escreve.</text:p>
      <text:p text:style-name="P50"><text:soft-page-break/><text:span text:style-name="T8">OBS: </text:span><text:span text:style-name="T9">O segredo dos profissionais é </text:span><text:span text:style-name="T10">olhar para o design (ou para a ideia) e "fatiá-lo" mentalmente</text:span><text:span text:style-name="T9">. Se olhares para um site famoso hoje (como o G1, o Observador ou o YouTube), vais conseguir ver claramente onde estão o </text:span><text:span text:style-name="Source_20_Text"><text:span text:style-name="T9">&lt;header&gt;</text:span></text:span><text:span text:style-name="T9">, o </text:span><text:span text:style-name="Source_20_Text"><text:span text:style-name="T9">&lt;nav&gt;</text:span></text:span><text:span text:style-name="T9">, o </text:span><text:span text:style-name="Source_20_Text"><text:span text:style-name="T9">&lt;main&gt;</text:span></text:span><text:span text:style-name="T9"> e os </text:span><text:span text:style-name="Source_20_Text"><text:span text:style-name="T9">&lt;article&gt;</text:span></text:span><text:span text:style-name="T9">.</text:span></text:p>
      <text:h text:style-name="P66" text:outline-level="2">Tags Semânticas no HTML5</text:h>
      <text:p text:style-name="P67"><text:span text:style-name="T3">Na época do HTML4, os desenvolvedores sofriam de uma condição que apelidamos carinhosamente de </text:span><text:span text:style-name="T4">"divite"</text:span><text:span text:style-name="T3"> (o uso excessivo de tags </text:span><text:span text:style-name="Source_20_Text"><text:span text:style-name="T3">&lt;div&gt;</text:span></text:span><text:span text:style-name="T3"> para absolutamente tudo). As páginas eram um mar de </text:span><text:span text:style-name="Source_20_Text"><text:span text:style-name="T3">&lt;div class="topo"&gt;</text:span></text:span><text:span text:style-name="T3">, </text:span><text:span text:style-name="Source_20_Text"><text:span text:style-name="T3">&lt;div class="conteudo"&gt;</text:span></text:span><text:span text:style-name="T3"> e </text:span><text:span text:style-name="Source_20_Text"><text:span text:style-name="T3">&lt;div class="rodape"&gt;</text:span></text:span><text:span text:style-name="T3">.</text:span></text:p>
      <text:p text:style-name="P68">O HTML5 mudou o jogo ao introduzir as <text:span text:style-name="T1">tags semânticas</text:span>, que dão significado real à estrutura do seu código.</text:p>
      <text:h text:style-name="P69" text:outline-level="3">1. O que é Semântica e por que ela importa?</text:h>
      <text:p text:style-name="P68">Semântica na programação diz respeito ao <text:span text:style-name="T1">significado</text:span> do código. Uma tag semântica diz claramente ao navegador, aos motores de busca (como o Google) e às tecnologias assistivas (como leitores de tela) o que aquele bloco de conteúdo representa.</text:p>
      <text:p text:style-name="P68">Os três pilares da importância das tags semânticas são:</text:p>
      <text:list text:style-name="L44">
        <text:list-item>
          <text:p text:style-name="P70"><text:span text:style-name="T1">Acessibilidade (A11y):</text:span> Permite que pessoas com deficiência visual naveguem pelo site de forma lógica usando leitores de tela.</text:p>
        </text:list-item>
        <text:list-item>
          <text:p text:style-name="P70"><text:span text:style-name="T1">SEO (Otimização para Motores de Busca):</text:span> Os robôs do Google indexam e ranqueiam melhor páginas onde conseguem identificar claramente onde está o conteúdo principal, o título e os links.</text:p>
        </text:list-item>
        <text:list-item>
          <text:p text:style-name="P70"><text:span text:style-name="T1">Manutenibilidade:</text:span> O código fica infinitamente mais limpo e fácil de ser lido por outros desenvolvedores.</text:p>
        </text:list-item>
      </text:list>
      <text:h text:style-name="P71" text:outline-level="3">2. Tabela Comparativa: O Antes e o Depoi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2"><text:span text:style-name="Strong_20_Emphasis"><text:span text:style-name="T3">Estrutura Antiga (Sem Semântica)</text:span></text:span></text:p>
            </table:table-cell>
            <table:table-cell table:style-name="Tabela1.A1" office:value-type="string">
              <text:p text:style-name="P72"><text:span text:style-name="Strong_20_Emphasis"><text:span text:style-name="T3">Tag HTML5 (Semântica)</text:span></text:span></text:p>
            </table:table-cell>
            <table:table-cell table:style-name="Tabela1.A1" office:value-type="string">
              <text:p text:style-name="P72"><text:span text:style-name="Strong_20_Emphasis"><text:span text:style-name="T3">O que ela realmente diz ao navegador?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73"><text:span text:style-name="Source_20_Text"><text:span text:style-name="T3">&lt;div id="header"&gt;</text:span></text:span></text:p>
          </table:table-cell>
          <table:table-cell table:style-name="Tabela1.A1" office:value-type="string">
            <text:p text:style-name="P73"><text:span text:style-name="Source_20_Text"><text:span text:style-name="T3">&lt;header&gt;</text:span></text:span></text:p>
          </table:table-cell>
          <table:table-cell table:style-name="Tabela1.A1" office:value-type="string">
            <text:p text:style-name="P74">"Aqui começa o cabeçalho deste contexto."</text:p>
          </table:table-cell>
        </table:table-row>
        <table:table-row>
          <table:table-cell table:style-name="Tabela1.A1" office:value-type="string">
            <text:p text:style-name="P73"><text:span text:style-name="Source_20_Text"><text:span text:style-name="T3">&lt;div class="menu"&gt;</text:span></text:span></text:p>
          </table:table-cell>
          <table:table-cell table:style-name="Tabela1.A1" office:value-type="string">
            <text:p text:style-name="P73"><text:span text:style-name="Source_20_Text"><text:span text:style-name="T3">&lt;nav&gt;</text:span></text:span></text:p>
          </table:table-cell>
          <table:table-cell table:style-name="Tabela1.A1" office:value-type="string">
            <text:p text:style-name="P75">"Este bloco contém os links principais de navegação."</text:p>
          </table:table-cell>
        </table:table-row>
        <table:table-row>
          <table:table-cell table:style-name="Tabela1.A1" office:value-type="string">
            <text:p text:style-name="P73"><text:span text:style-name="Source_20_Text"><text:span text:style-name="T3">&lt;div class="principal"&gt;</text:span></text:span></text:p>
          </table:table-cell>
          <table:table-cell table:style-name="Tabela1.A1" office:value-type="string">
            <text:p text:style-name="P73"><text:span text:style-name="Source_20_Text"><text:span text:style-name="T3">&lt;main&gt;</text:span></text:span></text:p>
          </table:table-cell>
          <table:table-cell table:style-name="Tabela1.A1" office:value-type="string">
            <text:p text:style-name="P75">"Este é o conteúdo central e exclusivo desta página."</text:p>
          </table:table-cell>
        </table:table-row>
        <table:table-row>
          <table:table-cell table:style-name="Tabela1.A1" office:value-type="string">
            <text:p text:style-name="P73"><text:span text:style-name="Source_20_Text"><text:span text:style-name="T3">&lt;div class="noticia"&gt;</text:span></text:span></text:p>
          </table:table-cell>
          <table:table-cell table:style-name="Tabela1.A1" office:value-type="string">
            <text:p text:style-name="P73"><text:span text:style-name="Source_20_Text"><text:span text:style-name="T3">&lt;article&gt;</text:span></text:span></text:p>
          </table:table-cell>
          <table:table-cell table:style-name="Tabela1.A1" office:value-type="string">
            <text:p text:style-name="P74">"Este conteúdo é completo e independente por si só."</text:p>
          </table:table-cell>
        </table:table-row>
        <text:soft-page-break/>
        <table:table-row>
          <table:table-cell table:style-name="Tabela1.A1" office:value-type="string">
            <text:p text:style-name="P73"><text:span text:style-name="Source_20_Text"><text:span text:style-name="T3">&lt;div class="bloco"&gt;</text:span></text:span></text:p>
          </table:table-cell>
          <table:table-cell table:style-name="Tabela1.A1" office:value-type="string">
            <text:p text:style-name="P73"><text:span text:style-name="Source_20_Text"><text:span text:style-name="T3">&lt;section&gt;</text:span></text:span></text:p>
          </table:table-cell>
          <table:table-cell table:style-name="Tabela1.A1" office:value-type="string">
            <text:p text:style-name="P74">"Isto é um grupo temático de conteúdos relacionados."</text:p>
          </table:table-cell>
        </table:table-row>
        <table:table-row>
          <table:table-cell table:style-name="Tabela1.A1" office:value-type="string">
            <text:p text:style-name="P73"><text:span text:style-name="Source_20_Text"><text:span text:style-name="T3">&lt;div class="lateral"&gt;</text:span></text:span></text:p>
          </table:table-cell>
          <table:table-cell table:style-name="Tabela1.A1" office:value-type="string">
            <text:p text:style-name="P73"><text:span text:style-name="Source_20_Text"><text:span text:style-name="T3">&lt;aside&gt;</text:span></text:span></text:p>
          </table:table-cell>
          <table:table-cell table:style-name="Tabela1.A1" office:value-type="string">
            <text:p text:style-name="P74">"Isto é um conteúdo secundário ou uma barra lateral."</text:p>
          </table:table-cell>
        </table:table-row>
        <table:table-row table:style-name="Tabela1.8">
          <table:table-cell table:style-name="Tabela1.A1" office:value-type="string">
            <text:p text:style-name="P73"><text:span text:style-name="Source_20_Text"><text:span text:style-name="T3">&lt;div class="footer"&gt;</text:span></text:span></text:p>
          </table:table-cell>
          <table:table-cell table:style-name="Tabela1.A1" office:value-type="string">
            <text:p text:style-name="P73"><text:span text:style-name="Source_20_Text"><text:span text:style-name="T3">&lt;footer&gt;</text:span></text:span></text:p>
          </table:table-cell>
          <table:table-cell table:style-name="Tabela1.A1" office:value-type="string">
            <text:p text:style-name="P74">"Aqui termina a página (ou seção) com informações de rodapé."</text:p>
          </table:table-cell>
        </table:table-row>
      </table:table>
      <text:h text:style-name="P76" text:outline-level="3"/>
      <text:h text:style-name="P71" text:outline-level="3">3. Anatomia das Tags Semânticas (Categorias)</text:h>
      <text:p text:style-name="P77">Podemos dividir as tags semânticas em dois grandes grupos: as de <text:span text:style-name="T1">Estrutura de Layout</text:span> e as de <text:span text:style-name="T1">Conteúdo Interno</text:span>.</text:p>
      <text:h text:style-name="P78" text:outline-level="4">Tags de Estrutura de Layout</text:h>
      <text:p text:style-name="P77">São os blocos que desenham a arquitetura macro da página.</text:p>
      <text:list text:style-name="L45">
        <text:list-item>
          <text:p text:style-name="P79"><text:span text:style-name="Source_20_Text"><text:span text:style-name="T4">&lt;header&gt;</text:span></text:span><text:span text:style-name="T4">:</text:span><text:span text:style-name="T3"> Abre a apresentação da página ou de uma seção. Geralmente abriga logos, títulos (</text:span><text:span text:style-name="Source_20_Text"><text:span text:style-name="T3">&lt;h1&gt;</text:span></text:span><text:span text:style-name="T3">) e barras de pesquisa.</text:span></text:p>
        </text:list-item>
        <text:list-item>
          <text:p text:style-name="P79"><text:span text:style-name="Source_20_Text"><text:span text:style-name="T4">&lt;nav&gt;</text:span></text:span><text:span text:style-name="T4">:</text:span><text:span text:style-name="T3"> Reserva o espaço para os menus de navegação. Deve ser usada para os links principais do site.</text:span></text:p>
        </text:list-item>
        <text:list-item>
          <text:p text:style-name="P79"><text:span text:style-name="Source_20_Text"><text:span text:style-name="T4">&lt;main&gt;</text:span></text:span><text:span text:style-name="T4">:</text:span><text:span text:style-name="T3"> O coração da página. Abriga o conteúdo que muda de uma página para outra. </text:span><text:span text:style-name="T4">Só pode existir um </text:span><text:span text:style-name="Source_20_Text"><text:span text:style-name="T4">&lt;main&gt;</text:span></text:span><text:span text:style-name="T4"> visível por documento.</text:span></text:p>
        </text:list-item>
        <text:list-item>
          <text:p text:style-name="P79"><text:span text:style-name="Source_20_Text"><text:span text:style-name="T4">&lt;footer&gt;</text:span></text:span><text:span text:style-name="T4">:</text:span><text:span text:style-name="T3"> O encerramento. Guarda direitos autorais, links de políticas de privacidade e redes sociais.</text:span></text:p>
        </text:list-item>
      </text:list>
      <text:h text:style-name="P78" text:outline-level="4">Tags de Conteúdo Interno</text:h>
      <text:p text:style-name="P77">São as tags que organizam as informações dentro do fluxo de texto.</text:p>
      <text:list text:style-name="L46">
        <text:list-item>
          <text:p text:style-name="P80"><text:span text:style-name="Source_20_Text"><text:span text:style-name="T4">&lt;section&gt;</text:span></text:span><text:span text:style-name="T4"> vs </text:span><text:span text:style-name="Source_20_Text"><text:span text:style-name="T4">&lt;article&gt;</text:span></text:span><text:span text:style-name="T4">:</text:span><text:span text:style-name="T3"> A confusão mais comum do HTML5.</text:span></text:p>
          <text:list>
            <text:list-item>
              <text:p text:style-name="P80"><text:span text:style-name="T3">Use </text:span><text:span text:style-name="Source_20_Text"><text:span text:style-name="T4">&lt;article&gt;</text:span></text:span><text:span text:style-name="T3"> quando o conteúdo for uma entidade própria (um post de blog, um produto de e-commerce, um comentário). Se você recortar o </text:span><text:span text:style-name="Source_20_Text"><text:span text:style-name="T3">&lt;article&gt;</text:span></text:span><text:span text:style-name="T3"> e colar em outro site, ele continua fazendo sentido.</text:span></text:p>
            </text:list-item>
            <text:list-item>
              <text:p text:style-name="P80"><text:span text:style-name="T3">Use </text:span><text:span text:style-name="Source_20_Text"><text:span text:style-name="T4">&lt;section&gt;</text:span></text:span><text:span text:style-name="T3"> para separar capítulos de um livro, abas de uma página ou blocos temáticos (ex: seção "Sobre Nós", seção "Depoimentos").</text:span></text:p>
            </text:list-item>
          </text:list>
        </text:list-item>
        <text:list-item>
          <text:p text:style-name="P80"><text:span text:style-name="Source_20_Text"><text:span text:style-name="T4">&lt;aside&gt;</text:span></text:span><text:span text:style-name="T4">:</text:span><text:span text:style-name="T3"> Informações que orbitam o assunto principal, mas não são vitais (anúncios, biografias de autores, links de posts relacionados).</text:span></text:p>
        </text:list-item>
      </text:list>
      <text:h text:style-name="P78" text:outline-level="4"><text:soft-page-break/>Tags Semânticas Inline e de Mídia</text:h>
      <text:p text:style-name="P77">Para dar sentido a pequenos trechos ou mídias.</text:p>
      <text:list text:style-name="L47">
        <text:list-item>
          <text:p text:style-name="P81"><text:span text:style-name="Source_20_Text"><text:span text:style-name="T4">&lt;figure&gt;</text:span></text:span><text:span text:style-name="T4"> e </text:span><text:span text:style-name="Source_20_Text"><text:span text:style-name="T4">&lt;figcaption&gt;</text:span></text:span><text:span text:style-name="T4">:</text:span><text:span text:style-name="T3"> Usadas juntas para encapsular uma imagem, gráfico ou código (</text:span><text:span text:style-name="Source_20_Text"><text:span text:style-name="T3">&lt;figure&gt;</text:span></text:span><text:span text:style-name="T3">) e sua respectiva legenda (</text:span><text:span text:style-name="Source_20_Text"><text:span text:style-name="T3">&lt;figcaption&gt;</text:span></text:span><text:span text:style-name="T3">).</text:span></text:p>
        </text:list-item>
        <text:list-item>
          <text:p text:style-name="P81"><text:span text:style-name="Source_20_Text"><text:span text:style-name="T4">&lt;time&gt;</text:span></text:span><text:span text:style-name="T4">:</text:span><text:span text:style-name="T3"> Identifica datas e horas de forma inteligível para máquinas (ex: </text:span><text:span text:style-name="Source_20_Text"><text:span text:style-name="T3">&lt;time datetime="2026-06-03"&gt;Hoje&lt;/time&gt;</text:span></text:span><text:span text:style-name="T3">).</text:span></text:p>
        </text:list-item>
        <text:list-item>
          <text:p text:style-name="P81"><text:span text:style-name="Source_20_Text"><text:span text:style-name="T4">&lt;mark&gt;</text:span></text:span><text:span text:style-name="T4">:</text:span><text:span text:style-name="T3"> Realça um texto com destaque visual (efeito de texto grifado com marca-texto), indicando relevância contextual.</text:span></text:p>
        </text:list-item>
      </text:list>
      <text:h text:style-name="P76" text:outline-level="3">4. Regras de Ouro e Boas Práticas</text:h>
      <text:p text:style-name="P82"><text:span text:style-name="T3">⚠️ </text:span><text:span text:style-name="T4">Aparência não é Semântica:</text:span><text:span text:style-name="T3"> Nunca use uma tag semântica apenas pelo efeito visual que ela causa no navegador. Por exemplo, não use </text:span><text:span text:style-name="Source_20_Text"><text:span text:style-name="T3">&lt;blockquote&gt;</text:span></text:span><text:span text:style-name="T3"> se você não estiver citando alguém, apenas porque achou o recuo bonito. Quem cuida do visual é o </text:span><text:span text:style-name="T4">CSS</text:span><text:span text:style-name="T3">.</text:span></text:p>
      <text:list text:style-name="L48">
        <text:list-item>
          <text:p text:style-name="P83"><text:span text:style-name="T4">Não abandone a </text:span><text:span text:style-name="Source_20_Text"><text:span text:style-name="T4">&lt;div&gt;</text:span></text:span><text:span text:style-name="T4">:</text:span><text:span text:style-name="T3"> A </text:span><text:span text:style-name="Source_20_Text"><text:span text:style-name="T3">&lt;div&gt;</text:span></text:span><text:span text:style-name="T3"> continua existindo e é super importante! Você deve usá-la sempre que precisar agrupar elementos puramente para fins de estilização (CSS) ou manipulação com JavaScript, onde nenhuma tag semântica faça sentido.</text:span></text:p>
        </text:list-item>
        <text:list-item>
          <text:p text:style-name="P83"><text:span text:style-name="T4">Hierarquia de Títulos:</text:span><text:span text:style-name="T3"> Cada </text:span><text:span text:style-name="Source_20_Text"><text:span text:style-name="T3">&lt;section&gt;</text:span></text:span><text:span text:style-name="T3"> ou </text:span><text:span text:style-name="Source_20_Text"><text:span text:style-name="T3">&lt;article&gt;</text:span></text:span><text:span text:style-name="T3"> idealmente deve começar com um título (</text:span><text:span text:style-name="Source_20_Text"><text:span text:style-name="T3">&lt;h2&gt;</text:span></text:span><text:span text:style-name="T3"> a </text:span><text:span text:style-name="Source_20_Text"><text:span text:style-name="T3">&lt;h6&gt;</text:span></text:span><text:span text:style-name="T3">). Isso ajuda a criar a árvore de tópicos (outline) do seu documento.</text:span></text:p>
        </text:list-item>
      </text:list>
      <text:h text:style-name="P84" text:outline-level="2">Os 4 Pilares em HTML5</text:h>
      <text:h text:style-name="P85" text:outline-level="3">1. A Anatomia do Documento (O Esqueleto)</text:h>
      <text:p text:style-name="P68">Todo arquivo HTML5 começa exatamente da mesma forma. Precisas entender o que cada linha do "esqueleto" básico faz, em vez de apenas copiar e colar.</text:p>
      <text:list text:style-name="L49">
        <text:list-item>
          <text:p text:style-name="P86"><text:span text:style-name="Source_20_Text"><text:span text:style-name="T5">&lt;!DOCTYPE html&gt;</text:span></text:span><text:span text:style-name="T5">:</text:span><text:span text:style-name="T3"> Avisa ao navegador que estás a usar a versão mais recente do HTML (HTML5).</text:span></text:p>
        </text:list-item>
        <text:list-item>
          <text:p text:style-name="P86"><text:span text:style-name="Source_20_Text"><text:span text:style-name="T5">&lt;html lang="pt-BR"&gt;</text:span></text:span><text:span text:style-name="T3">: O container de todo o site. O atributo </text:span><text:span text:style-name="Source_20_Text"><text:span text:style-name="T3">lang</text:span></text:span><text:span text:style-name="T3"> é vital para que os tradutores e leitores de tela saibam o idioma da página.</text:span></text:p>
        </text:list-item>
        <text:list-item>
          <text:p text:style-name="P86"><text:span text:style-name="Source_20_Text"><text:span text:style-name="T5">&lt;head&gt;</text:span></text:span><text:span text:style-name="T3">: A "mente" da página. Tudo o que está aqui dentro não aparece visualmente para o usuário, mas serve para configurar o site (configuração de acentos com </text:span><text:span text:style-name="Source_20_Text"><text:span text:style-name="T5">&lt;meta charset="UTF-8"&gt;</text:span></text:span><text:span text:style-name="T3">, título da aba com </text:span><text:span text:style-name="Source_20_Text"><text:span text:style-name="T3">&lt;title&gt;</text:span></text:span><text:span text:style-name="T3">, e links para o CSS).</text:span></text:p>
        </text:list-item>
        <text:list-item>
          <text:p text:style-name="P86"><text:span text:style-name="Source_20_Text"><text:span text:style-name="T11">lll</text:span></text:span><text:span text:style-name="T3">: O "corpo" da página. Tudo o que o usuário interage e visualiza fica aqui dentro.</text:span></text:p>
        </text:list-item>
      </text:list>
      <text:h text:style-name="P85" text:outline-level="3">2. A Mentalidade de "Caixas" (Box Model)</text:h>
      <text:p text:style-name="P68">Para o HTML, <text:span text:style-name="T1">tudo na tela é uma caixa</text:span>. Um parágrafo é uma caixa, um botão é uma caixa, o menu é uma caixa grande com caixas menores dentro. Quando fores estruturar uma página, olha para ela como um jogo de blocos (estilo Lego). Antes de escrever qualquer código, rabisca num papel: "Aqui vai ser a caixa do cabeçalho, aqui dentro terá a caixa do logo e a caixa do menu". Essa visão espacial vai facilitar a tua vida quando começares a aprender CSS.</text:p>
      <text:h text:style-name="P85" text:outline-level="3"><text:soft-page-break/>3. A Regra de Ouro: HTML estrutura, CSS estiliza</text:h>
      <text:p text:style-name="P68">Nunca uses uma tag HTML para mudar o visual de um elemento.</text:p>
      <text:list text:style-name="L50">
        <text:list-item>
          <text:p text:style-name="P87"><text:span text:style-name="T6">Errado:</text:span><text:span text:style-name="T3"> Usar a tag </text:span><text:span text:style-name="Source_20_Text"><text:span text:style-name="T3">&lt;h1&gt;</text:span></text:span><text:span text:style-name="T3"> apenas porque queres que um texto fique grande e em negrito.</text:span></text:p>
        </text:list-item>
        <text:list-item>
          <text:p text:style-name="P87"><text:span text:style-name="T6">Certo:</text:span><text:span text:style-name="T3"> Usar </text:span><text:span text:style-name="Source_20_Text"><text:span text:style-name="T3">&lt;h1&gt;</text:span></text:span><text:span text:style-name="T3"> porque aquele texto é o </text:span><text:span text:style-name="T4">título principal</text:span><text:span text:style-name="T3"> da página. Se quiseres mudar o tamanho dele, faz isso no arquivo CSS.</text:span></text:p>
        </text:list-item>
      </text:list>
      <text:p text:style-name="P68">O HTML cuida apenas do significado e da ordem das coisas. O visual é responsabilidade total do CSS.</text:p>
      <text:h text:style-name="P85" text:outline-level="3">4. Aninhamento Correto das Tags</text:h>
      <text:p text:style-name="P68">As tags funcionam como bonecas russas (uma dentro da outra) e devem ser fechadas na ordem inversa em que foram abertas.</text:p>
      <text:p text:style-name="P88"><text:span text:style-name="T3">❌ </text:span><text:span text:style-name="T4">Incorreto:</text:span><text:span text:style-name="T3"> </text:span><text:span text:style-name="Source_20_Text"><text:span text:style-name="T3">&lt;p&gt;Este é um texto </text:span></text:span><text:span text:style-name="Source_20_Text"><text:span text:style-name="T12">**negrito&lt;/p&gt;**</text:span></text:span><text:span text:style-name="T12"> </text:span><text:span text:style-name="T3">(As tags cruzaram-se).</text:span></text:p>
      <text:p text:style-name="P88"><text:span text:style-name="T4">Correto:</text:span><text:span text:style-name="T3"> </text:span><text:span text:style-name="Source_20_Text"><text:span text:style-name="T3">&lt;p&gt;Este é um texto </text:span></text:span><text:span text:style-name="Source_20_Text"><text:span text:style-name="T13">**negrito**&lt;/p&gt;</text:span></text:span><text:span text:style-name="T13"> </text:span><text:span text:style-name="T3">(A tag </text:span><text:span text:style-name="Source_20_Text"><text:span text:style-name="T3">&lt;strong&gt;</text:span></text:span><text:span text:style-name="T3"> abriu e fechou totalmente dentro da tag </text:span><text:span text:style-name="Source_20_Text"><text:span text:style-name="T3">&lt;p&gt;</text:span></text:span><text:span text:style-name="T3">).</text:span></text:p>
      <text:p text:style-name="P68">Aqui está o teu material de estudo complementar, estruturado de forma clara, direta e focada na semântica de cada um destes blocos essenciais. Dominar isto é o equivalente a aprender a formar as primeiras frases corretas num novo idioma.</text:p>
      <text:p text:style-name="P68"/>
      <text:p text:style-name="P68"/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03T14:45:07.053871473</meta:creation-date>
    <dc:date>2026-06-18T12:51:49.764330401</dc:date>
    <dc:creator>João António</dc:creator>
    <meta:editing-duration>PT3H4M11S</meta:editing-duration>
    <meta:editing-cycles>24</meta:editing-cycles>
    <meta:generator>LibreOffice/26.2.3.2$Linux_X86_64 LibreOffice_project/620$Build-2</meta:generator>
    <meta:document-statistic meta:table-count="1" meta:image-count="0" meta:object-count="0" meta:page-count="24" meta:paragraph-count="508" meta:word-count="6653" meta:character-count="42095" meta:non-whitespace-character-count="35450"/>
  </office:meta>
</office:document-meta>
</file>