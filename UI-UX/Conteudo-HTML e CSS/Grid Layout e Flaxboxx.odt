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147cm"/>
    </style:style>
    <style:style style:name="Tabela1.B" style:family="table-column">
      <style:table-column-properties style:column-width="7.094cm"/>
    </style:style>
    <style:style style:name="Tabela1.C" style:family="table-column">
      <style:table-column-properties style:column-width="6.759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" style:family="paragraph" style:parent-style-name="Preformatted_20_Text">
      <style:paragraph-properties fo:margin-top="0cm" fo:margin-bottom="0cm" style:contextual-spacing="false" fo:line-height="114%"/>
    </style:style>
    <style:style style:name="P6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 Tex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<text:span text:style-name="T1">Flexbox</text:span> e o <text:span text:style-name="T1">Grid Layout</text:span> não são concorrentes; eles foram projetados para trabalhar juntos. A regra de ouro do CSS moderno é: <text:span text:style-name="T1">use o Grid para a estrutura macro (layout geral) e o Flexbox para a estrutura micro (alinhamento de componentes internos).</text:span></text:p>
      <text:p text:style-name="Text_20_body">Enquanto o Grid trabalha em <text:span text:style-name="T1">duas dimensões</text:span> (linhas e colunas simultaneamente), o Flexbox é focado em <text:span text:style-name="T1">uma dimensão</text:span> (ou apenas linha, ou apenas coluna).</text:p>
      <text:p text:style-name="Text_20_body">Aqui está como eles se complementam na prática:</text:p>
      <text:h text:style-name="Heading_20_2" text:outline-level="2">1. O Grid dita as regras do espaço, o Flexbox organiza o conteúdo</text:h>
      <text:p text:style-name="Text_20_body">Imagine que você está construindo um site de e-commerce. Você usa o <text:span text:style-name="T1">Grid</text:span> para criar o layout da página: o cabeçalho no topo, uma barra lateral de filtros, a grade principal de produtos e o rodapé.</text:p>
      <text:p text:style-name="Text_20_body">Depois, dentro do card de <text:span text:style-name="T2">cada produto</text:span>, você usa o <text:span text:style-name="T1">Flexbox</text:span> para alinhar verticalmente a foto, o título, o preço e o botão "Comprar", garantindo que o botão fique sempre colado na parte inferior do card, independentemente do tamanho do título.</text:p>
      <text:h text:style-name="Heading_20_3" text:outline-level="3">Exemplo de Estrutura:</text:h>
      <text:p text:style-name="P1">HTML</text:p>
      <text:p text:style-name="Preformatted_20_Text"><text:span text:style-name="Source_20_Text">&lt;div class="site-grid"&gt; &lt;header&gt;Cabeçalho&lt;/header&gt;</text:span></text:p>
      <text:p text:style-name="Preformatted_20_Text"><text:span text:style-name="Source_20_Text"><text:s text:c="2"/>&lt;main class="products-grid"&gt; &lt;div class="product-card"&gt; &lt;img&gt;</text:span></text:p>
      <text:p text:style-name="Preformatted_20_Text"><text:span text:style-name="Source_20_Text"><text:s text:c="6"/>&lt;h3&gt;Nome do Produto&lt;/h3&gt;</text:span></text:p>
      <text:p text:style-name="Preformatted_20_Text"><text:span text:style-name="Source_20_Text"><text:s text:c="6"/>&lt;button&gt;Comprar&lt;/button&gt;</text:span></text:p>
      <text:p text:style-name="Preformatted_20_Text"><text:span text:style-name="Source_20_Text"><text:s text:c="4"/>&lt;/div&gt;</text:span></text:p>
      <text:p text:style-name="Preformatted_20_Text"/>
      <text:p text:style-name="Preformatted_20_Text"><text:span text:style-name="Source_20_Text"><text:s text:c="2"/>&lt;/main&gt;</text:span></text:p>
      <text:p text:style-name="P2"><text:span text:style-name="Source_20_Text">&lt;/div&gt;</text:span></text:p>
      <text:h text:style-name="Heading_20_2" text:outline-level="2">2. Flexbox dentro de itens do Grid</text:h>
      <text:p text:style-name="Text_20_body">Essa é a combinação mais comum. O Grid posiciona o elemento na tela, e o Flexbox lida com o conteúdo interno desse elemento.</text:p>
      <text:p text:style-name="P3">CSS</text:p>
      <text:p text:style-name="P4"><text:span text:style-name="Source_20_Text"><text:span text:style-name="T3">/* Layout Geral da Página */</text:span></text:span></text:p>
      <text:p text:style-name="P4"><text:span text:style-name="Source_20_Text"><text:span text:style-name="T3">.site-grid {</text:span></text:span></text:p>
      <text:p text:style-name="P4"><text:span text:style-name="Source_20_Text"><text:s text:c="2"/></text:span><text:span text:style-name="Source_20_Text"><text:span text:style-name="T3">display: grid;</text:span></text:span></text:p>
      <text:p text:style-name="P4"><text:span text:style-name="Source_20_Text"><text:s text:c="2"/></text:span><text:span text:style-name="Source_20_Text"><text:span text:style-name="T3">grid-template-columns: 250px 1fr; /* Barra lateral e conteúdo principal */</text:span></text:span></text:p>
      <text:p text:style-name="P4"><text:span text:style-name="Source_20_Text"><text:s text:c="2"/></text:span><text:span text:style-name="Source_20_Text"><text:span text:style-name="T3">gap: 20px;</text:span></text:span></text:p>
      <text:p text:style-name="P5"><text:span text:style-name="Source_20_Text"><text:span text:style-name="T3">}</text:span></text:span></text:p>
      <text:p text:style-name="P5"/>
      <text:p text:style-name="P4"><text:span text:style-name="Source_20_Text"><text:span text:style-name="T3">/* Card de Produto (Item do Grid) que usa Flexbox internamente */</text:span></text:span></text:p>
      <text:p text:style-name="P4"><text:span text:style-name="Source_20_Text"><text:span text:style-name="T3">.product-card {</text:span></text:span></text:p>
      <text:p text:style-name="P4"><text:span text:style-name="Source_20_Text"><text:s text:c="2"/></text:span><text:span text:style-name="Source_20_Text"><text:span text:style-name="T3">display: flex;</text:span></text:span></text:p>
      <text:p text:style-name="P4"><text:span text:style-name="Source_20_Text"><text:s text:c="2"/></text:span><text:span text:style-name="Source_20_Text"><text:span text:style-name="T3">flex-direction: column;</text:span></text:span></text:p>
      <text:p text:style-name="P4"><text:span text:style-name="Source_20_Text"><text:s text:c="2"/></text:span><text:span text:style-name="Source_20_Text"><text:span text:style-name="T3">justify-content: space-between; /* Empurra o botão para o final */</text:span></text:span></text:p>
      <text:p text:style-name="P4"><text:span text:style-name="Source_20_Text"><text:s text:c="2"/></text:span><text:span text:style-name="Source_20_Text"><text:span text:style-name="T3">height: 100%;</text:span></text:span></text:p>
      <text:p text:style-name="P5"><text:soft-page-break/><text:span text:style-name="Source_20_Text"><text:span text:style-name="T3">}</text:span></text:span></text:p>
      <text:h text:style-name="P6" text:outline-level="2">3. Grid dentro de itens do Flexbox</text:h>
      <text:p text:style-name="P7">O inverso também acontece. Imagine uma barra de navegação (Header) que usa <text:span text:style-name="T1">Flexbox</text:span> para espalhar os elementos horizontalmente (Logo à esquerda, menu no centro, perfil à direita).</text:p>
      <text:p text:style-name="P7">O menu central, por sua vez, pode ter um layout complexo de megamenu com várias colunas de links. Você pode transformar esse menu interno em um <text:span text:style-name="T1">Grid</text:span>.</text:p>
      <text:h text:style-name="P6" text:outline-level="2">Resumo Comparativo: Quando usar qual?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8"><text:span text:style-name="Strong_20_Emphasis"><text:span text:style-name="T3">Característica</text:span></text:span></text:p>
            </table:table-cell>
            <table:table-cell table:style-name="Tabela1.A1" office:value-type="string">
              <text:p text:style-name="P8"><text:span text:style-name="Strong_20_Emphasis"><text:span text:style-name="T3">Grid Layout</text:span></text:span></text:p>
            </table:table-cell>
            <table:table-cell table:style-name="Tabela1.A1" office:value-type="string">
              <text:p text:style-name="P8"><text:span text:style-name="Strong_20_Emphasis"><text:span text:style-name="T3">Flexbox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9">Dimensão</text:p>
          </table:table-cell>
          <table:table-cell table:style-name="Tabela1.A1" office:value-type="string">
            <text:p text:style-name="P10">Bidimensional (Linhas e Colunas)</text:p>
          </table:table-cell>
          <table:table-cell table:style-name="Tabela1.A1" office:value-type="string">
            <text:p text:style-name="P10">Unidimensional (Linha <text:span text:style-name="T1">ou</text:span> Coluna)</text:p>
          </table:table-cell>
        </table:table-row>
        <table:table-row>
          <table:table-cell table:style-name="Tabela1.A1" office:value-type="string">
            <text:p text:style-name="P9">Abordagem</text:p>
          </table:table-cell>
          <table:table-cell table:style-name="Tabela1.A1" office:value-type="string">
            <text:p text:style-name="P10"><text:span text:style-name="T2">Layout-First</text:span> (Você cria a estrutura e depois encaixa o conteúdo)</text:p>
          </table:table-cell>
          <table:table-cell table:style-name="Tabela1.A1" office:value-type="string">
            <text:p text:style-name="P10"><text:span text:style-name="T2">Content-First</text:span> (O tamanho dos itens dita como eles se acomodam)</text:p>
          </table:table-cell>
        </table:table-row>
        <table:table-row>
          <table:table-cell table:style-name="Tabela1.A1" office:value-type="string">
            <text:p text:style-name="P9">Ideal para...</text:p>
          </table:table-cell>
          <table:table-cell table:style-name="Tabela1.A1" office:value-type="string">
            <text:p text:style-name="P10">Páginas completas, dashboards, galerias de fotos assimétricas.</text:p>
          </table:table-cell>
          <table:table-cell table:style-name="Tabela1.A1" office:value-type="string">
            <text:p text:style-name="P10">Menus de navegação, centralizar elementos, alinhar ícone com texto.</text:p>
          </table:table-cell>
        </table:table-row>
        <table:table-row>
          <table:table-cell table:style-name="Tabela1.A1" office:value-type="string">
            <text:p text:style-name="P9">Alinhamento</text:p>
          </table:table-cell>
          <table:table-cell table:style-name="Tabela1.A1" office:value-type="string">
            <text:p text:style-name="P10">Excelente para alinhar elementos em relação uns aos outros (grades perfeitas).</text:p>
          </table:table-cell>
          <table:table-cell table:style-name="Tabela1.A1" office:value-type="string">
            <text:p text:style-name="P10">Excelente para distribuir espaço sobressalente entre itens.</text:p>
          </table:table-cell>
        </table:table-row>
      </table:table>
      <text:p text:style-name="P7"/>
      <text:p text:style-name="P11"><text:span text:style-name="T3">Combinando os dois, você consegue criar layouts extremamente responsivos, limpos e sem precisar recorrer a "gambiarras" antigas com </text:span><text:span text:style-name="Source_20_Text"><text:span text:style-name="T3">float</text:span></text:span><text:span text:style-name="T3"> ou posicionamentos absolutos complexos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13T12:11:37.534048497</meta:creation-date>
    <dc:date>2026-06-13T12:14:07.371416167</dc:date>
    <dc:creator>João António</dc:creator>
    <meta:editing-duration>PT2M36S</meta:editing-duration>
    <meta:editing-cycles>1</meta:editing-cycles>
    <meta:document-statistic meta:table-count="1" meta:image-count="0" meta:object-count="0" meta:page-count="2" meta:paragraph-count="51" meta:word-count="429" meta:character-count="2787" meta:non-whitespace-character-count="2375"/>
    <meta:generator>LibreOffice/26.2.3.2$Linux_X86_64 LibreOffice_project/620$Build-2</meta:generator>
  </office:meta>
</office:document-meta>
</file>