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5800000258300579F4.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Tabela1" style:family="table">
      <style:table-properties style:width="17cm" table:align="left"/>
    </style:style>
    <style:style style:name="Tabela1.A" style:family="table-column">
      <style:table-column-properties style:column-width="4.948cm"/>
    </style:style>
    <style:style style:name="Tabela1.B" style:family="table-column">
      <style:table-column-properties style:column-width="1.947cm"/>
    </style:style>
    <style:style style:name="Tabela1.C" style:family="table-column">
      <style:table-column-properties style:column-width="10.105cm"/>
    </style:style>
    <style:style style:name="Tabela1.A1" style:family="table-cell">
      <style:table-cell-properties style:vertical-align="middle" fo:padding-left="0.318cm" fo:padding-right="0.318cm" fo:padding-top="0.212cm" fo:padding-bottom="0.212cm" fo:border="0.05pt solid #c4c7c5"/>
    </style:style>
    <style:style style:name="P1" style:family="paragraph" style:parent-style-name="Title">
      <style:text-properties style:font-name="Liberation Serif" fo:font-size="36pt" officeooo:rsid="00275018" officeooo:paragraph-rsid="00275018" fo:background-color="#ffff00" style:font-size-asian="36pt" style:font-size-complex="36pt"/>
    </style:style>
    <style:style style:name="P2" style:family="paragraph" style:parent-style-name="Subtitle">
      <style:text-properties style:font-name="Liberation Serif" fo:font-size="22pt" style:font-size-asian="22pt" style:font-size-complex="22pt"/>
    </style:style>
    <style:style style:name="P3" style:family="paragraph" style:parent-style-name="Text_20_body">
      <style:text-properties style:font-name="Liberation Serif" fo:font-size="22pt" officeooo:rsid="0065800b" officeooo:paragraph-rsid="0065800b" style:font-size-asian="22pt" style:font-size-complex="22pt"/>
    </style:style>
    <style:style style:name="P4" style:family="paragraph" style:parent-style-name="Text_20_body">
      <style:text-properties style:font-name="Liberation Serif" fo:font-size="22pt" fo:font-weight="bold" officeooo:rsid="0066ba8e" officeooo:paragraph-rsid="0066ba8e" style:font-size-asian="22pt" style:font-weight-asian="bold" style:font-size-complex="22pt" style:font-weight-complex="bold"/>
    </style:style>
    <style:style style:name="P5" style:family="paragraph" style:parent-style-name="Contents_20_Heading">
      <style:text-properties style:font-name="Liberation Serif"/>
    </style:style>
    <style:style style:name="P6" style:family="paragraph" style:parent-style-name="Contents_20_2">
      <style:paragraph-properties>
        <style:tab-stops>
          <style:tab-stop style:position="16.499cm" style:type="right" style:leader-style="dotted" style:leader-text="."/>
        </style:tab-stops>
      </style:paragraph-properties>
    </style:style>
    <style:style style:name="P7" style:family="paragraph" style:parent-style-name="Contents_20_3">
      <style:paragraph-properties>
        <style:tab-stops>
          <style:tab-stop style:position="15.998cm" style:type="right" style:leader-style="dotted" style:leader-text="."/>
        </style:tab-stops>
      </style:paragraph-properties>
    </style:style>
    <style:style style:name="P8" style:family="paragraph" style:parent-style-name="Text_20_body">
      <style:text-properties style:font-name="Liberation Serif"/>
    </style:style>
    <style:style style:name="P9" style:family="paragraph" style:parent-style-name="Heading_20_2">
      <style:paragraph-properties fo:break-before="page"/>
      <style:text-properties fo:color="#000000" loext:opacity="100%" style:font-name="Liberation Serif" fo:background-color="#ffff00"/>
    </style:style>
    <style:style style:name="P10" style:family="paragraph" style:parent-style-name="Text_20_body" style:list-style-name="L1">
      <style:text-properties style:font-name="Liberation Serif"/>
    </style:style>
    <style:style style:name="P11" style:family="paragraph" style:parent-style-name="Heading_20_3" style:list-style-name="L2">
      <style:text-properties style:font-name="Liberation Serif"/>
    </style:style>
    <style:style style:name="P12" style:family="paragraph" style:parent-style-name="Text_20_body" style:list-style-name="L3">
      <style:text-properties style:font-name="Liberation Serif"/>
    </style:style>
    <style:style style:name="P13" style:family="paragraph" style:parent-style-name="Heading_20_3" style:list-style-name="L3">
      <style:text-properties style:font-name="Liberation Serif"/>
    </style:style>
    <style:style style:name="P14" style:family="paragraph" style:parent-style-name="Text_20_body" style:list-style-name="L4">
      <style:text-properties style:font-name="Liberation Serif"/>
    </style:style>
    <style:style style:name="P15" style:family="paragraph" style:parent-style-name="Text_20_body" style:list-style-name="L4"/>
    <style:style style:name="P16" style:family="paragraph" style:parent-style-name="Quotations">
      <style:text-properties style:font-name="Liberation Serif" fo:background-color="#ffff00"/>
    </style:style>
    <style:style style:name="P17" style:family="paragraph" style:parent-style-name="Heading_20_2">
      <style:text-properties style:font-name="Liberation Serif" officeooo:rsid="00275018" officeooo:paragraph-rsid="00275018" fo:background-color="#ffff00"/>
    </style:style>
    <style:style style:name="P18" style:family="paragraph" style:parent-style-name="Heading_20_3" style:list-style-name="L5">
      <style:text-properties style:font-name="Liberation Serif"/>
    </style:style>
    <style:style style:name="P19" style:family="paragraph" style:parent-style-name="Text_20_body" style:list-style-name="L6"/>
    <style:style style:name="P20" style:family="paragraph" style:parent-style-name="Text_20_body">
      <style:paragraph-properties fo:margin-left="2.501cm" fo:text-indent="0cm" style:auto-text-indent="false"/>
      <style:text-properties fo:color="#000000" loext:opacity="100%" style:font-name="Liberation Serif" fo:background-color="#ffff00"/>
    </style:style>
    <style:style style:name="P21" style:family="paragraph" style:parent-style-name="Preformatted_20_Text">
      <style:paragraph-properties fo:margin-left="2.501cm" fo:text-indent="0cm" style:auto-text-indent="false"/>
    </style:style>
    <style:style style:name="P22" style:family="paragraph" style:parent-style-name="Preformatted_20_Text">
      <style:paragraph-properties fo:margin-left="2.501cm" fo:text-indent="0cm" style:auto-text-indent="false"/>
      <style:text-properties fo:color="#000000" loext:opacity="100%" style:font-name="Liberation Serif" fo:background-color="#ffff00"/>
    </style:style>
    <style:style style:name="P23" style:family="paragraph" style:parent-style-name="Preformatted_20_Text">
      <style:paragraph-properties fo:margin-left="2.501cm" fo:text-indent="0cm" style:auto-text-indent="false"/>
      <style:text-properties officeooo:paragraph-rsid="003006bc"/>
    </style:style>
    <style:style style:name="P24" style:family="paragraph" style:parent-style-name="Heading_20_3" style:list-style-name="L7">
      <style:text-properties officeooo:paragraph-rsid="003006bc"/>
    </style:style>
    <style:style style:name="P25" style:family="paragraph" style:parent-style-name="Text_20_body" style:list-style-name="L8"/>
    <style:style style:name="P26" style:family="paragraph" style:parent-style-name="Text_20_body">
      <style:paragraph-properties fo:margin-left="1.251cm" fo:text-indent="0cm" style:auto-text-indent="false"/>
      <style:text-properties fo:color="#000000" loext:opacity="100%" style:font-name="Liberation Serif" fo:background-color="#ffff00"/>
    </style:style>
    <style:style style:name="P27" style:family="paragraph" style:parent-style-name="Preformatted_20_Text">
      <style:paragraph-properties fo:margin-left="1.251cm" fo:text-indent="0cm" style:auto-text-indent="false"/>
    </style:style>
    <style:style style:name="P28" style:family="paragraph" style:parent-style-name="Text_20_body" style:list-style-name="L9">
      <style:text-properties style:font-name="Liberation Serif" fo:font-weight="bold" style:font-weight-asian="bold" style:font-weight-complex="bold"/>
    </style:style>
    <style:style style:name="P29" style:family="paragraph" style:parent-style-name="Text_20_body">
      <style:paragraph-properties fo:margin-left="1.251cm" fo:text-indent="0cm" style:auto-text-indent="false"/>
      <style:text-properties fo:color="#000000" loext:opacity="100%" style:font-name="Liberation Serif" fo:background-color="#cccccc"/>
    </style:style>
    <style:style style:name="P30" style:family="paragraph" style:parent-style-name="Text_20_body" style:list-style-name="L10">
      <style:text-properties style:font-name="Liberation Serif" fo:font-weight="bold" style:font-weight-asian="bold" style:font-weight-complex="bold"/>
    </style:style>
    <style:style style:name="P31" style:family="paragraph" style:parent-style-name="Text_20_body" style:list-style-name="L11">
      <style:text-properties style:font-name="Liberation Serif" fo:font-weight="bold" style:font-weight-asian="bold" style:font-weight-complex="bold"/>
    </style:style>
    <style:style style:name="P32" style:family="paragraph" style:parent-style-name="Quotations">
      <style:paragraph-properties fo:margin-left="1.251cm" fo:text-indent="0cm" style:auto-text-indent="false"/>
    </style:style>
    <style:style style:name="P33" style:family="paragraph" style:parent-style-name="Text_20_body" style:list-style-name="L12">
      <style:text-properties style:font-name="Liberation Serif"/>
    </style:style>
    <style:style style:name="P34" style:family="paragraph" style:parent-style-name="Text_20_body">
      <style:paragraph-properties fo:margin-left="1.251cm" fo:text-indent="0cm" style:auto-text-indent="false"/>
      <style:text-properties fo:color="#000000" loext:opacity="100%" style:font-name="Liberation Serif" fo:background-color="#ffffd7"/>
    </style:style>
    <style:style style:name="P35" style:family="paragraph" style:parent-style-name="Text_20_body" style:list-style-name="L13">
      <style:text-properties style:font-name="Liberation Serif" fo:font-weight="bold" style:font-weight-asian="bold" style:font-weight-complex="bold"/>
    </style:style>
    <style:style style:name="P36" style:family="paragraph" style:parent-style-name="Preformatted_20_Text">
      <style:paragraph-properties fo:margin-left="1.251cm" fo:line-height="150%" fo:text-indent="0cm" style:auto-text-indent="false"/>
    </style:style>
    <style:style style:name="P37" style:family="paragraph" style:parent-style-name="Text_20_body">
      <style:paragraph-properties fo:text-align="center" style:justify-single-word="false"/>
      <style:text-properties style:font-name="Liberation Serif" fo:font-weight="bold" style:font-weight-asian="bold" style:font-weight-complex="bold"/>
    </style:style>
    <style:style style:name="P38" style:family="paragraph" style:parent-style-name="Table_20_Contents">
      <style:text-properties style:font-name="Liberation Serif"/>
    </style:style>
    <style:style style:name="P39" style:family="paragraph" style:parent-style-name="Heading_20_2">
      <style:text-properties fo:color="#000000" loext:opacity="100%" style:font-name="Liberation Serif" fo:background-color="#ffff00"/>
    </style:style>
    <style:style style:name="P40" style:family="paragraph" style:parent-style-name="Heading_20_3" style:list-style-name="L14"/>
    <style:style style:name="P41" style:family="paragraph" style:parent-style-name="Text_20_body" style:list-style-name="L15">
      <style:text-properties style:font-name="Liberation Serif"/>
    </style:style>
    <style:style style:name="P42" style:family="paragraph" style:parent-style-name="Text_20_body" style:list-style-name="L15">
      <style:text-properties fo:color="#000000" loext:opacity="100%" style:font-name="Liberation Serif" fo:background-color="#ffffd7"/>
    </style:style>
    <style:style style:name="P43" style:family="paragraph" style:parent-style-name="Preformatted_20_Text" style:list-style-name="L15"/>
    <style:style style:name="P44" style:family="paragraph" style:parent-style-name="Preformatted_20_Text" style:list-style-name="L15">
      <style:text-properties officeooo:paragraph-rsid="0031cd3b"/>
    </style:style>
    <style:style style:name="P45" style:family="paragraph" style:parent-style-name="Heading_20_3" style:list-style-name="L16">
      <style:text-properties officeooo:paragraph-rsid="0031cd3b"/>
    </style:style>
    <style:style style:name="P46" style:family="paragraph" style:parent-style-name="Text_20_body" style:list-style-name="L17">
      <style:text-properties style:font-name="Liberation Serif"/>
    </style:style>
    <style:style style:name="P47" style:family="paragraph" style:parent-style-name="Text_20_body" style:list-style-name="L17">
      <style:text-properties fo:color="#000000" loext:opacity="100%" style:font-name="Liberation Serif" fo:background-color="#ffffd7"/>
    </style:style>
    <style:style style:name="P48" style:family="paragraph" style:parent-style-name="Preformatted_20_Text" style:list-style-name="L17"/>
    <style:style style:name="P49" style:family="paragraph" style:parent-style-name="Heading_20_3" style:list-style-name="L18"/>
    <style:style style:name="P50" style:family="paragraph" style:parent-style-name="Text_20_body" style:list-style-name="L19">
      <style:text-properties style:font-name="Liberation Serif"/>
    </style:style>
    <style:style style:name="P51" style:family="paragraph" style:parent-style-name="Text_20_body" style:list-style-name="L19">
      <style:text-properties fo:color="#000000" loext:opacity="100%" style:font-name="Liberation Serif" fo:background-color="#ffffd7"/>
    </style:style>
    <style:style style:name="P52" style:family="paragraph" style:parent-style-name="Preformatted_20_Text" style:list-style-name="L19"/>
    <style:style style:name="P53" style:family="paragraph" style:parent-style-name="Text_20_body" style:list-style-name="L20"/>
    <style:style style:name="P54" style:family="paragraph" style:parent-style-name="Text_20_body" style:list-style-name="L20">
      <style:text-properties style:font-name="Liberation Serif"/>
    </style:style>
    <style:style style:name="P55" style:family="paragraph" style:parent-style-name="Text_20_body" style:list-style-name="L20">
      <style:text-properties fo:color="#000000" loext:opacity="100%" style:font-name="Liberation Serif" fo:background-color="#ffffd7"/>
    </style:style>
    <style:style style:name="P56" style:family="paragraph" style:parent-style-name="Preformatted_20_Text" style:list-style-name="L20"/>
    <style:style style:name="P57" style:family="paragraph" style:parent-style-name="Text_20_body" style:list-style-name="L21"/>
    <style:style style:name="P58" style:family="paragraph" style:parent-style-name="Text_20_body" style:list-style-name="L21">
      <style:text-properties style:font-name="Liberation Serif"/>
    </style:style>
    <style:style style:name="P59" style:family="paragraph" style:parent-style-name="Text_20_body" style:list-style-name="L21">
      <style:text-properties fo:color="#000000" loext:opacity="100%" style:font-name="Liberation Serif" fo:background-color="#ffffd7"/>
    </style:style>
    <style:style style:name="P60" style:family="paragraph" style:parent-style-name="Preformatted_20_Text" style:list-style-name="L21"/>
    <style:style style:name="P61" style:family="paragraph" style:parent-style-name="Text_20_body" style:list-style-name="L22"/>
    <style:style style:name="P62" style:family="paragraph" style:parent-style-name="Text_20_body" style:list-style-name="L22">
      <style:text-properties style:font-name="Liberation Serif"/>
    </style:style>
    <style:style style:name="P63" style:family="paragraph" style:parent-style-name="Preformatted_20_Text" style:list-style-name="L22"/>
    <style:style style:name="P64" style:family="paragraph" style:parent-style-name="Text_20_body" style:list-style-name="L23"/>
    <style:style style:name="P65" style:family="paragraph" style:parent-style-name="Text_20_body" style:list-style-name="L23">
      <style:text-properties style:font-name="Liberation Serif"/>
    </style:style>
    <style:style style:name="P66" style:family="paragraph" style:parent-style-name="Text_20_body" style:list-style-name="L23">
      <style:text-properties fo:color="#000000" loext:opacity="100%" style:font-name="Liberation Serif" fo:background-color="#ffffd7"/>
    </style:style>
    <style:style style:name="P67" style:family="paragraph" style:parent-style-name="Preformatted_20_Text" style:list-style-name="L23"/>
    <style:style style:name="P68" style:family="paragraph" style:parent-style-name="Text_20_body" style:list-style-name="L24">
      <style:text-properties style:font-name="Liberation Serif"/>
    </style:style>
    <style:style style:name="P69" style:family="paragraph" style:parent-style-name="Text_20_body" style:list-style-name="L24">
      <style:text-properties fo:color="#000000" loext:opacity="100%" style:font-name="Liberation Serif" fo:background-color="#ffffd7"/>
    </style:style>
    <style:style style:name="P70" style:family="paragraph" style:parent-style-name="Preformatted_20_Text" style:list-style-name="L24"/>
    <style:style style:name="P71" style:family="paragraph" style:parent-style-name="Text_20_body" style:list-style-name="L25"/>
    <style:style style:name="P72" style:family="paragraph" style:parent-style-name="Text_20_body" style:list-style-name="L25">
      <style:text-properties style:font-name="Liberation Serif"/>
    </style:style>
    <style:style style:name="P73" style:family="paragraph" style:parent-style-name="Text_20_body" style:list-style-name="L25">
      <style:text-properties fo:color="#000000" loext:opacity="100%" style:font-name="Liberation Serif" fo:background-color="#ffffd7"/>
    </style:style>
    <style:style style:name="P74" style:family="paragraph" style:parent-style-name="Preformatted_20_Text" style:list-style-name="L25"/>
    <style:style style:name="P75" style:family="paragraph" style:parent-style-name="Text_20_body" style:list-style-name="L26">
      <style:text-properties style:font-name="Liberation Serif"/>
    </style:style>
    <style:style style:name="P76" style:family="paragraph" style:parent-style-name="Text_20_body" style:list-style-name="L26">
      <style:text-properties fo:color="#000000" loext:opacity="100%" style:font-name="Liberation Serif" fo:background-color="#ffffd7"/>
    </style:style>
    <style:style style:name="P77" style:family="paragraph" style:parent-style-name="Preformatted_20_Text" style:list-style-name="L26"/>
    <style:style style:name="P78" style:family="paragraph" style:parent-style-name="Heading_20_2">
      <style:text-properties style:font-name="Liberation Serif" fo:background-color="#ffff00"/>
    </style:style>
    <style:style style:name="P79" style:family="paragraph" style:parent-style-name="Heading_20_3">
      <style:text-properties style:font-name="Liberation Serif"/>
    </style:style>
    <style:style style:name="P80" style:family="paragraph" style:parent-style-name="Text_20_body" style:list-style-name="L27"/>
    <style:style style:name="P81" style:family="paragraph" style:parent-style-name="Preformatted_20_Text">
      <style:paragraph-properties fo:margin-left="1.251cm" fo:text-indent="0cm" style:auto-text-indent="false"/>
      <style:text-properties fo:color="#000000" loext:opacity="100%" style:font-name="Liberation Serif" fo:background-color="#ffffd7"/>
    </style:style>
    <style:style style:name="P82" style:family="paragraph" style:parent-style-name="Text_20_body" style:list-style-name="L28"/>
    <style:style style:name="P83" style:family="paragraph" style:parent-style-name="Text_20_body" style:list-style-name="L29"/>
    <style:style style:name="P84" style:family="paragraph" style:parent-style-name="Text_20_body">
      <style:paragraph-properties fo:margin-left="2.501cm" fo:text-indent="0cm" style:auto-text-indent="false"/>
      <style:text-properties fo:color="#000000" loext:opacity="100%" style:font-name="Liberation Serif" fo:background-color="#ffffd7"/>
    </style:style>
    <style:style style:name="P85" style:family="paragraph" style:parent-style-name="Preformatted_20_Text">
      <style:paragraph-properties fo:margin-left="2.501cm" fo:text-indent="0cm" style:auto-text-indent="false"/>
      <style:text-properties officeooo:paragraph-rsid="003a4f93"/>
    </style:style>
    <style:style style:name="P86" style:family="paragraph" style:parent-style-name="Heading_20_3">
      <style:text-properties style:font-name="Liberation Serif" officeooo:paragraph-rsid="0020deef"/>
    </style:style>
    <style:style style:name="P87" style:family="paragraph" style:parent-style-name="Text_20_body">
      <style:text-properties fo:color="#000000" loext:opacity="100%" style:font-name="Liberation Serif" fo:font-weight="bold" style:font-weight-asian="bold" style:font-weight-complex="bold"/>
    </style:style>
    <style:style style:name="P88" style:family="paragraph" style:parent-style-name="Text_20_body">
      <style:paragraph-properties fo:break-before="page"/>
    </style:style>
    <style:style style:name="P89" style:family="paragraph" style:parent-style-name="Preformatted_20_Text">
      <style:text-properties style:font-name="Liberation Serif"/>
    </style:style>
    <style:style style:name="P90" style:family="paragraph" style:parent-style-name="Text_20_body" style:list-style-name="L30">
      <style:text-properties style:font-name="Liberation Serif"/>
    </style:style>
    <style:style style:name="P91" style:family="paragraph" style:parent-style-name="Text_20_body" style:list-style-name="L30"/>
    <style:style style:name="P92" style:family="paragraph" style:parent-style-name="Text_20_body" style:list-style-name="L30">
      <style:text-properties fo:color="#000000" loext:opacity="100%" style:font-name="Liberation Serif" fo:background-color="#ffffd7"/>
    </style:style>
    <style:style style:name="P93" style:family="paragraph" style:parent-style-name="Preformatted_20_Text" style:list-style-name="L30"/>
    <style:style style:name="P94" style:family="paragraph" style:parent-style-name="Text_20_body" style:list-style-name="L31">
      <style:text-properties style:font-name="Liberation Serif"/>
    </style:style>
    <style:style style:name="P95" style:family="paragraph" style:parent-style-name="Text_20_body" style:list-style-name="L31"/>
    <style:style style:name="P96" style:family="paragraph" style:parent-style-name="Text_20_body" style:list-style-name="L31">
      <style:text-properties fo:color="#000000" loext:opacity="100%" style:font-name="Liberation Serif" fo:background-color="#ffffd7"/>
    </style:style>
    <style:style style:name="P97" style:family="paragraph" style:parent-style-name="Preformatted_20_Text" style:list-style-name="L31"/>
    <style:style style:name="P98" style:family="paragraph" style:parent-style-name="Text_20_body" style:list-style-name="L32">
      <style:text-properties style:font-name="Liberation Serif"/>
    </style:style>
    <style:style style:name="P99" style:family="paragraph" style:parent-style-name="Text_20_body" style:list-style-name="L32"/>
    <style:style style:name="P100" style:family="paragraph" style:parent-style-name="Text_20_body" style:list-style-name="L32">
      <style:text-properties fo:color="#000000" loext:opacity="100%" style:font-name="Liberation Serif" fo:background-color="#ffffd7"/>
    </style:style>
    <style:style style:name="P101" style:family="paragraph" style:parent-style-name="Preformatted_20_Text" style:list-style-name="L32"/>
    <style:style style:name="P102" style:family="paragraph" style:parent-style-name="Preformatted_20_Text" style:list-style-name="L32">
      <style:text-properties fo:color="#000000" loext:opacity="100%" style:font-name="Liberation Serif" fo:background-color="#ffffd7"/>
    </style:style>
    <style:style style:name="P103" style:family="paragraph" style:parent-style-name="Text_20_body" style:list-style-name="L33"/>
    <style:style style:name="P104" style:family="paragraph" style:parent-style-name="Text_20_body" style:list-style-name="L33">
      <style:text-properties style:font-name="Liberation Serif"/>
    </style:style>
    <style:style style:name="P105" style:family="paragraph" style:parent-style-name="Text_20_body" style:list-style-name="L33">
      <style:text-properties fo:color="#000000" loext:opacity="100%" style:font-name="Liberation Serif" fo:background-color="#ffffd7"/>
    </style:style>
    <style:style style:name="P106" style:family="paragraph" style:parent-style-name="Preformatted_20_Text" style:list-style-name="L33">
      <style:text-properties officeooo:paragraph-rsid="0023525c"/>
    </style:style>
    <style:style style:name="P107" style:family="paragraph" style:parent-style-name="Preformatted_20_Text" style:list-style-name="L33"/>
    <style:style style:name="P108" style:family="paragraph" style:parent-style-name="Heading_20_3">
      <style:text-properties style:font-name="Liberation Serif" officeooo:paragraph-rsid="002a24f9"/>
    </style:style>
    <style:style style:name="P109" style:family="paragraph" style:parent-style-name="Text_20_body">
      <style:text-properties officeooo:paragraph-rsid="002a24f9"/>
    </style:style>
    <style:style style:name="P110" style:family="paragraph" style:parent-style-name="Text_20_body" style:list-style-name="L34">
      <style:text-properties style:font-name="Liberation Serif" officeooo:paragraph-rsid="002a24f9"/>
    </style:style>
    <style:style style:name="P111" style:family="paragraph" style:parent-style-name="Text_20_body" style:list-style-name="L34">
      <style:text-properties officeooo:paragraph-rsid="002a24f9"/>
    </style:style>
    <style:style style:name="P112" style:family="paragraph" style:parent-style-name="Text_20_body" style:list-style-name="L34">
      <style:text-properties fo:color="#000000" loext:opacity="100%" style:font-name="Liberation Serif" officeooo:paragraph-rsid="002a24f9" fo:background-color="#ffffd7"/>
    </style:style>
    <style:style style:name="P113" style:family="paragraph" style:parent-style-name="Preformatted_20_Text" style:list-style-name="L34">
      <style:text-properties officeooo:paragraph-rsid="002a24f9"/>
    </style:style>
    <style:style style:name="P114" style:family="paragraph" style:parent-style-name="Preformatted_20_Text" style:list-style-name="L34">
      <style:text-properties fo:color="#000000" loext:opacity="100%" style:font-name="Liberation Serif" officeooo:paragraph-rsid="002a24f9" fo:background-color="#ffffd7"/>
    </style:style>
    <style:style style:name="P115" style:family="paragraph" style:parent-style-name="Text_20_body" style:list-style-name="L35"/>
    <style:style style:name="P116" style:family="paragraph" style:parent-style-name="Text_20_body" style:list-style-name="L36"/>
    <style:style style:name="P117" style:family="paragraph" style:parent-style-name="Text_20_body" style:list-style-name="L37"/>
    <style:style style:name="P118" style:family="paragraph" style:parent-style-name="Text_20_body" style:list-style-name="L38"/>
    <style:style style:name="P119" style:family="paragraph" style:parent-style-name="Text_20_body" style:list-style-name="L39"/>
    <style:style style:name="P120" style:family="paragraph" style:parent-style-name="Text_20_body" style:list-style-name="L40"/>
    <style:style style:name="P121" style:family="paragraph" style:parent-style-name="Text_20_body">
      <style:text-properties style:font-name="Liberation Serif" fo:font-weight="bold" style:font-weight-asian="bold" style:font-weight-complex="bold"/>
    </style:style>
    <style:style style:name="P122" style:family="paragraph" style:parent-style-name="Text_20_body" style:list-style-name="L41"/>
    <style:style style:name="P123" style:family="paragraph" style:parent-style-name="Text_20_body" style:list-style-name="L41">
      <style:text-properties style:font-name="Liberation Serif"/>
    </style:style>
    <style:style style:name="P124" style:family="paragraph" style:parent-style-name="Text_20_body" style:list-style-name="L42"/>
    <style:style style:name="P125" style:family="paragraph" style:parent-style-name="Text_20_body" style:list-style-name="L43"/>
    <style:style style:name="P126" style:family="paragraph" style:parent-style-name="Text_20_body">
      <style:paragraph-properties fo:margin-left="0cm" fo:text-indent="0cm" style:auto-text-indent="false"/>
      <style:text-properties fo:color="#000000" loext:opacity="100%" style:font-name="Liberation Serif" fo:background-color="#ffffd7"/>
    </style:style>
    <style:style style:name="P127" style:family="paragraph" style:parent-style-name="Preformatted_20_Text">
      <style:paragraph-properties fo:margin-left="0cm" fo:text-indent="0cm" style:auto-text-indent="false"/>
    </style:style>
    <style:style style:name="P128" style:family="paragraph" style:parent-style-name="Text_20_body" style:list-style-name="L44"/>
    <style:style style:name="P129" style:family="paragraph" style:parent-style-name="Text_20_body">
      <style:text-properties fo:color="#000000" loext:opacity="100%" style:font-name="Liberation Serif" fo:background-color="#ffffd7"/>
    </style:style>
    <style:style style:name="P130" style:family="paragraph" style:parent-style-name="Text_20_body" style:list-style-name="L45"/>
    <style:style style:name="P131" style:family="paragraph" style:parent-style-name="Heading_20_2">
      <style:text-properties style:font-name="Liberation Serif" fo:background-color="#ffff00"/>
    </style:style>
    <style:style style:name="P132" style:family="paragraph" style:parent-style-name="Text_20_body" style:list-style-name="L46">
      <style:text-properties style:font-name="Liberation Serif"/>
    </style:style>
    <style:style style:name="P133" style:family="paragraph" style:parent-style-name="Text_20_body" style:list-style-name="L46"/>
    <style:style style:name="P134" style:family="paragraph" style:parent-style-name="Text_20_body" style:list-style-name="L47"/>
    <style:style style:name="P135" style:family="paragraph" style:parent-style-name="Text_20_body" style:list-style-name="L48"/>
    <style:style style:name="P136" style:family="paragraph" style:parent-style-name="Preformatted_20_Text">
      <style:paragraph-properties fo:margin-left="2.501cm" fo:line-height="150%" fo:text-indent="0cm" style:auto-text-indent="false"/>
    </style:style>
    <style:style style:name="P137" style:family="paragraph" style:parent-style-name="Text_20_body">
      <style:paragraph-properties fo:margin-left="1.251cm" fo:text-indent="0cm" style:auto-text-indent="false"/>
      <style:text-properties style:font-name="Liberation Serif" fo:background-color="#ffffd7"/>
    </style:style>
    <style:style style:name="P138" style:family="paragraph" style:parent-style-name="Preformatted_20_Text">
      <style:paragraph-properties fo:margin-left="1.251cm" fo:text-indent="0cm" style:auto-text-indent="false"/>
      <style:text-properties style:font-name="Liberation Serif" fo:background-color="#ffffd7"/>
    </style:style>
    <style:style style:name="P139" style:family="paragraph" style:parent-style-name="Text_20_body" style:list-style-name="L49">
      <style:text-properties style:font-name="Liberation Serif"/>
    </style:style>
    <style:style style:name="P140" style:family="paragraph" style:parent-style-name="Text_20_body" style:list-style-name="L50"/>
    <style:style style:name="P141" style:family="paragraph" style:parent-style-name="Text_20_body" style:list-style-name="L51"/>
    <style:style style:name="P142" style:family="paragraph" style:parent-style-name="Text_20_body">
      <style:text-properties style:font-name="Liberation Serif" fo:background-color="#ffffd7"/>
    </style:style>
    <style:style style:name="P143" style:family="paragraph" style:parent-style-name="Text_20_body" style:list-style-name="L52">
      <style:text-properties style:font-name="Liberation Serif" fo:background-color="#ffffd7"/>
    </style:style>
    <style:style style:name="P144" style:family="paragraph" style:parent-style-name="Text_20_body" style:list-style-name="L52"/>
    <style:style style:name="P145" style:family="paragraph" style:parent-style-name="Heading_20_2">
      <style:paragraph-properties fo:break-before="page"/>
      <style:text-properties style:font-name="Liberation Serif" fo:background-color="#ffff00"/>
    </style:style>
    <style:style style:name="P146" style:family="paragraph" style:parent-style-name="Heading_20_3">
      <style:paragraph-properties fo:margin-left="1.251cm" fo:text-indent="0cm" style:auto-text-indent="false"/>
      <style:text-properties style:font-name="Liberation Serif"/>
    </style:style>
    <style:style style:name="P147" style:family="paragraph" style:parent-style-name="Text_20_body" style:list-style-name="L53">
      <style:text-properties style:font-name="Liberation Serif"/>
    </style:style>
    <style:style style:name="P148" style:family="paragraph" style:parent-style-name="Text_20_body">
      <style:paragraph-properties fo:margin-left="0cm" fo:margin-right="0cm" fo:text-indent="0cm" style:auto-text-indent="false"/>
      <style:text-properties style:font-name="Liberation Serif" fo:background-color="#ffffd7"/>
    </style:style>
    <style:style style:name="P149" style:family="paragraph" style:parent-style-name="Preformatted_20_Text">
      <style:paragraph-properties fo:margin-top="0cm" fo:margin-bottom="0.247cm" style:contextual-spacing="false" fo:line-height="115%"/>
      <style:text-properties style:font-name="Liberation Serif"/>
    </style:style>
    <style:style style:name="P150" style:family="paragraph" style:parent-style-name="Text_20_body" style:list-style-name="L54">
      <style:text-properties style:font-name="Liberation Serif"/>
    </style:style>
    <style:style style:name="P151" style:family="paragraph" style:parent-style-name="Text_20_body" style:list-style-name="L55"/>
    <style:style style:name="P152" style:family="paragraph" style:parent-style-name="Preformatted_20_Text">
      <style:paragraph-properties fo:margin-top="0cm" fo:margin-bottom="0.247cm" style:contextual-spacing="false" fo:line-height="115%"/>
      <style:text-properties style:font-name="Liberation Serif" fo:background-color="#ffffd7"/>
    </style:style>
    <style:style style:name="P153" style:family="paragraph" style:parent-style-name="Text_20_body" style:list-style-name="L56"/>
    <style:style style:name="P154" style:family="paragraph" style:parent-style-name="Text_20_body" style:list-style-name="L57"/>
    <style:style style:name="P155" style:family="paragraph" style:parent-style-name="Text_20_body" style:list-style-name="L58"/>
    <style:style style:name="P156" style:family="paragraph" style:parent-style-name="Preformatted_20_Text">
      <style:paragraph-properties fo:margin-left="0cm" fo:margin-top="0cm" fo:margin-bottom="0.247cm" style:contextual-spacing="false" fo:line-height="115%" fo:text-indent="0cm" style:auto-text-indent="false"/>
      <style:text-properties style:font-name="Liberation Serif"/>
    </style:style>
    <style:style style:name="P157" style:family="paragraph" style:parent-style-name="Preformatted_20_Text">
      <style:paragraph-properties fo:margin-left="0cm" fo:margin-top="0cm" fo:margin-bottom="0.247cm" style:contextual-spacing="false" fo:line-height="115%" fo:text-indent="0cm" style:auto-text-indent="false"/>
      <style:text-properties style:font-name="Liberation Serif" fo:background-color="#ffffd7"/>
    </style:style>
    <style:style style:name="P158" style:family="paragraph" style:parent-style-name="Heading_20_2">
      <style:paragraph-properties fo:margin-top="0cm" fo:margin-bottom="0.247cm" style:contextual-spacing="false" fo:line-height="115%"/>
      <style:text-properties style:font-name="Liberation Serif" fo:background-color="#ffff00"/>
    </style:style>
    <style:style style:name="P159" style:family="paragraph" style:parent-style-name="Heading_20_3">
      <style:paragraph-properties fo:margin-left="1.251cm" fo:margin-top="0cm" fo:margin-bottom="0.247cm" style:contextual-spacing="false" fo:line-height="115%" fo:text-indent="0cm" style:auto-text-indent="false"/>
      <style:text-properties style:font-name="Liberation Serif"/>
    </style:style>
    <style:style style:name="P160" style:family="paragraph" style:parent-style-name="Text_20_body" style:list-style-name="L59">
      <style:paragraph-properties fo:margin-left="1.251cm" fo:text-indent="0cm" style:auto-text-indent="false"/>
    </style:style>
    <style:style style:name="P161" style:family="paragraph" style:parent-style-name="Text_20_body" style:list-style-name="L60">
      <style:paragraph-properties fo:margin-left="1.251cm" fo:text-indent="0cm" style:auto-text-indent="false"/>
    </style:style>
    <style:style style:name="P162" style:family="paragraph" style:parent-style-name="Text_20_body" style:list-style-name="L61">
      <style:paragraph-properties fo:margin-left="1.251cm" fo:text-indent="0cm" style:auto-text-indent="false"/>
    </style:style>
    <style:style style:name="P163" style:family="paragraph" style:parent-style-name="Text_20_body" style:list-style-name="L62">
      <style:paragraph-properties fo:margin-left="1.251cm" fo:text-indent="0cm" style:auto-text-indent="false"/>
    </style:style>
    <style:style style:name="P164" style:family="paragraph" style:parent-style-name="Text_20_body">
      <style:paragraph-properties fo:margin-left="0cm" fo:margin-right="0cm" fo:margin-top="0cm" fo:margin-bottom="0.247cm" style:contextual-spacing="false" fo:line-height="114%" fo:text-indent="0cm" style:auto-text-indent="false"/>
      <style:text-properties style:font-name="Liberation Serif"/>
    </style:style>
    <style:style style:name="P165" style:family="paragraph" style:parent-style-name="Text_20_body">
      <style:paragraph-properties fo:margin-left="0cm" fo:margin-right="0cm" fo:margin-top="0cm" fo:margin-bottom="0.247cm" style:contextual-spacing="false" fo:line-height="114%" fo:text-indent="0cm" style:auto-text-indent="false"/>
    </style:style>
    <style:style style:name="P166" style:family="paragraph" style:parent-style-name="Heading_20_3">
      <style:paragraph-properties fo:margin-left="1.251cm" fo:text-indent="0cm" style:auto-text-indent="false"/>
    </style:style>
    <style:style style:name="P167" style:family="paragraph" style:parent-style-name="Text_20_body">
      <style:paragraph-properties fo:margin-left="1.251cm" fo:margin-right="0cm" fo:margin-top="0cm" fo:margin-bottom="0.247cm" style:contextual-spacing="false" fo:line-height="114%" fo:text-indent="0cm" style:auto-text-indent="false"/>
      <style:text-properties style:font-name="Liberation Serif" fo:background-color="#ffffd7"/>
    </style:style>
    <style:style style:name="P168" style:family="paragraph" style:parent-style-name="Preformatted_20_Text">
      <style:paragraph-properties fo:margin-left="1.251cm" fo:margin-right="0cm" fo:margin-top="0cm" fo:margin-bottom="0cm" style:contextual-spacing="false" fo:line-height="114%" fo:text-indent="0cm" style:auto-text-indent="false"/>
      <style:text-properties style:font-name="Liberation Serif"/>
    </style:style>
    <style:style style:name="P169" style:family="paragraph" style:parent-style-name="Preformatted_20_Text">
      <style:paragraph-properties fo:margin-left="1.251cm" fo:margin-top="0cm" fo:margin-bottom="0cm" style:contextual-spacing="false" fo:line-height="114%" fo:text-indent="0cm" style:auto-text-indent="false"/>
      <style:text-properties style:font-name="Liberation Serif" fo:background-color="#ffffd7"/>
    </style:style>
    <style:style style:name="P170" style:family="paragraph" style:parent-style-name="Preformatted_20_Text">
      <style:paragraph-properties fo:margin-left="1.251cm" fo:margin-top="0cm" fo:margin-bottom="0cm" style:contextual-spacing="false" fo:line-height="114%" fo:text-indent="0cm" style:auto-text-indent="false"/>
      <style:text-properties style:font-name="Liberation Serif"/>
    </style:style>
    <style:style style:name="P171" style:family="paragraph" style:parent-style-name="Text_20_body" style:list-style-name="L63">
      <style:paragraph-properties fo:margin-left="0cm" fo:margin-right="0cm" fo:margin-top="0cm" fo:margin-bottom="0.247cm" style:contextual-spacing="false" fo:line-height="114%" fo:text-indent="0cm" style:auto-text-indent="false" fo:padding="0cm" fo:border="none"/>
    </style:style>
    <style:style style:name="P172" style:family="paragraph" style:parent-style-name="Text_20_body">
      <style:paragraph-properties fo:margin-left="2.501cm" fo:margin-right="0cm" fo:margin-top="0cm" fo:margin-bottom="0.247cm" style:contextual-spacing="false" fo:line-height="114%" fo:text-indent="0cm" style:auto-text-indent="false"/>
      <style:text-properties style:font-name="Liberation Serif" fo:background-color="#ffffd7"/>
    </style:style>
    <style:style style:name="P173" style:family="paragraph" style:parent-style-name="Preformatted_20_Text">
      <style:paragraph-properties fo:margin-left="2.501cm" fo:margin-right="0cm" fo:margin-top="0cm" fo:margin-bottom="0cm" style:contextual-spacing="false" fo:line-height="114%" fo:text-indent="0cm" style:auto-text-indent="false"/>
      <style:text-properties style:font-name="Liberation Serif"/>
    </style:style>
    <style:style style:name="P174" style:family="paragraph" style:parent-style-name="Preformatted_20_Text">
      <style:paragraph-properties fo:margin-left="2.501cm" fo:margin-top="0cm" fo:margin-bottom="0cm" style:contextual-spacing="false" fo:line-height="114%" fo:text-indent="0cm" style:auto-text-indent="false"/>
      <style:text-properties style:font-name="Liberation Serif" fo:background-color="#ffffd7"/>
    </style:style>
    <style:style style:name="P175" style:family="paragraph" style:parent-style-name="Preformatted_20_Text">
      <style:paragraph-properties fo:margin-left="2.501cm" fo:margin-top="0cm" fo:margin-bottom="0cm" style:contextual-spacing="false" fo:line-height="114%" fo:text-indent="0cm" style:auto-text-indent="false"/>
      <style:text-properties style:font-name="Liberation Serif"/>
    </style:style>
    <style:style style:name="P176" style:family="paragraph" style:parent-style-name="Text_20_body">
      <style:paragraph-properties fo:margin-left="1.251cm" fo:margin-right="0cm" fo:margin-top="0cm" fo:margin-bottom="0.247cm" style:contextual-spacing="false" fo:line-height="114%" fo:text-indent="0cm" style:auto-text-indent="false"/>
      <style:text-properties style:font-name="Liberation Serif"/>
    </style:style>
    <style:style style:name="P177" style:family="paragraph" style:parent-style-name="Preformatted_20_Text">
      <style:paragraph-properties fo:margin-left="1.251cm" fo:margin-right="0cm" fo:margin-top="0cm" fo:margin-bottom="0cm" style:contextual-spacing="false" fo:line-height="150%" fo:text-indent="0cm" style:auto-text-indent="false"/>
      <style:text-properties style:font-name="Liberation Serif"/>
    </style:style>
    <style:style style:name="P178" style:family="paragraph" style:parent-style-name="Quotations">
      <style:paragraph-properties fo:margin-left="0cm" fo:margin-right="1cm" fo:margin-top="0cm" fo:margin-bottom="0.499cm" style:contextual-spacing="false" fo:line-height="100%" fo:text-indent="0cm" style:auto-text-indent="false"/>
    </style:style>
    <style:style style:name="P179" style:family="paragraph" style:parent-style-name="Text_20_body" style:list-style-name="L64">
      <style:paragraph-properties fo:margin-left="0cm" fo:margin-right="0cm" fo:margin-top="0cm" fo:margin-bottom="0.247cm" style:contextual-spacing="false" fo:line-height="114%" fo:text-indent="0cm" style:auto-text-indent="false" fo:padding="0cm" fo:border="none"/>
    </style:style>
    <style:style style:name="P180" style:family="paragraph" style:parent-style-name="Preformatted_20_Text">
      <style:paragraph-properties fo:margin-left="1.251cm" fo:margin-top="0cm" fo:margin-bottom="0cm" style:contextual-spacing="false" fo:line-height="150%" fo:text-indent="0cm" style:auto-text-indent="false"/>
      <style:text-properties style:font-name="Liberation Serif"/>
    </style:style>
    <style:style style:name="P181" style:family="paragraph" style:parent-style-name="Quotations">
      <style:paragraph-properties fo:margin-left="0cm" fo:margin-top="0cm" fo:margin-bottom="0.247cm" style:contextual-spacing="false" fo:line-height="115%" fo:text-indent="0cm" style:auto-text-indent="false"/>
      <style:text-properties style:font-name="Liberation Serif" fo:background-color="#ffffa6"/>
    </style:style>
    <style:style style:name="P182" style:family="paragraph" style:parent-style-name="Text_20_body">
      <style:paragraph-properties fo:margin-left="2.501cm" fo:text-indent="0cm" style:auto-text-indent="false"/>
      <style:text-properties style:font-name="Liberation Serif" fo:font-weight="bold" style:font-weight-asian="bold" style:font-weight-complex="bold"/>
    </style:style>
    <style:style style:name="P183" style:family="paragraph" style:parent-style-name="Text_20_body">
      <style:paragraph-properties fo:margin-left="3.752cm" fo:margin-right="0cm" fo:text-indent="0cm" style:auto-text-indent="false"/>
      <style:text-properties style:font-name="Liberation Serif" fo:background-color="#ffffd7"/>
    </style:style>
    <style:style style:name="P184" style:family="paragraph" style:parent-style-name="Preformatted_20_Text">
      <style:paragraph-properties fo:margin-left="3.752cm" fo:margin-top="0cm" fo:margin-bottom="0.247cm" style:contextual-spacing="false" fo:line-height="115%" fo:text-indent="0cm" style:auto-text-indent="false"/>
      <style:text-properties style:font-name="Liberation Serif"/>
    </style:style>
    <style:style style:name="P185" style:family="paragraph" style:parent-style-name="Text_20_body" style:list-style-name="L65">
      <style:paragraph-properties fo:margin-left="2.501cm" fo:text-indent="0cm" style:auto-text-indent="false"/>
    </style:style>
    <style:style style:name="P186" style:family="paragraph" style:parent-style-name="Text_20_body">
      <style:paragraph-properties fo:margin-left="2.501cm" fo:text-indent="0cm" style:auto-text-indent="false"/>
    </style:style>
    <style:style style:name="P187" style:family="paragraph" style:parent-style-name="Text_20_body">
      <style:paragraph-properties fo:margin-left="2.501cm" fo:text-indent="0cm" style:auto-text-indent="false"/>
      <style:text-properties style:font-name="Liberation Serif"/>
    </style:style>
    <style:style style:name="P188" style:family="paragraph" style:parent-style-name="Preformatted_20_Text">
      <style:paragraph-properties fo:margin-left="3.752cm" fo:margin-top="0cm" fo:margin-bottom="0.247cm" style:contextual-spacing="false" fo:line-height="115%" fo:text-indent="0cm" style:auto-text-indent="false"/>
      <style:text-properties style:font-name="Liberation Serif" fo:background-color="#ffffd7"/>
    </style:style>
    <style:style style:name="P189" style:family="paragraph" style:parent-style-name="Text_20_body">
      <style:paragraph-properties fo:margin-left="3.752cm" fo:margin-right="0cm" fo:text-indent="0cm" style:auto-text-indent="false"/>
      <style:text-properties style:font-name="Liberation Serif"/>
    </style:style>
    <style:style style:name="P190" style:family="paragraph" style:parent-style-name="Text_20_body">
      <style:paragraph-properties fo:margin-left="3.752cm" fo:margin-right="0cm" fo:text-indent="0cm" style:auto-text-indent="false"/>
      <style:text-properties style:font-name="Liberation Serif" fo:font-weight="normal" fo:background-color="#ffffd7" style:font-weight-asian="normal" style:font-weight-complex="normal"/>
    </style:style>
    <style:style style:name="P191" style:family="paragraph" style:parent-style-name="Preformatted_20_Text">
      <style:paragraph-properties fo:margin-left="3.752cm" fo:margin-top="0cm" fo:margin-bottom="0.247cm" style:contextual-spacing="false" fo:line-height="115%" fo:text-indent="0cm" style:auto-text-indent="false"/>
      <style:text-properties style:font-name="Liberation Serif" fo:font-weight="normal" fo:background-color="#ffffd7" style:font-weight-asian="normal" style:font-weight-complex="normal"/>
    </style:style>
    <style:style style:name="P192" style:family="paragraph" style:parent-style-name="Preformatted_20_Text">
      <style:paragraph-properties fo:margin-left="3.752cm" fo:margin-top="0cm" fo:margin-bottom="0.247cm" style:contextual-spacing="false" fo:line-height="115%" fo:text-indent="0cm" style:auto-text-indent="false"/>
    </style:style>
    <style:style style:name="P193" style:family="paragraph" style:parent-style-name="Text_20_body">
      <style:text-properties style:font-name="Liberation Serif" officeooo:paragraph-rsid="005a8479"/>
    </style:style>
    <style:style style:name="P194" style:family="paragraph" style:parent-style-name="Text_20_body">
      <style:paragraph-properties fo:margin-left="1.251cm" fo:margin-right="0cm" fo:text-indent="0cm" style:auto-text-indent="false"/>
      <style:text-properties style:font-name="Liberation Serif" fo:background-color="#ffffd7"/>
    </style:style>
    <style:style style:name="P195" style:family="paragraph" style:parent-style-name="Preformatted_20_Text">
      <style:paragraph-properties fo:margin-left="1.251cm" fo:margin-top="0cm" fo:margin-bottom="0.247cm" style:contextual-spacing="false" fo:line-height="115%" fo:text-indent="0cm" style:auto-text-indent="false"/>
      <style:text-properties style:font-name="Liberation Serif"/>
    </style:style>
    <style:style style:name="P196" style:family="paragraph" style:parent-style-name="Quotations">
      <style:paragraph-properties fo:margin-top="0cm" fo:margin-bottom="0.247cm" style:contextual-spacing="false" fo:line-height="115%"/>
    </style:style>
    <style:style style:name="P197" style:family="paragraph" style:parent-style-name="Text_20_body" style:list-style-name="L66">
      <style:paragraph-properties fo:margin-left="2.501cm" fo:text-indent="0cm" style:auto-text-indent="false"/>
    </style:style>
    <style:style style:name="P198" style:family="paragraph" style:parent-style-name="Text_20_body">
      <style:paragraph-properties fo:margin-left="5.002cm" fo:margin-right="0cm" fo:text-indent="0cm" style:auto-text-indent="false"/>
      <style:text-properties style:font-name="Liberation Serif" fo:background-color="#ffffd7"/>
    </style:style>
    <style:style style:name="P199" style:family="paragraph" style:parent-style-name="Preformatted_20_Text">
      <style:paragraph-properties fo:margin-left="5.002cm" fo:margin-top="0cm" fo:margin-bottom="0.247cm" style:contextual-spacing="false" fo:line-height="115%" fo:text-indent="0cm" style:auto-text-indent="false"/>
      <style:text-properties style:font-name="Liberation Serif"/>
    </style:style>
    <style:style style:name="P200" style:family="paragraph" style:parent-style-name="Preformatted_20_Text">
      <style:paragraph-properties fo:margin-left="5.002cm" fo:margin-top="0cm" fo:margin-bottom="0.247cm" style:contextual-spacing="false" fo:line-height="115%" fo:text-indent="0cm" style:auto-text-indent="false"/>
      <style:text-properties style:font-name="Liberation Serif" fo:background-color="#ffffd7"/>
    </style:style>
    <style:style style:name="P201" style:family="paragraph" style:parent-style-name="Text_20_body" style:list-style-name="L67">
      <style:paragraph-properties fo:margin-left="2.501cm" fo:text-indent="0cm" style:auto-text-indent="false"/>
    </style:style>
    <style:style style:name="P202" style:family="paragraph" style:parent-style-name="Text_20_body" style:list-style-name="L68">
      <style:paragraph-properties fo:margin-left="2.501cm" fo:text-indent="0cm" style:auto-text-indent="false"/>
    </style:style>
    <style:style style:name="P203" style:family="paragraph" style:parent-style-name="Text_20_body">
      <style:paragraph-properties fo:margin-left="3.752cm" fo:margin-right="0cm" fo:text-indent="0cm" style:auto-text-indent="false"/>
      <style:text-properties style:font-name="Liberation Serif" fo:background-color="#ffffd7"/>
    </style:style>
    <style:style style:name="P204" style:family="paragraph" style:parent-style-name="Preformatted_20_Text">
      <style:paragraph-properties fo:margin-left="3.752cm" fo:margin-top="0cm" fo:margin-bottom="0.247cm" style:contextual-spacing="false" fo:line-height="115%" fo:text-indent="0cm" style:auto-text-indent="false"/>
      <style:text-properties style:font-name="Liberation Serif" fo:background-color="#ffffd7"/>
    </style:style>
    <style:style style:name="P205" style:family="paragraph" style:parent-style-name="Text_20_body">
      <style:paragraph-properties fo:margin-left="0cm" fo:text-indent="0cm" style:auto-text-indent="false"/>
      <style:text-properties style:font-name="Liberation Serif" fo:font-weight="bold" style:font-weight-asian="bold" style:font-weight-complex="bold"/>
    </style:style>
    <style:style style:name="P206" style:family="paragraph" style:parent-style-name="Text_20_body">
      <style:text-properties style:font-name="Liberation Serif" officeooo:paragraph-rsid="00751a20"/>
    </style:style>
    <style:style style:name="P207" style:family="paragraph" style:parent-style-name="Text_20_body" style:list-style-name="L69">
      <style:text-properties style:font-name="Liberation Serif"/>
    </style:style>
    <style:style style:name="P208" style:family="paragraph" style:parent-style-name="Text_20_body">
      <style:text-properties fo:font-weight="bold" style:font-weight-asian="bold" style:font-weight-complex="bold"/>
    </style:style>
    <style:style style:name="P209" style:family="paragraph" style:parent-style-name="Text_20_body" style:list-style-name="L70">
      <style:text-properties style:font-name="Liberation Serif"/>
    </style:style>
    <style:style style:name="P210" style:family="paragraph" style:parent-style-name="Text_20_body" style:list-style-name="L71">
      <style:text-properties style:font-name="Liberation Serif"/>
    </style:style>
    <style:style style:name="P211" style:family="paragraph" style:parent-style-name="Text_20_body">
      <style:text-properties style:font-name="Liberation Serif" officeooo:rsid="007d7488" officeooo:paragraph-rsid="007d7488"/>
    </style:style>
    <style:style style:name="P212" style:family="paragraph" style:parent-style-name="Text_20_body">
      <style:text-properties style:font-name="Liberation Serif" fo:font-weight="bold" officeooo:rsid="007d7488" officeooo:paragraph-rsid="007d7488" style:font-weight-asian="bold" style:font-weight-complex="bold"/>
    </style:style>
    <style:style style:name="P213" style:family="paragraph" style:parent-style-name="Text_20_body" style:list-style-name="L72">
      <style:text-properties style:font-name="Liberation Serif" fo:font-weight="normal" officeooo:rsid="007d7488" officeooo:paragraph-rsid="007d7488" style:font-weight-asian="normal" style:font-weight-complex="normal"/>
    </style:style>
    <style:style style:name="T1" style:family="text">
      <style:text-properties style:font-name="Liberation Serif"/>
    </style:style>
    <style:style style:name="T2" style:family="text">
      <style:text-properties fo:font-weight="bold" style:font-weight-asian="bold" style:font-weight-complex="bold"/>
    </style:style>
    <style:style style:name="T3" style:family="text">
      <style:text-properties style:font-name="Liberation Serif" fo:font-weight="bold" style:font-weight-asian="bold" style:font-weight-complex="bold"/>
    </style:style>
    <style:style style:name="T4" style:family="text">
      <style:text-properties fo:color="#000000" loext:opacity="100%" style:font-name="Liberation Serif" fo:background-color="#ffff00" loext:char-shading-value="0"/>
    </style:style>
    <style:style style:name="T5" style:family="text">
      <style:text-properties style:font-name="Liberation Serif" officeooo:rsid="00274fca"/>
    </style:style>
    <style:style style:name="T6" style:family="text">
      <style:text-properties style:font-name="Liberation Serif" officeooo:rsid="001a8b22"/>
    </style:style>
    <style:style style:name="T7" style:family="text">
      <style:text-properties style:font-name="Liberation Serif" officeooo:rsid="001be7e4"/>
    </style:style>
    <style:style style:name="T8" style:family="text">
      <style:text-properties fo:color="#000000" loext:opacity="100%" style:font-name="Liberation Serif" fo:background-color="#cccccc" loext:char-shading-value="0"/>
    </style:style>
    <style:style style:name="T9" style:family="text">
      <style:text-properties fo:color="#000000" loext:opacity="100%" style:font-name="Liberation Serif" fo:background-color="#ffffd7" loext:char-shading-value="0"/>
    </style:style>
    <style:style style:name="T10" style:family="text">
      <style:text-properties fo:color="#000000" loext:opacity="100%" style:font-name="Liberation Serif" fo:background-color="#ffffd7" loext:char-shading-value="0"/>
    </style:style>
    <style:style style:name="T11" style:family="text">
      <style:text-properties officeooo:rsid="002a24f9"/>
    </style:style>
    <style:style style:name="T12" style:family="text">
      <style:text-properties style:font-name="Liberation Serif" fo:background-color="#2a6099" loext:char-shading-value="0"/>
    </style:style>
    <style:style style:name="T13" style:family="text">
      <style:text-properties style:font-name="Liberation Serif" officeooo:rsid="002a24f9"/>
    </style:style>
    <style:style style:name="T14" style:family="text">
      <style:text-properties fo:color="#000000" loext:opacity="100%" style:font-name="Liberation Serif" fo:background-color="#999999" loext:char-shading-value="0"/>
    </style:style>
    <style:style style:name="T15" style:family="text">
      <style:text-properties style:font-name="Liberation Serif" fo:background-color="#ffff00" loext:char-shading-value="0"/>
    </style:style>
    <style:style style:name="T16" style:family="text">
      <style:text-properties officeooo:rsid="0020deef"/>
    </style:style>
    <style:style style:name="T17" style:family="text">
      <style:text-properties fo:color="#000000" loext:opacity="100%" style:font-name="Liberation Serif" fo:font-weight="bold" style:font-weight-asian="bold" style:font-weight-complex="bold"/>
    </style:style>
    <style:style style:name="T18" style:family="text">
      <style:text-properties officeooo:rsid="0023525c"/>
    </style:style>
    <style:style style:name="T19" style:family="text">
      <style:text-properties style:font-name="Liberation Serif" officeooo:rsid="00250605"/>
    </style:style>
    <style:style style:name="T20" style:family="text">
      <style:text-properties style:font-name="Liberation Serif" fo:background-color="#ffffd7" loext:char-shading-value="0"/>
    </style:style>
    <style:style style:name="T21" style:family="text">
      <style:text-properties style:font-name="Liberation Serif" fo:background-color="#ffffd7" loext:char-shading-value="0"/>
    </style:style>
    <style:style style:name="T22" style:family="text">
      <style:text-properties fo:font-weight="bold"/>
    </style:style>
    <style:style style:name="T23" style:family="text">
      <style:text-properties fo:font-style="italic"/>
    </style:style>
    <style:style style:name="T24" style:family="text">
      <style:text-properties style:font-name="Liberation Serif" fo:font-weight="bold"/>
    </style:style>
    <style:style style:name="T25" style:family="text">
      <style:text-properties style:font-name="Liberation Serif" fo:font-style="italic"/>
    </style:style>
    <style:style style:name="T26" style:family="text">
      <style:text-properties style:font-name="Liberation Serif" officeooo:rsid="004ddb60"/>
    </style:style>
    <style:style style:name="T27" style:family="text">
      <style:text-properties style:font-name="Liberation Serif" fo:font-weight="bold" fo:background-color="#ffffa6" loext:char-shading-value="0"/>
    </style:style>
    <style:style style:name="T28" style:family="text">
      <style:text-properties style:font-name="Liberation Serif" fo:background-color="#ffffa6" loext:char-shading-value="0"/>
    </style:style>
    <style:style style:name="T29" style:family="text">
      <style:text-properties style:font-name="Liberation Serif" fo:font-style="italic" fo:font-weight="bold" style:font-weight-asian="bold" style:font-weight-complex="bold"/>
    </style:style>
    <style:style style:name="T30" style:family="text">
      <style:text-properties fo:background-color="#ffffd7" loext:char-shading-value="0"/>
    </style:style>
    <style:style style:name="T31" style:family="text">
      <style:text-properties style:font-name="Liberation Serif" fo:font-weight="normal" fo:background-color="#ffffd7" loext:char-shading-value="0" style:font-weight-asian="normal" style:font-weight-complex="normal"/>
    </style:style>
    <style:style style:name="T32" style:family="text">
      <style:text-properties style:font-name="Liberation Serif" fo:font-weight="bold" fo:background-color="#ffffd7" loext:char-shading-value="0"/>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number text:level="1" text:style-name="Numbering_20_Symbols" loext:num-list-format="%1%)"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loext:num-list-format="%1%)"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consecutive-numbering="true">
      <text:list-level-style-number text:level="1" text:style-name="Numbering_20_Symbols" loext:num-list-format="%1%)"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loext:num-list-format="%1%)"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loext:num-list-format="%1%)"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loext:num-list-format="%1%." style:num-suffix="." style:num-format="1" text:start-value="6">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number text:level="1" loext:num-list-format="%1%)"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
      <text:list-level-style-number text:level="1" text:style-name="Numbering_20_Symbols" loext:num-list-format="%1%)"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9">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6">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6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9">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7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JavaScript</text:p>
      <text:p text:style-name="P2"><text:s/>Fundamentos da Linguagem (A Sintaxe)</text:p>
      <text:p text:style-name="P3"><draw:frame draw:style-name="fr1" draw:name="Figura1" text:anchor-type="char" svg:x="0.415cm" svg:y="1.577cm" svg:width="16.817cm" svg:height="19.457cm" draw:z-index="0"><draw:image xlink:href="Pictures/100000010000025800000258300579F4.png" xlink:type="simple" xlink:show="embed" xlink:actuate="onLoad" draw:mime-type="image/png"/></draw:frame></text:p>
      <text:p text:style-name="P4"><text:soft-page-break/>Índice</text:p>
      <text:table-of-content text:style-name="Sect1" text:protected="true" text:name="Sumário1">
        <text:table-of-content-source text:outline-level="10">
          <text:index-title-template text:style-name="Contents_20_Heading">Sumá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ário1_Head" text:protected="true">
            <text:p text:style-name="P5">Sumário</text:p>
          </text:index-title>
          <text:p text:style-name="P6"><text:a xlink:type="simple" xlink:href="#__RefHeading___Toc4713_1212987772" office:name="A diferencia entre javascript e EcmaScript" text:style-name="Index_20_Link" text:visited-style-name="Index_20_Link"><text:span text:style-name="T1">A diferencia entre javascript e EcmaScript<text:tab/>4</text:span></text:a></text:p>
          <text:p text:style-name="P7"><text:a xlink:type="simple" xlink:href="#__RefHeading___Toc4715_1212987772" office:name="Uma Breve História (Para fazer sentido)" text:style-name="Index_20_Link" text:visited-style-name="Index_20_Link"><text:span text:style-name="T1">1) Uma Breve História (Para fazer sentido)<text:tab/>4</text:span></text:a></text:p>
          <text:p text:style-name="P7"><text:a xlink:type="simple" xlink:href="#__RefHeading___Toc4717_1212987772" office:name="Por que você ouve falar tanto de &quot;ES6&quot;, &quot;ES7&quot;, etc.?" text:style-name="Index_20_Link" text:visited-style-name="Index_20_Link"><text:span text:style-name="T1">2) Por que você ouve falar tanto de "ES6", "ES7", etc.?<text:tab/>4</text:span></text:a></text:p>
          <text:p text:style-name="P6"><text:a xlink:type="simple" xlink:href="#__RefHeading___Toc4719_1212987772" office:name="Variáveis" text:style-name="Index_20_Link" text:visited-style-name="Index_20_Link"><text:span text:style-name="T1">Variáveis<text:tab/>4</text:span></text:a></text:p>
          <text:p text:style-name="P7"><text:a xlink:type="simple" xlink:href="#__RefHeading___Toc4721_1212987772" office:name="Variáveis: As Gavetas da Memória" text:style-name="Index_20_Link" text:visited-style-name="Index_20_Link"><text:span text:style-name="T1">1) Variáveis: As Gavetas da Memória<text:tab/>4</text:span></text:a></text:p>
          <text:p text:style-name="P7"><text:a xlink:type="simple" xlink:href="#__RefHeading___Toc4723_1212987772" office:name="Regras de identificadores das variáveis" text:style-name="Index_20_Link" text:visited-style-name="Index_20_Link"><text:span text:style-name="T1">2) Regras de identificadores das variáveis<text:tab/>5</text:span></text:a></text:p>
          <text:p text:style-name="P6"><text:a xlink:type="simple" xlink:href="#__RefHeading___Toc4725_1212987772" office:name="Tipos de Dados: O que vai dentro da Gaveta?" text:style-name="Index_20_Link" text:visited-style-name="Index_20_Link"><text:span text:style-name="T1">Tipos de Dados: O que vai dentro da Gaveta?<text:tab/>7</text:span></text:a></text:p>
          <text:p text:style-name="P7"><text:a xlink:type="simple" xlink:href="#__RefHeading___Toc4727_1212987772" office:name="number (Número)" text:style-name="Index_20_Link" text:visited-style-name="Index_20_Link"><text:span text:style-name="T1">1) number (Número)<text:tab/>7</text:span></text:a></text:p>
          <text:p text:style-name="P7"><text:a xlink:type="simple" xlink:href="#__RefHeading___Toc4729_1212987772" office:name="Infinity (Infinito)" text:style-name="Index_20_Link" text:visited-style-name="Index_20_Link"><text:span text:style-name="T1">2) Infinity (Infinito)<text:tab/>7</text:span></text:a></text:p>
          <text:p text:style-name="P7"><text:a xlink:type="simple" xlink:href="#__RefHeading___Toc4731_1212987772" office:name="NaN (Not a Number / Não é um Número)" text:style-name="Index_20_Link" text:visited-style-name="Index_20_Link"><text:span text:style-name="T1">3) NaN (Not a Number / Não é um Número)<text:tab/>7</text:span></text:a></text:p>
          <text:p text:style-name="P7"><text:a xlink:type="simple" xlink:href="#__RefHeading___Toc4733_1212987772" office:name="4. string (Texto)" text:style-name="Index_20_Link" text:visited-style-name="Index_20_Link"><text:span text:style-name="T1">4. string (Texto)<text:tab/>7</text:span></text:a></text:p>
          <text:p text:style-name="P7"><text:a xlink:type="simple" xlink:href="#__RefHeading___Toc4735_1212987772" office:name="5. boolean (Booleano)" text:style-name="Index_20_Link" text:visited-style-name="Index_20_Link"><text:span text:style-name="T1">5. boolean (Booleano)<text:tab/>8</text:span></text:a></text:p>
          <text:p text:style-name="P7"><text:a xlink:type="simple" xlink:href="#__RefHeading___Toc4737_1212987772" office:name="6. null (Nulo)" text:style-name="Index_20_Link" text:visited-style-name="Index_20_Link"><text:span text:style-name="T1">6. null (Nulo)<text:tab/>8</text:span></text:a></text:p>
          <text:p text:style-name="P7"><text:a xlink:type="simple" xlink:href="#__RefHeading___Toc4739_1212987772" office:name="7. undefined (Indefinido)" text:style-name="Index_20_Link" text:visited-style-name="Index_20_Link"><text:span text:style-name="T1">7. undefined (Indefinido)<text:tab/>8</text:span></text:a></text:p>
          <text:p text:style-name="P7"><text:a xlink:type="simple" xlink:href="#__RefHeading___Toc4741_1212987772" office:name="8. object (Objeto)" text:style-name="Index_20_Link" text:visited-style-name="Index_20_Link"><text:span text:style-name="T1">8. object (Objeto)<text:tab/>8</text:span></text:a></text:p>
          <text:p text:style-name="P7"><text:a xlink:type="simple" xlink:href="#__RefHeading___Toc4743_1212987772" office:name="9. Array (Lista)" text:style-name="Index_20_Link" text:visited-style-name="Index_20_Link"><text:span text:style-name="T1">9. Array (Lista)<text:tab/>9</text:span></text:a></text:p>
          <text:p text:style-name="P7"><text:a xlink:type="simple" xlink:href="#__RefHeading___Toc4745_1212987772" office:name="10. function (Função)" text:style-name="Index_20_Link" text:visited-style-name="Index_20_Link"><text:span text:style-name="T1">10. function (Função)<text:tab/>9</text:span></text:a></text:p>
          <text:p text:style-name="P6"><text:a xlink:type="simple" xlink:href="#__RefHeading___Toc4747_1212987772" office:name="Conversão de Dados (Type Casting / Coercion)" text:style-name="Index_20_Link" text:visited-style-name="Index_20_Link"><text:span text:style-name="T1">Conversão de Dados (Type Casting / Coercion)<text:tab/>9</text:span></text:a></text:p>
          <text:p text:style-name="P7"><text:a xlink:type="simple" xlink:href="#__RefHeading___Toc4749_1212987772" office:name="Conversão Explícita (Você força a mudança)" text:style-name="Index_20_Link" text:visited-style-name="Index_20_Link"><text:span text:style-name="T1">Conversão Explícita (Você força a mudança)<text:tab/>9</text:span></text:a></text:p>
          <text:p text:style-name="P7"><text:a xlink:type="simple" xlink:href="#__RefHeading___Toc4751_1212987772" office:name="Conversão Implícita (O JavaScript tenta adivinhar)" text:style-name="Index_20_Link" text:visited-style-name="Index_20_Link"><text:span text:style-name="T1">Conversão Implícita (O JavaScript tenta adivinhar)<text:tab/>9</text:span></text:a></text:p>
          <text:p text:style-name="P6"><text:a xlink:type="simple" xlink:href="#__RefHeading___Toc4753_1212987772" office:name="Manipulação de Dados" text:style-name="Index_20_Link" text:visited-style-name="Index_20_Link"><text:span text:style-name="T1">Manipulação de Dados<text:tab/>10</text:span></text:a></text:p>
          <text:p text:style-name="P7"><text:a xlink:type="simple" xlink:href="#__RefHeading___Toc4755_1212987772" office:name="1. Manipulando Strings (Textos)" text:style-name="Index_20_Link" text:visited-style-name="Index_20_Link"><text:span text:style-name="T1">1. Manipulando Strings (Textos)<text:tab/>10</text:span></text:a></text:p>
          <text:p text:style-name="P7"><text:a xlink:type="simple" xlink:href="#__RefHeading___Toc4757_1212987772" office:name="2. Manipulando Números (Objeto Math)" text:style-name="Index_20_Link" text:visited-style-name="Index_20_Link"><text:span text:style-name="T1">2. Manipulando Números (Objeto Math)<text:tab/>10</text:span></text:a></text:p>
          <text:p text:style-name="P6"><text:a xlink:type="simple" xlink:href="#__RefHeading___Toc4759_1212987772" office:name="Formatação de Dados" text:style-name="Index_20_Link" text:visited-style-name="Index_20_Link"><text:span text:style-name="T1">Formatação de Dados<text:tab/>10</text:span></text:a></text:p>
          <text:p text:style-name="P7"><text:a xlink:type="simple" xlink:href="#__RefHeading___Toc4761_1212987772" office:name="1. Formatação de String" text:style-name="Index_20_Link" text:visited-style-name="Index_20_Link"><text:span text:style-name="T1">1. Formatação de String<text:tab/>10</text:span></text:a></text:p>
          <text:p text:style-name="P7"><text:a xlink:type="simple" xlink:href="#__RefHeading___Toc4763_1212987772" office:name="2. Formatação de Números" text:style-name="Index_20_Link" text:visited-style-name="Index_20_Link"><text:span text:style-name="T1">2. Formatação de Números<text:tab/>11</text:span></text:a></text:p>
          <text:p text:style-name="P6"><text:a xlink:type="simple" xlink:href="#__RefHeading___Toc4765_1212987772" office:name="Operadores" text:style-name="Index_20_Link" text:visited-style-name="Index_20_Link"><text:span text:style-name="T1">Operadores<text:tab/>12</text:span></text:a></text:p>
          <text:p text:style-name="P7"><text:a xlink:type="simple" xlink:href="#__RefHeading___Toc4767_1212987772" office:name="1. Operadores Aritméticos" text:style-name="Index_20_Link" text:visited-style-name="Index_20_Link"><text:span text:style-name="T1">1. Operadores Aritméticos<text:tab/>12</text:span></text:a></text:p>
          <text:p text:style-name="P7"><text:a xlink:type="simple" xlink:href="#__RefHeading___Toc4769_1212987772" office:name="2. Operadores Relacionais (Comparação)" text:style-name="Index_20_Link" text:visited-style-name="Index_20_Link"><text:span text:style-name="T1">2. Operadores Relacionais (Comparação)<text:tab/>12</text:span></text:a></text:p>
          <text:p text:style-name="P7"><text:a xlink:type="simple" xlink:href="#__RefHeading___Toc4771_1212987772" office:name="3. Operadores Lógicos" text:style-name="Index_20_Link" text:visited-style-name="Index_20_Link"><text:span text:style-name="T1">3. Operadores Lógicos<text:tab/>13</text:span></text:a></text:p>
          <text:p text:style-name="P7"><text:a xlink:type="simple" xlink:href="#__RefHeading___Toc4773_1212987772" office:name="4. Operador Ternário" text:style-name="Index_20_Link" text:visited-style-name="Index_20_Link"><text:span text:style-name="T1">4. Operador Ternário<text:tab/>13</text:span></text:a></text:p>
          <text:p text:style-name="P7"><text:a xlink:type="simple" xlink:href="#__RefHeading___Toc4775_1212987772" office:name=" 5. Operadores de Atribuição" text:style-name="Index_20_Link" text:visited-style-name="Index_20_Link"><text:span text:style-name="T1"><text:s/>5. Operadores de Atribuição<text:tab/>13</text:span></text:a></text:p>
          <text:p text:style-name="P7"><text:a xlink:type="simple" xlink:href="#__RefHeading___Toc4777_1212987772" office:name="6. Operadores de Atribuição Composta" text:style-name="Index_20_Link" text:visited-style-name="Index_20_Link"><text:span text:style-name="T1">6. Operadores de Atribuição Composta<text:tab/>14</text:span></text:a></text:p>
          <text:p text:style-name="P6"><text:a xlink:type="simple" xlink:href="#__RefHeading___Toc4779_1212987772" office:name="Ordem de Precedência dos Operadores." text:style-name="Index_20_Link" text:visited-style-name="Index_20_Link"><text:span text:style-name="T1">Ordem de Precedência dos Operadores.<text:tab/>15</text:span></text:a></text:p>
          <text:p text:style-name="P7"><text:a xlink:type="simple" xlink:href="#__RefHeading___Toc4781_1212987772" office:name="1º Grupo: Operadores Aritméticos (Matemática)" text:style-name="Index_20_Link" text:visited-style-name="Index_20_Link"><text:span text:style-name="T1">1º Grupo: Operadores Aritméticos (Matemática)<text:tab/>15</text:span></text:a></text:p>
          <text:p text:style-name="P7"><text:a xlink:type="simple" xlink:href="#__RefHeading___Toc4783_1212987772" office:name="2º Grupo: Operadores Relacionais (Comparações)" text:style-name="Index_20_Link" text:visited-style-name="Index_20_Link"><text:span text:style-name="T1">2º Grupo: Operadores Relacionais (Comparações)<text:tab/>16</text:span></text:a></text:p>
          <text:p text:style-name="P7"><text:a xlink:type="simple" xlink:href="#__RefHeading___Toc4785_1212987772" office:name="3º Grupo: Operadores Lógicos (Decisões)" text:style-name="Index_20_Link" text:visited-style-name="Index_20_Link"><text:span text:style-name="T1">3º Grupo: Operadores Lógicos (Decisões)<text:tab/>16</text:span></text:a></text:p>
          <text:p text:style-name="P6"><text:a xlink:type="simple" xlink:href="#__RefHeading___Toc4787_1212987772" office:name="DOM" text:style-name="Index_20_Link" text:visited-style-name="Index_20_Link"><text:span text:style-name="T1">DOM<text:tab/>16</text:span></text:a></text:p>
          <text:p text:style-name="P7"><text:a xlink:type="simple" xlink:href="#__RefHeading___Toc4789_1212987772" office:name="1. O que é o DOM (Document Object Model)?" text:style-name="Index_20_Link" text:visited-style-name="Index_20_Link"><text:span text:style-name="T1">1. O que é o DOM (Document Object Model)?<text:tab/>17</text:span></text:a></text:p>
          <text:p text:style-name="P7"><text:a xlink:type="simple" xlink:href="#__RefHeading___Toc4791_1212987772" office:name="2. Selecionando Elementos (Como o JS encontra as coisas)" text:style-name="Index_20_Link" text:visited-style-name="Index_20_Link"><text:span text:style-name="T1">2. Selecionando Elementos (Como o JS encontra as coisas)<text:tab/>17</text:span></text:a></text:p>
          <text:p text:style-name="P7"><text:a xlink:type="simple" xlink:href="#__RefHeading___Toc4793_1212987772" office:name="3. Manipulando Elementos (Como o JS altera a página)" text:style-name="Index_20_Link" text:visited-style-name="Index_20_Link"><text:span text:style-name="T1">3. Manipulando Elementos (Como o JS altera a página)<text:tab/>17</text:span></text:a></text:p>
          <text:p text:style-name="P7"><text:a xlink:type="simple" xlink:href="#__RefHeading___Toc4795_1212987772" office:name="4. Eventos (Como o JS reage ao Usuário)" text:style-name="Index_20_Link" text:visited-style-name="Index_20_Link"><text:span text:style-name="T1">4. Eventos (Como o JS reage ao Usuário)<text:tab/>18</text:span></text:a></text:p>
          <text:p text:style-name="P7"><text:a xlink:type="simple" xlink:href="#__RefHeading___Toc4797_1212987772" office:name="🚀 Resumo do Fluxo do DOM" text:style-name="Index_20_Link" text:visited-style-name="Index_20_Link"><text:span text:style-name="T1">🚀 Resumo do Fluxo do DOM<text:tab/>18</text:span></text:a></text:p>
          <text:p text:style-name="P6"><text:a xlink:type="simple" xlink:href="#__RefHeading___Toc4799_1212987772" office:name="Arvore DOM" text:style-name="Index_20_Link" text:visited-style-name="Index_20_Link"><text:span text:style-name="T1">Arvore DOM<text:tab/>18</text:span></text:a></text:p>
          <text:p text:style-name="P7"><text:a xlink:type="simple" xlink:href="#__RefHeading___Toc4801_1212987772" office:name=" 1. A Raiz (document)" text:style-name="Index_20_Link" text:visited-style-name="Index_20_Link"><text:soft-page-break/><text:span text:style-name="T1"><text:s/>1. A Raiz (document)<text:tab/>19</text:span></text:a></text:p>
          <text:p text:style-name="P7"><text:a xlink:type="simple" xlink:href="#__RefHeading___Toc4803_1212987772" office:name=" 2. O Elemento Raiz (&lt;html&gt;)" text:style-name="Index_20_Link" text:visited-style-name="Index_20_Link"><text:span text:style-name="T1"><text:s/>2. O Elemento Raiz (&lt;html&gt;)<text:tab/>19</text:span></text:a></text:p>
          <text:p text:style-name="P7"><text:a xlink:type="simple" xlink:href="#__RefHeading___Toc4805_1212987772" office:name=" 3. Os Elementos Pais (Parents)" text:style-name="Index_20_Link" text:visited-style-name="Index_20_Link"><text:span text:style-name="T1"><text:s/>3. Os Elementos Pais (Parents)<text:tab/>19</text:span></text:a></text:p>
          <text:p text:style-name="P7"><text:a xlink:type="simple" xlink:href="#__RefHeading___Toc4807_1212987772" office:name=" 4. Os Elementos Filhos (Children) e Irmãos (Siblings)" text:style-name="Index_20_Link" text:visited-style-name="Index_20_Link"><text:span text:style-name="T1"><text:s/>4. Os Elementos Filhos (Children) e Irmãos (Siblings)<text:tab/>19</text:span></text:a></text:p>
          <text:p text:style-name="P6"><text:a xlink:type="simple" xlink:href="#__RefHeading___Toc4809_1212987772" office:name="Como o HTML se transforma em Árvore (Na Prática)" text:style-name="Index_20_Link" text:visited-style-name="Index_20_Link"><text:span text:style-name="T1">Como o HTML se transforma em Árvore (Na Prática)<text:tab/>19</text:span></text:a></text:p>
          <text:p text:style-name="P6"><text:a xlink:type="simple" xlink:href="#__RefHeading___Toc3287_2888328453" office:name="Tratamento de Eventos no DOM: Guia Completo de Engenharia Front-End" text:style-name="Index_20_Link" text:visited-style-name="Index_20_Link"><text:span text:style-name="T1">Tratamento de Eventos no DOM: Guia Completo de Engenharia Front-End<text:tab/>21</text:span></text:a></text:p>
          <text:p text:style-name="P7"><text:a xlink:type="simple" xlink:href="#__RefHeading___Toc4811_1212987772" office:name="1. O que é um Evento DOM?" text:style-name="Index_20_Link" text:visited-style-name="Index_20_Link"><text:span text:style-name="T1">1. O que é um Evento DOM?<text:tab/>21</text:span></text:a></text:p>
          <text:p text:style-name="P7"><text:a xlink:type="simple" xlink:href="#__RefHeading___Toc4813_1212987772" office:name="2. Métodos de Vinculação (Como Escutar Eventos)" text:style-name="Index_20_Link" text:visited-style-name="Index_20_Link"><text:span text:style-name="T1">2. Métodos de Vinculação (Como Escutar Eventos)<text:tab/>21</text:span></text:a></text:p>
          <text:p text:style-name="P7"><text:a xlink:type="simple" xlink:href="#__RefHeading___Toc4815_1212987772" office:name="3. O Fluxo de Propriação: Event Bubbling e Capturing" text:style-name="Index_20_Link" text:visited-style-name="Index_20_Link"><text:span text:style-name="T1">3. O Fluxo de Propriação: Event Bubbling e Capturing<text:tab/>22</text:span></text:a></text:p>
          <text:p text:style-name="P7"><text:a xlink:type="simple" xlink:href="#__RefHeading___Toc4817_1212987772" office:name="4. O Objeto do Evento (Event Object)" text:style-name="Index_20_Link" text:visited-style-name="Index_20_Link"><text:span text:style-name="T1">4. O Objeto do Evento (Event Object)<text:tab/>22</text:span></text:a></text:p>
          <text:p text:style-name="P7"><text:a xlink:type="simple" xlink:href="#__RefHeading___Toc4819_1212987772" office:name="5. Delegação de Eventos (Event Delegation)" text:style-name="Index_20_Link" text:visited-style-name="Index_20_Link"><text:span text:style-name="T1">5. Delegação de Eventos (Event Delegation)<text:tab/>23</text:span></text:a></text:p>
          <text:p text:style-name="P6"><text:a xlink:type="simple" xlink:href="#__RefHeading___Toc4821_1212987772" office:name="6. Classificação dos Principais Eventos do DOM" text:style-name="Index_20_Link" text:visited-style-name="Index_20_Link"><text:span text:style-name="T1">6. Classificação dos Principais Eventos do DOM<text:tab/>23</text:span></text:a></text:p>
          <text:p text:style-name="P7"><text:a xlink:type="simple" xlink:href="#__RefHeading___Toc4823_1212987772" office:name="Eventos de Mouse" text:style-name="Index_20_Link" text:visited-style-name="Index_20_Link"><text:span text:style-name="T1">Eventos de Mouse<text:tab/>23</text:span></text:a></text:p>
          <text:p text:style-name="P7"><text:a xlink:type="simple" xlink:href="#__RefHeading___Toc4825_1212987772" office:name="Eventos de Teclado" text:style-name="Index_20_Link" text:visited-style-name="Index_20_Link"><text:span text:style-name="T1">Eventos de Teclado<text:tab/>24</text:span></text:a></text:p>
          <text:p text:style-name="P7"><text:a xlink:type="simple" xlink:href="#__RefHeading___Toc4827_1212987772" office:name="Eventos de Formulário" text:style-name="Index_20_Link" text:visited-style-name="Index_20_Link"><text:span text:style-name="T1">Eventos de Formulário<text:tab/>24</text:span></text:a></text:p>
          <text:p text:style-name="P7"><text:a xlink:type="simple" xlink:href="#__RefHeading___Toc4829_1212987772" office:name="Eventos do Ciclo de Vida do Documento" text:style-name="Index_20_Link" text:visited-style-name="Index_20_Link"><text:span text:style-name="T1">Eventos do Ciclo de Vida do Documento<text:tab/>24</text:span></text:a></text:p>
          <text:p text:style-name="P6"><text:a xlink:type="simple" xlink:href="#__RefHeading___Toc4831_1212987772" office:name="Estruturas Condicionais em JavaScript: Guia de Controle de Fluxo" text:style-name="Index_20_Link" text:visited-style-name="Index_20_Link"><text:span text:style-name="T1">Estruturas Condicionais em JavaScript: Guia de Controle de Fluxo<text:tab/>24</text:span></text:a></text:p>
          <text:p text:style-name="P7"><text:a xlink:type="simple" xlink:href="#__RefHeading___Toc4833_1212987772" office:name="1. O que é o Controle de Fluxo Condicional?" text:style-name="Index_20_Link" text:visited-style-name="Index_20_Link"><text:span text:style-name="T1">1. O que é o Controle de Fluxo Condicional?<text:tab/>24</text:span></text:a></text:p>
          <text:p text:style-name="P7"><text:a xlink:type="simple" xlink:href="#__RefHeading___Toc4835_1212987772" office:name="2. A Estrutura Base: if, else if e else" text:style-name="Index_20_Link" text:visited-style-name="Index_20_Link"><text:span text:style-name="T1">2. A Estrutura Base: if, else if e else<text:tab/>25</text:span></text:a></text:p>
          <text:p text:style-name="P7"><text:a xlink:type="simple" xlink:href="#__RefHeading___Toc4837_1212987772" office:name="3. Condição Múltipla: switch" text:style-name="Index_20_Link" text:visited-style-name="Index_20_Link"><text:span text:style-name="T1">3. Condição Múltipla: switch<text:tab/>25</text:span></text:a></text:p>
          <text:p text:style-name="P7"><text:a xlink:type="simple" xlink:href="#__RefHeading___Toc4839_1212987772" office:name="4. O Operador Ternário (Condicional Curto)" text:style-name="Index_20_Link" text:visited-style-name="Index_20_Link"><text:span text:style-name="T1">4. O Operador Ternário (Condicional Curto)<text:tab/>26</text:span></text:a></text:p>
          <text:p text:style-name="P7"><text:a xlink:type="simple" xlink:href="#__RefHeading___Toc4841_1212987772" office:name="5. Conceito Avançado: Truthy e Falsy" text:style-name="Index_20_Link" text:visited-style-name="Index_20_Link"><text:span text:style-name="T1">5. Conceito Avançado: Truthy e Falsy<text:tab/>27</text:span></text:a></text:p>
          <text:p text:style-name="P7"><text:a xlink:type="simple" xlink:href="#__RefHeading___Toc4843_1212987772" office:name="6. Curto-Circuito Lógico (Short-Circuit Evaluation)" text:style-name="Index_20_Link" text:visited-style-name="Index_20_Link"><text:span text:style-name="T1">6. Curto-Circuito Lógico (Short-Circuit Evaluation)<text:tab/>27</text:span></text:a></text:p>
          <text:p text:style-name="P6"><text:a xlink:type="simple" xlink:href="#__RefHeading___Toc4845_1212987772" office:name="Estruturas de Repetição em JavaScript: Automação e Loops" text:style-name="Index_20_Link" text:visited-style-name="Index_20_Link"><text:span text:style-name="T1">Estruturas de Repetição em JavaScript: Automação e Loops<text:tab/>28</text:span></text:a></text:p>
          <text:p text:style-name="P7"><text:a xlink:type="simple" xlink:href="#__RefHeading___Toc4847_1212987772" office:name="1. O que são Estruturas de Repetição?" text:style-name="Index_20_Link" text:visited-style-name="Index_20_Link"><text:span text:style-name="T1">1. O que são Estruturas de Repetição?<text:tab/>28</text:span></text:a></text:p>
          <text:p text:style-name="P7"><text:a xlink:type="simple" xlink:href="#__RefHeading___Toc4849_1212987772" office:name="2. Estrutura Controlada por Contador: for" text:style-name="Index_20_Link" text:visited-style-name="Index_20_Link"><text:span text:style-name="T1">2. Estrutura Controlada por Contador: for<text:tab/>28</text:span></text:a></text:p>
          <text:p text:style-name="P7"><text:a xlink:type="simple" xlink:href="#__RefHeading___Toc4851_1212987772" office:name="3. Estruturas Controladas por Condição: while e do...while" text:style-name="Index_20_Link" text:visited-style-name="Index_20_Link"><text:span text:style-name="T1">3. Estruturas Controladas por Condição: while e do...while<text:tab/>29</text:span></text:a></text:p>
          <text:p text:style-name="P7"><text:a xlink:type="simple" xlink:href="#__RefHeading___Toc4853_1212987772" office:name="4. Loops Especializados para Coleções: for...of e for...in" text:style-name="Index_20_Link" text:visited-style-name="Index_20_Link"><text:span text:style-name="T1">4. Loops Especializados para Coleções: for...of e for...in<text:tab/>30</text:span></text:a></text:p>
          <text:p text:style-name="P7"><text:a xlink:type="simple" xlink:href="#__RefHeading___Toc4855_1212987772" office:name="5. Comandos de Interrupção de Fluxo: break e continue" text:style-name="Index_20_Link" text:visited-style-name="Index_20_Link"><text:span text:style-name="T1">5. Comandos de Interrupção de Fluxo: break e continue<text:tab/>31</text:span></text:a></text:p>
          <text:p text:style-name="P6"><text:a xlink:type="simple" xlink:href="#__RefHeading___Toc4857_1212987772" office:name="Variáveis Compostas (Arrays) em JavaScript: Estruturas de Dados" text:style-name="Index_20_Link" text:visited-style-name="Index_20_Link"><text:span text:style-name="T1">Variáveis Compostas (Arrays) em JavaScript: Estruturas de Dados<text:tab/>31</text:span></text:a></text:p>
          <text:p text:style-name="P7"><text:a xlink:type="simple" xlink:href="#__RefHeading___Toc4859_1212987772" office:name="1. O que é um Array?" text:style-name="Index_20_Link" text:visited-style-name="Index_20_Link"><text:span text:style-name="T1">1. O que é um Array?<text:tab/>32</text:span></text:a></text:p>
          <text:p text:style-name="P7"><text:a xlink:type="simple" xlink:href="#__RefHeading___Toc4861_1212987772" office:name="2. Criação e Acesso a Elementos" text:style-name="Index_20_Link" text:visited-style-name="Index_20_Link"><text:span text:style-name="T1">2. Criação e Acesso a Elementos<text:tab/>32</text:span></text:a></text:p>
          <text:p text:style-name="P7"><text:a xlink:type="simple" xlink:href="#__RefHeading___Toc4863_1212987772" office:name="3. Métodos Fundamentais de Manipulação (Inserção e Remoção)" text:style-name="Index_20_Link" text:visited-style-name="Index_20_Link"><text:span text:style-name="T1">3. Métodos Fundamentais de Manipulação (Inserção e Remoção)<text:tab/>32</text:span></text:a></text:p>
          <text:p text:style-name="P7"><text:a xlink:type="simple" xlink:href="#__RefHeading___Toc4865_1212987772" office:name="4. Combinando Repetições com Arrays (Iteração)" text:style-name="Index_20_Link" text:visited-style-name="Index_20_Link"><text:span text:style-name="T1">4. Combinando Repetições com Arrays (Iteração)<text:tab/>33</text:span></text:a></text:p>
          <text:p text:style-name="P7"><text:a xlink:type="simple" xlink:href="#__RefHeading___Toc4867_1212987772" office:name="5. Arrays Multidimensionais (Matrizes)" text:style-name="Index_20_Link" text:visited-style-name="Index_20_Link"><text:span text:style-name="T1">5. Arrays Multidimensionais (Matrizes)<text:tab/>34</text:span></text:a></text:p>
        </text:index-body>
      </text:table-of-content>
      <text:p text:style-name="P8"/>
      <text:h text:style-name="P9" text:outline-level="2"><text:bookmark-start text:name="__RefHeading___Toc4713_1212987772"/>A diferencia entre javascript e EcmaScript<text:bookmark-end text:name="__RefHeading___Toc4713_1212987772"/></text:h>
      <text:p text:style-name="P8">Para entender a diferença de forma bem simples, pense na relação entre o Português (a língua) e o Dicionário da Academia de Letras (as regras).</text:p>
      <text:list text:style-name="L1">
        <text:list-item>
          <text:p text:style-name="P10"><text:span text:style-name="T2">ECMAScript</text:span> é a regra (o padrão): É um documento oficial que dita como a linguagem deve funcionar. Ele diz quais palavras-chave existem, como os <text:span text:style-name="T2">loops</text:span> devem se comportar e quais são os tipos de dados. Ele existe apenas no papel.</text:p>
        </text:list-item>
        <text:list-item>
          <text:p text:style-name="P10"><text:span text:style-name="T2">JavaScript</text:span> é a língua (a implementação): É a linguagem real que você escreve no seu editor de código e que o navegador roda. O JavaScript segue as regras que o ECMAScript determinou.</text:p>
        </text:list-item>
      </text:list>
      <text:list text:style-name="L2">
        <text:list-item>
          <text:h text:style-name="P11" text:outline-level="3"><text:bookmark-start text:name="__RefHeading___Toc4715_1212987772"/>Uma Breve História (Para fazer sentido)<text:bookmark-end text:name="__RefHeading___Toc4715_1212987772"/></text:h>
        </text:list-item>
      </text:list>
      <text:list text:style-name="L3">
        <text:list-item>
          <text:list>
            <text:list-item>
              <text:p text:style-name="P12">Nos anos 90, o JavaScript foi criado para o navegador Netscape.</text:p>
            </text:list-item>
            <text:list-item>
              <text:p text:style-name="P12">Logo depois, a Microsoft criou a sua própria versão para o Internet Explorer, chamada JScript.</text:p>
            </text:list-item>
            <text:list-item>
              <text:p text:style-name="P12">Como cada navegador começou a criar suas próprias regras, a internet virou uma bagunça (um código que funcionava em um navegador quebrava no outro).</text:p>
            </text:list-item>
            <text:list-item>
              <text:p text:style-name="P12">Para resolver isso, eles pediram para uma organização internacional chamada ECMA padronizar a linguagem. Nasceu aí o ECMAScript.</text:p>
            </text:list-item>
          </text:list>
        </text:list-item>
        <text:list-item>
          <text:h text:style-name="P13" text:outline-level="3"><text:bookmark-start text:name="__RefHeading___Toc4717_1212987772"/>Por que você ouve falar tanto de "ES6", "ES7", etc.?<text:bookmark-end text:name="__RefHeading___Toc4717_1212987772"/></text:h>
        </text:list-item>
      </text:list>
      <text:p text:style-name="P8">ES é a abreviação de EcmaScript. O número ao lado é a versão da regra.</text:p>
      <text:list text:style-name="L4">
        <text:list-item>
          <text:p text:style-name="P14"><text:span text:style-name="T2">ES5 (2009)</text:span>: É o JavaScript mais antigo.</text:p>
        </text:list-item>
        <text:list-item>
          <text:p text:style-name="P15"><text:span text:style-name="T3">ES6 / ES2015</text:span><text:span text:style-name="T1">: Foi a maior atualização da história da linguagem. Ela mudou o JavaScript de patamar, trazendo coisas que usamos hoje como o </text:span><text:span text:style-name="Source_20_Text"><text:span text:style-name="T1">let</text:span></text:span><text:span text:style-name="T1">, </text:span><text:span text:style-name="Source_20_Text"><text:span text:style-name="T1">const</text:span></text:span><text:span text:style-name="T1">, as Arrow Functions e as Template Strings (as crases para textos).</text:span></text:p>
        </text:list-item>
        <text:list-item>
          <text:p text:style-name="P14"><text:span text:style-name="T2">Atualizações Anuais</text:span>: Hoje em dia, o comitê do ECMAScript lança uma versão nova todo ano (ES2024, ES2025, etc.) trazendo pequenas melhorias.</text:p>
        </text:list-item>
      </text:list>
      <text:p text:style-name="P16">💡 Resumo da ópera: Você não precisa aprender duas coisas diferentes. Quando você estuda JavaScript moderno, você já está estudando as versões mais recentes do ECMAScript.</text:p>
      <text:h text:style-name="P17" text:outline-level="2"><text:bookmark-start text:name="__RefHeading___Toc4719_1212987772"/>Variáveis<text:bookmark-end text:name="__RefHeading___Toc4719_1212987772"/></text:h>
      <text:list text:style-name="L5">
        <text:list-item>
          <text:h text:style-name="P18" text:outline-level="3"><text:bookmark-start text:name="__RefHeading___Toc4721_1212987772"/>Variáveis: As Gavetas da Memória<text:bookmark-end text:name="__RefHeading___Toc4721_1212987772"/></text:h>
        </text:list-item>
      </text:list>
      <text:p text:style-name="P8">Uma variável é como uma caixa etiquetada onde você guarda uma informação para usar mais tarde. No JavaScript moderno, usamos duas palavras-chave principais para criar essas caixas:</text:p>
      <text:list text:style-name="L6">
        <text:list-item>
          <text:p text:style-name="P19"><text:soft-page-break/><text:span text:style-name="Source_20_Text"><text:span text:style-name="T3">const</text:span></text:span><text:span text:style-name="T3"> (Constante)</text:span><text:span text:style-name="T1">: Cria uma gaveta que, uma vez fechada com um valor dentro, nunca mais pode ser alterada. Use sempre esta por padrão.</text:span></text:p>
        </text:list-item>
        <text:list-item>
          <text:p text:style-name="P19"><text:span text:style-name="Source_20_Text"><text:span text:style-name="T3">let</text:span></text:span><text:span text:style-name="T1">: Cria uma gaveta que pode ter o valor substituído ao longo do tempo. Use quando souber que o dado vai mudar (como a pontuação de um jogo).</text:span></text:p>
        </text:list-item>
        <text:list-item>
          <text:p text:style-name="P19"><text:span text:style-name="T1">(Nota: Você talvez veja o </text:span><text:span text:style-name="Source_20_Text"><text:span text:style-name="T1">var</text:span></text:span><text:span text:style-name="T1"> em códigos antigos. Ele caiu em desuso porque causava alguns comportamentos confusos no código. Evite usar).</text:span></text:p>
        </text:list-item>
      </text:list>
      <text:p text:style-name="P20">JavaScript</text:p>
      <text:p text:style-name="P21"><text:span text:style-name="Source_20_Text"><text:span text:style-name="T4">const nome = "Lucas"; // Este nome não muda</text:span></text:span></text:p>
      <text:p text:style-name="P21"><text:span text:style-name="Source_20_Text"><text:span text:style-name="T4">let pontos = 10; <text:s text:c="4"/>// O jogo começou, o jogador tem 10 pontos</text:span></text:span></text:p>
      <text:p text:style-name="P22"/>
      <text:p text:style-name="P21"><text:span text:style-name="Source_20_Text"><text:span text:style-name="T4">pontos = 15; <text:s text:c="8"/>// Perfeito! let permite mudar o valor</text:span></text:span></text:p>
      <text:p text:style-name="P23"><text:span text:style-name="Source_20_Text"><text:span text:style-name="T4">nome = "Mariana"; <text:s text:c="3"/>// Erro! O JavaScript vai travar porque const não muda</text:span></text:span></text:p>
      <text:list text:style-name="L7">
        <text:list-item>
          <text:h text:style-name="P24" text:outline-level="3"><text:bookmark-start text:name="__RefHeading___Toc4723_1212987772"/><text:span text:style-name="Source_20_Text"><text:span text:style-name="T1">Regras de identificadores </text:span></text:span><text:span text:style-name="Source_20_Text"><text:span text:style-name="T5">das variáveis</text:span></text:span><text:bookmark-end text:name="__RefHeading___Toc4723_1212987772"/></text:h>
        </text:list-item>
      </text:list>
      <text:p text:style-name="Text_20_body"><text:span text:style-name="Source_20_Text"><text:span text:style-name="T6">A</text:span></text:span><text:span text:style-name="Source_20_Text"><text:span text:style-name="T1">borda as regras gramaticais para dar nome às coisas no JavaScript.</text:span></text:span><text:span text:style-name="T1">Em programação, um Identificador é simplesmente o nome que você escolhe para suas variáveis, constantes, funções ou classes. O JavaScript possui regras rígidas sobre o que é permitido e o que vai quebrar o seu código. </text:span><text:span text:style-name="T7">E</text:span><text:span text:style-name="T1">xemplos práticos:</text:span></text:p>
      <text:list text:style-name="L8">
        <text:list-item>
          <text:p text:style-name="P25"><text:span text:style-name="T3">Podem começar com letra, </text:span><text:span text:style-name="Source_20_Text"><text:span text:style-name="T3">$</text:span></text:span><text:span text:style-name="T3"> ou </text:span><text:span text:style-name="Source_20_Text"><text:span text:style-name="T3">_</text:span></text:span></text:p>
        </text:list-item>
      </text:list>
      <text:p text:style-name="Text_20_body"><text:span text:style-name="T1">O primeiro caractere do nome da sua variável é o mais restrito. Ele só pode ser uma letra (maíuscula ou minúscula), o símbolo do cifrão (</text:span><text:span text:style-name="Source_20_Text"><text:span text:style-name="T1">$</text:span></text:span><text:span text:style-name="T1">) ou o underline (</text:span><text:span text:style-name="Source_20_Text"><text:span text:style-name="T1">_</text:span></text:span><text:span text:style-name="T1">).</text:span></text:p>
      <text:p text:style-name="P26">JavaScript</text:p>
      <text:p text:style-name="P27"><text:span text:style-name="Source_20_Text"><text:span text:style-name="T4">const nome = "Lucas"; <text:s text:c="3"/>// ✅ Válido (começa com letra)</text:span></text:span></text:p>
      <text:p text:style-name="P27"><text:span text:style-name="Source_20_Text"><text:span text:style-name="T4">const $preco = 10.90; <text:s text:c="3"/>// ✅ Válido (muito usado em bibliotecas como jQuery ou RxJS)</text:span></text:span></text:p>
      <text:p text:style-name="P27"><text:span text:style-name="Source_20_Text"><text:span text:style-name="T4">const _id = "usr_123"; <text:s text:c="2"/>// ✅ Válido (comum para indicar variáveis privadas/internas)</text:span></text:span></text:p>
      <text:list text:style-name="L9">
        <text:list-item>
          <text:p text:style-name="P28">Não podem começar com números</text:p>
        </text:list-item>
      </text:list>
      <text:p text:style-name="P8">Embora você possa usar números no nome da variável, eles nunca podem vir na primeira posição.</text:p>
      <text:p text:style-name="P29">JavaScript</text:p>
      <text:p text:style-name="P27"><text:span text:style-name="Source_20_Text"><text:span text:style-name="T8">const 1ano = 2026; <text:s/>// ❌ Erro de Sintaxe! O JavaScript se confunde achando que é um número puro.</text:span></text:span></text:p>
      <text:p text:style-name="P27"><text:span text:style-name="Source_20_Text"><text:span text:style-name="T8">const ano1 = 2026; <text:s/>// ✅ Válido! O número no final ou meio é totalmente permitido.</text:span></text:span></text:p>
      <text:list text:style-name="L10">
        <text:list-item>
          <text:p text:style-name="P30">É possível usar letras ou números</text:p>
        </text:list-item>
      </text:list>
      <text:p text:style-name="P8">Depois do primeiro caractere, você está livre para misturar letras (de A a Z) e números (de 0 a 9).</text:p>
      <text:p text:style-name="P29">JavaScript</text:p>
      <text:p text:style-name="P27"><text:span text:style-name="Source_20_Text"><text:span text:style-name="T8">const apartamento202 = true; // ✅ Perfeito</text:span></text:span></text:p>
      <text:list text:style-name="L11">
        <text:list-item>
          <text:p text:style-name="P31">É possível usar acentos e símbolos</text:p>
        </text:list-item>
      </text:list>
      <text:p text:style-name="P8">O JavaScript moderno aceita caracteres Unicode, o que significa que tecnicamente você pode usar acentos. Porém, há uma pegadinha de boa prática aqui!</text:p>
      <text:p text:style-name="P29">JavaScript</text:p>
      <text:p text:style-name="P27"><text:soft-page-break/><text:span text:style-name="Source_20_Text"><text:span text:style-name="T8">const preço = 50; <text:s text:c="2"/>// ✅ Funciona no JavaScript, mas...</text:span></text:span></text:p>
      <text:p text:style-name="P27"><text:span text:style-name="Source_20_Text"><text:span text:style-name="T8">const calça = "Jeans"; // ✅ Também funciona…</text:span></text:span></text:p>
      <text:p text:style-name="P27"><text:span text:style-name="Source_20_Text"><text:span text:style-name="T9"/></text:span></text:p>
      <text:p text:style-name="P32"><text:span text:style-name="T9">⚠️ Alerta de Boa Prática: Embora o JavaScript permita acentos, a comunidade global de programação evita ao máximo. Usar acentos ou o </text:span><text:span text:style-name="Source_20_Text"><text:span text:style-name="T9">ç</text:span></text:span><text:span text:style-name="T9"> pode gerar problemas de codificação quando seu código for rodar em servidores internacionais ou quando você trabalhar com programadores estrangeiros. Prefira </text:span><text:span text:style-name="Source_20_Text"><text:span text:style-name="T9">preco</text:span></text:span><text:span text:style-name="T9"> e </text:span><text:span text:style-name="Source_20_Text"><text:span text:style-name="T9">calca</text:span></text:span><text:span text:style-name="T9">.</text:span></text:p>
      <text:list text:style-name="L12">
        <text:list-item>
          <text:p text:style-name="P33"><text:span text:style-name="T2">Não podem conter espaços</text:span></text:p>
        </text:list-item>
      </text:list>
      <text:p text:style-name="P8">Uma variável precisa ser uma palavra única e contínua. O computador não entende que duas palavras separadas por espaço pertencem ao mesmo nome.</text:p>
      <text:p text:style-name="P29">JavaScript</text:p>
      <text:p text:style-name="P27"><text:span text:style-name="Source_20_Text"><text:span text:style-name="T8">const nome usuario = "Mariana"; // ❌ Erro de Sintaxe! O espaço quebra o código.</text:span></text:span></text:p>
      <text:p text:style-name="Preformatted_20_Text"><text:span text:style-name="Source_20_Text"><text:span text:style-name="T1"/></text:span></text:p>
      <text:p text:style-name="P8">Para resolver isso, a comunidade JavaScript usa um padrão chamado camelCase (onde a primeira palavra é minúscula e as seguintes começam com letra maiúscula, parecendo as corcovas de um camelo):</text:p>
      <text:p text:style-name="P34">JavaScript</text:p>
      <text:p text:style-name="P27"><text:span text:style-name="Source_20_Text"><text:span text:style-name="T10">const nomeUsuario = "Mariana"; // ✅ Perfeito! Padrão camelCase.</text:span></text:span></text:p>
      <text:list text:style-name="L13">
        <text:list-item>
          <text:p text:style-name="P35">Não podem ser palavras reservadas</text:p>
        </text:list-item>
      </text:list>
      <text:p text:style-name="P8">O JavaScript tem uma lista de palavras que pertencem à própria linguagem (como comandos e instruções). Você não pode usar essas palavras como nome das suas variáveis, senão o motor do navegador entra em curto-circuito.</text:p>
      <text:p text:style-name="P34">JavaScript</text:p>
      <text:p text:style-name="P27"><text:span text:style-name="Source_20_Text"><text:span text:style-name="T10">const let = 10; <text:s text:c="5"/>// ❌ Erro! "let" é uma palavra reservada para criar variáveis.</text:span></text:span></text:p>
      <text:p text:style-name="P27"><text:span text:style-name="Source_20_Text"><text:span text:style-name="T10">const function = 5; <text:s/>// ❌ Erro! "function" é reservada para criar funções.</text:span></text:span></text:p>
      <text:p text:style-name="P36"><text:span text:style-name="Source_20_Text"><text:span text:style-name="T10">const const = "Oi"; <text:s/>// ❌ Erro! "const" é reservada.</text:span></text:span></text:p>
      <text:p text:style-name="P37">🧠 <text:span text:style-name="T11">3. </text:span>Tabela Resumo: O que pode e o que não pode?</text:p>
      <table:table table:name="Tabela1" table:style-name="Tabela1">
        <table:table-column table:style-name="Tabela1.A"/>
        <table:table-column table:style-name="Tabela1.B"/>
        <table:table-column table:style-name="Tabela1.C"/>
        <table:table-header-rows>
          <table:table-row>
            <table:table-cell table:style-name="Tabela1.A1" office:value-type="string">
              <text:p text:style-name="Table_20_Contents"><text:span text:style-name="Strong_20_Emphasis"><text:span text:style-name="T1">Nome da Variável</text:span></text:span></text:p>
            </table:table-cell>
            <table:table-cell table:style-name="Tabela1.A1" office:value-type="string">
              <text:p text:style-name="Table_20_Contents"><text:span text:style-name="Strong_20_Emphasis"><text:span text:style-name="T1">É válido?</text:span></text:span></text:p>
            </table:table-cell>
            <table:table-cell table:style-name="Tabela1.A1" office:value-type="string">
              <text:p text:style-name="Table_20_Contents"><text:span text:style-name="Strong_20_Emphasis"><text:span text:style-name="T1">Motivo</text:span></text:span></text:p>
            </table:table-cell>
          </table:table-row>
        </table:table-header-rows>
        <table:table-row>
          <table:table-cell table:style-name="Tabela1.A1" office:value-type="string">
            <text:p text:style-name="Table_20_Contents"><text:span text:style-name="Source_20_Text"><text:span text:style-name="T1">let meuStatus = true;</text:span></text:span></text:p>
          </table:table-cell>
          <table:table-cell table:style-name="Tabela1.A1" office:value-type="string">
            <text:p text:style-name="P38">Sim</text:p>
          </table:table-cell>
          <table:table-cell table:style-name="Tabela1.A1" office:value-type="string">
            <text:p text:style-name="P38">Segue todas as regras e usa camelCase.</text:p>
          </table:table-cell>
        </table:table-row>
        <table:table-row>
          <table:table-cell table:style-name="Tabela1.A1" office:value-type="string">
            <text:p text:style-name="Table_20_Contents"><text:span text:style-name="Source_20_Text"><text:span text:style-name="T1">let 3_fases = "teste";</text:span></text:span></text:p>
          </table:table-cell>
          <table:table-cell table:style-name="Tabela1.A1" office:value-type="string">
            <text:p text:style-name="P38">Não</text:p>
          </table:table-cell>
          <table:table-cell table:style-name="Tabela1.A1" office:value-type="string">
            <text:p text:style-name="P38">Começou com um número.</text:p>
          </table:table-cell>
        </table:table-row>
        <table:table-row>
          <table:table-cell table:style-name="Tabela1.A1" office:value-type="string">
            <text:p text:style-name="Table_20_Contents"><text:span text:style-name="Source_20_Text"><text:span text:style-name="T1">let $_valor = 100;</text:span></text:span></text:p>
          </table:table-cell>
          <table:table-cell table:style-name="Tabela1.A1" office:value-type="string">
            <text:p text:style-name="P38">Sim</text:p>
          </table:table-cell>
          <table:table-cell table:style-name="Tabela1.A1" office:value-type="string">
            <text:p text:style-name="Table_20_Contents"><text:span text:style-name="T1">Começou com </text:span><text:span text:style-name="Source_20_Text"><text:span text:style-name="T1">$</text:span></text:span><text:span text:style-name="T1"> e usou </text:span><text:span text:style-name="Source_20_Text"><text:span text:style-name="T1">_</text:span></text:span><text:span text:style-name="T1">.</text:span></text:p>
          </table:table-cell>
        </table:table-row>
        <table:table-row>
          <table:table-cell table:style-name="Tabela1.A1" office:value-type="string">
            <text:p text:style-name="Table_20_Contents"><text:span text:style-name="Source_20_Text"><text:span text:style-name="T1">let o-nome = "Ana";</text:span></text:span></text:p>
          </table:table-cell>
          <table:table-cell table:style-name="Tabela1.A1" office:value-type="string">
            <text:p text:style-name="P38">Não</text:p>
          </table:table-cell>
          <table:table-cell table:style-name="Tabela1.A1" office:value-type="string">
            <text:p text:style-name="Table_20_Contents"><text:span text:style-name="T1">O hífen (</text:span><text:span text:style-name="Source_20_Text"><text:span text:style-name="T1">-</text:span></text:span><text:span text:style-name="T1">) é interpretado como operador de subtração.</text:span></text:p>
          </table:table-cell>
        </table:table-row>
        <table:table-row>
          <table:table-cell table:style-name="Tabela1.A1" office:value-type="string">
            <text:p text:style-name="Table_20_Contents"><text:span text:style-name="Source_20_Text"><text:span text:style-name="T1">let breakingBad = "Série";</text:span></text:span></text:p>
          </table:table-cell>
          <table:table-cell table:style-name="Tabela1.A1" office:value-type="string">
            <text:p text:style-name="P38">Sim</text:p>
          </table:table-cell>
          <table:table-cell table:style-name="Tabela1.A1" office:value-type="string">
            <text:p text:style-name="P38">Duas palavras juntas usando camelCase.</text:p>
          </table:table-cell>
        </table:table-row>
      </table:table>
      <text:p text:style-name="Preformatted_20_Text"><text:span text:style-name="Source_20_Text"><text:span text:style-name="T1"/></text:span></text:p>
      <text:h text:style-name="P39" text:outline-level="2"><text:bookmark-start text:name="__RefHeading___Toc4725_1212987772"/><text:soft-page-break/>Tipos de Dados: O que vai dentro da Gaveta?<text:bookmark-end text:name="__RefHeading___Toc4725_1212987772"/></text:h>
      <text:list text:style-name="L14">
        <text:list-item>
          <text:h text:style-name="P40" text:outline-level="3"><text:bookmark-start text:name="__RefHeading___Toc4727_1212987772"/><text:span text:style-name="Source_20_Text"><text:span text:style-name="T1">number (Número)</text:span></text:span><text:bookmark-end text:name="__RefHeading___Toc4727_1212987772"/></text:h>
        </text:list-item>
      </text:list>
      <text:p text:style-name="Text_20_body"><text:span text:style-name="T1">Diferente de outras linguagens que separam números inteiros de números com vírgula, o JavaScript coloca tudo na mesma caixa chamada </text:span><text:span text:style-name="Source_20_Text"><text:span text:style-name="T1">number</text:span></text:span><text:span text:style-name="T1">.</text:span></text:p>
      <text:list text:style-name="L15">
        <text:list-item>
          <text:p text:style-name="P41">O que é: Qualquer valor numérico, seja positivo, negativo, inteiro ou decimal.</text:p>
        </text:list-item>
        <text:list-item>
          <text:p text:style-name="P41">Exemplo:</text:p>
          <text:p text:style-name="P42">JavaScript</text:p>
          <text:p text:style-name="P43"><text:span text:style-name="Source_20_Text"><text:span text:style-name="T10">const idade = 26; <text:s text:c="6"/>// Inteiro</text:span></text:span></text:p>
          <text:p text:style-name="P43"><text:span text:style-name="Source_20_Text"><text:span text:style-name="T10">const preco = 99.90; <text:s text:c="3"/>// Decimal (sempre use ponto, não vírgula)</text:span></text:span></text:p>
          <text:p text:style-name="P44"><text:span text:style-name="Source_20_Text"><text:span text:style-name="T10">const temperatura = -5; // Negativo</text:span></text:span></text:p>
        </text:list-item>
      </text:list>
      <text:list text:style-name="L16">
        <text:list-item>
          <text:h text:style-name="P45" text:outline-level="3"><text:bookmark-start text:name="__RefHeading___Toc4729_1212987772"/><text:span text:style-name="Source_20_Text"><text:span text:style-name="T1">Infinity</text:span></text:span><text:span text:style-name="T1"> (Infinito)</text:span><text:bookmark-end text:name="__RefHeading___Toc4729_1212987772"/></text:h>
        </text:list-item>
      </text:list>
      <text:p text:style-name="P8">Este é um valor numérico especial que representa, literalmente, o infinito matemático.</text:p>
      <text:list text:style-name="L17">
        <text:list-item>
          <text:p text:style-name="P46">O que é: Ele aparece quando você faz uma operação matemática cujo resultado é maior do que o maior número que o JavaScript consegue processar, ou em divisões por zero.</text:p>
        </text:list-item>
        <text:list-item>
          <text:p text:style-name="P46">Exemplo:</text:p>
          <text:p text:style-name="P47">JavaScript</text:p>
          <text:p text:style-name="P48"><text:span text:style-name="Source_20_Text"><text:span text:style-name="T10">const resultado = 10 / 0; </text:span></text:span></text:p>
          <text:p text:style-name="P48"><text:span text:style-name="Source_20_Text"><text:span text:style-name="T10">console.log(resultado); // Vai exibir: Infinity</text:span></text:span></text:p>
        </text:list-item>
      </text:list>
      <text:list text:style-name="L18">
        <text:list-item>
          <text:h text:style-name="P49" text:outline-level="3"><text:bookmark-start text:name="__RefHeading___Toc4731_1212987772"/><text:span text:style-name="Source_20_Text"><text:span text:style-name="T1">NaN</text:span></text:span><text:span text:style-name="T1"> (Not a Number / Não é um Número)</text:span><text:bookmark-end text:name="__RefHeading___Toc4731_1212987772"/></text:h>
        </text:list-item>
      </text:list>
      <text:p text:style-name="Text_20_body"><text:span text:style-name="T1">Apesar do nome significar "Não é um Número", o tipo dele para o JavaScript ainda é considerado um </text:span><text:span text:style-name="Source_20_Text"><text:span text:style-name="T1">number</text:span></text:span><text:span text:style-name="T1"> especial!</text:span></text:p>
      <text:list text:style-name="L19">
        <text:list-item>
          <text:p text:style-name="P50">O que é: Ele serve para indicar que uma operação matemática falhou ou deu um resultado inválido/impossível.</text:p>
        </text:list-item>
        <text:list-item>
          <text:p text:style-name="P50">Exemplo: Se você tentar multiplicar um texto por um número:</text:p>
          <text:p text:style-name="P51">JavaScript</text:p>
          <text:p text:style-name="P52"><text:span text:style-name="Source_20_Text"><text:span text:style-name="T10">const resultadoInvalido = "Olá" * 5; </text:span></text:span></text:p>
          <text:p text:style-name="P52"><text:span text:style-name="Source_20_Text"><text:span text:style-name="T10">console.log(resultadoInvalido); // Vai exibir: NaN</text:span></text:span></text:p>
        </text:list-item>
      </text:list>
      <text:h text:style-name="Heading_20_3" text:outline-level="3"><text:bookmark-start text:name="__RefHeading___Toc4733_1212987772"/><text:span text:style-name="T1">4. </text:span><text:span text:style-name="Source_20_Text"><text:span text:style-name="T1">string</text:span></text:span><text:span text:style-name="T1"> (Texto)</text:span><text:bookmark-end text:name="__RefHeading___Toc4733_1212987772"/></text:h>
      <text:p text:style-name="P8">Como vimos antes, serve para qualquer cadeia de caracteres (letras, palavras, frases, códigos).</text:p>
      <text:list text:style-name="L20">
        <text:list-item>
          <text:p text:style-name="P53"><text:span text:style-name="T1">O que é: Dados textuais que precisam estar envolvidos por aspas simples (</text:span><text:span text:style-name="Source_20_Text"><text:span text:style-name="T1">'</text:span></text:span><text:span text:style-name="T1">), duplas (</text:span><text:span text:style-name="Source_20_Text"><text:span text:style-name="T1">"</text:span></text:span><text:span text:style-name="T1">) ou crases (` `).</text:span></text:p>
        </text:list-item>
        <text:list-item>
          <text:p text:style-name="P54">Exemplo:</text:p>
          <text:p text:style-name="P55">JavaScript</text:p>
          <text:p text:style-name="P56"><text:span text:style-name="Source_20_Text"><text:span text:style-name="T10">const nome = 'Ana';</text:span></text:span></text:p>
          <text:p text:style-name="P56"><text:soft-page-break/><text:span text:style-name="Source_20_Text"><text:span text:style-name="T10">const frase = "Estou aprendendo JS";</text:span></text:span></text:p>
        </text:list-item>
      </text:list>
      <text:h text:style-name="Heading_20_3" text:outline-level="3"><text:bookmark-start text:name="__RefHeading___Toc4735_1212987772"/><text:span text:style-name="T1">5. </text:span><text:span text:style-name="Source_20_Text"><text:span text:style-name="T1">boolean</text:span></text:span><text:span text:style-name="T1"> (Booleano)</text:span><text:bookmark-end text:name="__RefHeading___Toc4735_1212987772"/></text:h>
      <text:p text:style-name="P8">O tipo de tomada do JavaScript: ou está ligado, ou está desligado.</text:p>
      <text:list text:style-name="L21">
        <text:list-item>
          <text:p text:style-name="P57"><text:span text:style-name="T1">O que é: Um tipo de dado que só aceita dois valores possíveis: </text:span><text:span text:style-name="Source_20_Text"><text:span text:style-name="T1">true</text:span></text:span><text:span text:style-name="T1"> (verdadeiro) ou </text:span><text:span text:style-name="Source_20_Text"><text:span text:style-name="T1">false</text:span></text:span><text:span text:style-name="T1"> (falso).</text:span></text:p>
        </text:list-item>
        <text:list-item>
          <text:p text:style-name="P58">Exemplo:</text:p>
          <text:list>
            <text:list-header>
              <text:p text:style-name="P59">JavaScript</text:p>
              <text:p text:style-name="P60"><text:span text:style-name="Source_20_Text"><text:span text:style-name="T10">const estaChovendo = false;</text:span></text:span></text:p>
              <text:p text:style-name="P60"><text:span text:style-name="Source_20_Text"><text:span text:style-name="T10">const maiorDeIdade = true;</text:span></text:span></text:p>
            </text:list-header>
          </text:list>
        </text:list-item>
      </text:list>
      <text:h text:style-name="Heading_20_3" text:outline-level="3"><text:bookmark-start text:name="__RefHeading___Toc4737_1212987772"/><text:span text:style-name="T1">6. </text:span><text:span text:style-name="Source_20_Text"><text:span text:style-name="T1">null</text:span></text:span><text:span text:style-name="T1"> (Nulo)</text:span><text:bookmark-end text:name="__RefHeading___Toc4737_1212987772"/></text:h>
      <text:p text:style-name="Text_20_body"><text:span text:style-name="T1">O </text:span><text:span text:style-name="Source_20_Text"><text:span text:style-name="T1">null</text:span></text:span><text:span text:style-name="T1"> representa a ausência intencional de um valor.</text:span></text:p>
      <text:list text:style-name="L22">
        <text:list-item>
          <text:p text:style-name="P61"><text:span text:style-name="T1">O que é: Você usa o </text:span><text:span text:style-name="Source_20_Text"><text:span text:style-name="T1">null</text:span></text:span><text:span text:style-name="T1"> quando quer dizer explicitamente para o computador: "Esta variável existe, mas ela está vazia de propósito neste momento".</text:span></text:p>
        </text:list-item>
        <text:list-item>
          <text:p text:style-name="P62">Exemplo: Um campo de "segundo nome" em um formulário que o usuário não preencheu.</text:p>
          <text:p text:style-name="P62">JavaScript</text:p>
          <text:p text:style-name="P63"><text:span text:style-name="Source_20_Text"><text:span text:style-name="T1">let segundoNome = null; // O desenvolvedor definiu que está vazio</text:span></text:span></text:p>
        </text:list-item>
      </text:list>
      <text:h text:style-name="Heading_20_3" text:outline-level="3"><text:bookmark-start text:name="__RefHeading___Toc4739_1212987772"/><text:span text:style-name="T1">7. </text:span><text:span text:style-name="Source_20_Text"><text:span text:style-name="T1">undefined</text:span></text:span><text:span text:style-name="T1"> (Indefinido)</text:span><text:bookmark-end text:name="__RefHeading___Toc4739_1212987772"/></text:h>
      <text:p text:style-name="Text_20_body"><text:span text:style-name="T1">O </text:span><text:span text:style-name="Source_20_Text"><text:span text:style-name="T1">undefined</text:span></text:span><text:span text:style-name="T1"> significa que algo foi criado, mas nunca recebeu nenhum conteúdo.</text:span></text:p>
      <text:list text:style-name="L23">
        <text:list-item>
          <text:p text:style-name="P64"><text:span text:style-name="T1">O que é: Ao contrário do </text:span><text:span text:style-name="Source_20_Text"><text:span text:style-name="T1">null</text:span></text:span><text:span text:style-name="T1"> (que é intencional), o </text:span><text:span text:style-name="Source_20_Text"><text:span text:style-name="T1">undefined</text:span></text:span><text:span text:style-name="T1"> é o padrão do JavaScript para variáveis que foram declaradas com </text:span><text:span text:style-name="Source_20_Text"><text:span text:style-name="T1">let</text:span></text:span><text:span text:style-name="T1">, mas não receberam nenhum valor inicial.</text:span></text:p>
        </text:list-item>
        <text:list-item>
          <text:p text:style-name="P65">Exemplo:</text:p>
          <text:list>
            <text:list-header>
              <text:p text:style-name="P66">JavaScript</text:p>
              <text:p text:style-name="P67"><text:span text:style-name="Source_20_Text"><text:span text:style-name="T10">let minhaVariavel; </text:span></text:span></text:p>
              <text:p text:style-name="P67"><text:span text:style-name="Source_20_Text"><text:span text:style-name="T10">console.log(minhaVariavel); // Vai exibir: undefined (porque não ganhou valor)</text:span></text:span></text:p>
            </text:list-header>
          </text:list>
        </text:list-item>
      </text:list>
      <text:h text:style-name="Heading_20_3" text:outline-level="3"><text:bookmark-start text:name="__RefHeading___Toc4741_1212987772"/><text:span text:style-name="T1">8. </text:span><text:span text:style-name="Source_20_Text"><text:span text:style-name="T1">object</text:span></text:span><text:span text:style-name="T1"> (Objeto)</text:span><text:bookmark-end text:name="__RefHeading___Toc4741_1212987772"/></text:h>
      <text:p text:style-name="P8">Aqui entramos nos tipos estruturais. Um objeto permite agrupar várias informações em um único lugar usando pares de chave: valor.</text:p>
      <text:list text:style-name="L24">
        <text:list-item>
          <text:p text:style-name="P68">O que é: Uma coleção de dados relacionados. É como uma ficha cadastral de alguma coisa do mundo real.</text:p>
        </text:list-item>
        <text:list-item>
          <text:p text:style-name="P68">Exemplo:</text:p>
          <text:list>
            <text:list-header>
              <text:p text:style-name="P69">JavaScript</text:p>
              <text:p text:style-name="P70"><text:span text:style-name="Source_20_Text"><text:span text:style-name="T10">const carro = {</text:span></text:span></text:p>
              <text:p text:style-name="P70"><text:span text:style-name="Source_20_Text"><text:span text:style-name="T10"><text:s text:c="4"/>marca: "Toyota",</text:span></text:span></text:p>
              <text:p text:style-name="P70"><text:span text:style-name="Source_20_Text"><text:span text:style-name="T10"><text:s text:c="4"/>ano: 2024,</text:span></text:span></text:p>
              <text:p text:style-name="P70"><text:span text:style-name="Source_20_Text"><text:span text:style-name="T10"><text:s text:c="4"/>ligado: true</text:span></text:span></text:p>
              <text:p text:style-name="P70"><text:soft-page-break/><text:span text:style-name="Source_20_Text"><text:span text:style-name="T10">};</text:span></text:span></text:p>
            </text:list-header>
          </text:list>
        </text:list-item>
      </text:list>
      <text:h text:style-name="Heading_20_3" text:outline-level="3"><text:bookmark-start text:name="__RefHeading___Toc4743_1212987772"/><text:span text:style-name="T1">9. </text:span><text:span text:style-name="Source_20_Text"><text:span text:style-name="T1">Array</text:span></text:span><text:span text:style-name="T1"> (Lista)</text:span><text:bookmark-end text:name="__RefHeading___Toc4743_1212987772"/></text:h>
      <text:p text:style-name="P8">O Array é, na verdade, um tipo especial de Objeto, mas que funciona como uma lista ordenada.</text:p>
      <text:list text:style-name="L25">
        <text:list-item>
          <text:p text:style-name="P71"><text:span text:style-name="T1">O que é: Uma caixa onde você coloca vários dados em fila, separados por vírgulas e envolvidos por colchetes </text:span><text:span text:style-name="Source_20_Text"><text:span text:style-name="T1">[ ]</text:span></text:span><text:span text:style-name="T1">.</text:span></text:p>
        </text:list-item>
        <text:list-item>
          <text:p text:style-name="P72">Exemplo:</text:p>
          <text:list>
            <text:list-header>
              <text:p text:style-name="P73">JavaScript</text:p>
              <text:p text:style-name="P74"><text:span text:style-name="Source_20_Text"><text:span text:style-name="T10">const frutas = ["Maçã", "Banana", "Morango"];</text:span></text:span></text:p>
              <text:p text:style-name="P74"><text:span text:style-name="Source_20_Text"><text:span text:style-name="T10">const numerosSorteados = [12, 45, 23, 8];</text:span></text:span></text:p>
            </text:list-header>
          </text:list>
        </text:list-item>
      </text:list>
      <text:h text:style-name="Heading_20_3" text:outline-level="3"><text:bookmark-start text:name="__RefHeading___Toc4745_1212987772"/><text:span text:style-name="T1">10. </text:span><text:span text:style-name="Source_20_Text"><text:span text:style-name="T1">function</text:span></text:span><text:span text:style-name="T1"> (Função)</text:span><text:bookmark-end text:name="__RefHeading___Toc4745_1212987772"/></text:h>
      <text:p text:style-name="P8">No JavaScript, as funções também são tratadas como um tipo de dado. Elas são blocos de código que realizam uma ação quando são chamadas.</text:p>
      <text:list text:style-name="L26">
        <text:list-item>
          <text:p text:style-name="P75">O que é: Um "verbo" ou uma "máquina" que processa dados e te devolve uma resposta. Você pode guardá-las dentro de variáveis se quiser.</text:p>
        </text:list-item>
        <text:list-item>
          <text:p text:style-name="P75">Exemplo:</text:p>
          <text:list>
            <text:list-header>
              <text:p text:style-name="P76">JavaScript</text:p>
              <text:p text:style-name="P77"><text:span text:style-name="Source_20_Text"><text:span text:style-name="T10">function saudar() {</text:span></text:span></text:p>
              <text:p text:style-name="P77"><text:span text:style-name="Source_20_Text"><text:span text:style-name="T10"><text:s text:c="4"/>return "Olá, mundo!";</text:span></text:span></text:p>
              <text:p text:style-name="P77"><text:span text:style-name="Source_20_Text"><text:span text:style-name="T10">}</text:span></text:span></text:p>
            </text:list-header>
          </text:list>
        </text:list-item>
      </text:list>
      <text:p text:style-name="Preformatted_20_Text"><text:span text:style-name="Source_20_Text"><text:span text:style-name="T12"/></text:span></text:p>
      <text:h text:style-name="P78" text:outline-level="2"><text:bookmark-start text:name="__RefHeading___Toc4747_1212987772"/>Conversão de Dados (Type Casting / Coercion)<text:bookmark-end text:name="__RefHeading___Toc4747_1212987772"/></text:h>
      <text:p text:style-name="P8">Às vezes, você recebe um dado em um formato (como um texto vindo de um formulário), mas precisa dele em outro formato (como um número para fazer uma conta). No JavaScript, existem duas formas de conversão:</text:p>
      <text:h text:style-name="P79" text:outline-level="3"><text:bookmark-start text:name="__RefHeading___Toc4749_1212987772"/>Conversão Explícita (Você força a mudança)<text:bookmark-end text:name="__RefHeading___Toc4749_1212987772"/></text:h>
      <text:p text:style-name="P8">É quando você usa comandos da linguagem para transformar o dado conscientemente.</text:p>
      <text:list text:style-name="L27">
        <text:list-item>
          <text:p text:style-name="P80"><text:span text:style-name="T1">Para Número: Usa-se </text:span><text:span text:style-name="Source_20_Text"><text:span text:style-name="T1">Number()</text:span></text:span><text:span text:style-name="T1">, </text:span><text:span text:style-name="Source_20_Text"><text:span text:style-name="T1">parseInt()</text:span></text:span><text:span text:style-name="T1"> (para inteiros) ou </text:span><text:span text:style-name="Source_20_Text"><text:span text:style-name="T1">parseFloat()</text:span></text:span><text:span text:style-name="T1"> (para decimais).</text:span></text:p>
        </text:list-item>
        <text:list-item>
          <text:p text:style-name="P80"><text:span text:style-name="T1">Para Texto: Usa-se </text:span><text:span text:style-name="Source_20_Text"><text:span text:style-name="T1">String()</text:span></text:span><text:span text:style-name="T1"> ou o método </text:span><text:span text:style-name="Source_20_Text"><text:span text:style-name="T1">.toString()</text:span></text:span><text:span text:style-name="T1">.</text:span></text:p>
        </text:list-item>
      </text:list>
      <text:p text:style-name="P34">JavaScript</text:p>
      <text:p text:style-name="P27"><text:span text:style-name="Source_20_Text"><text:span text:style-name="T10">const textoIdade = "25";</text:span></text:span></text:p>
      <text:p text:style-name="P27"><text:span text:style-name="Source_20_Text"><text:span text:style-name="T10">const idadeNumero = Number(textoIdade); // Transforma em número real: 25</text:span></text:span></text:p>
      <text:p text:style-name="P81"/>
      <text:p text:style-name="P27"><text:span text:style-name="Source_20_Text"><text:span text:style-name="T10">const numero = 100;</text:span></text:span></text:p>
      <text:p text:style-name="P27"><text:span text:style-name="Source_20_Text"><text:span text:style-name="T10">const numeroTexto = String(numero); // Transforma em texto: "100"</text:span></text:span></text:p>
      <text:h text:style-name="P79" text:outline-level="3"><text:bookmark-start text:name="__RefHeading___Toc4751_1212987772"/><text:soft-page-break/>Conversão Implícita (O JavaScript tenta adivinhar)<text:bookmark-end text:name="__RefHeading___Toc4751_1212987772"/></text:h>
      <text:p text:style-name="P8">O JavaScript é uma linguagem "compreensiva" até demais. Se você tentar somar um número com um texto, em vez de dar erro, ele converte o número em texto e junta os dois.</text:p>
      <text:p text:style-name="P34">JavaScript</text:p>
      <text:p text:style-name="P27"><text:span text:style-name="Source_20_Text"><text:span text:style-name="T10">const resultado = "5" + 2; </text:span></text:span></text:p>
      <text:p text:style-name="P27"><text:span text:style-name="Source_20_Text"><text:span text:style-name="T10">console.log(resultado); // Vai exibir: "52" (Texto), e não 7!</text:span></text:span></text:p>
      <text:h text:style-name="P78" text:outline-level="2"><text:bookmark-start text:name="__RefHeading___Toc4753_1212987772"/>Manipulação de Dados<text:bookmark-end text:name="__RefHeading___Toc4753_1212987772"/></text:h>
      <text:p text:style-name="P8">Manipular dados significa alterar o seu estado ou extrair informações úteis deles. Cada tipo de dado tem seus próprios "superpoderes" (métodos).</text:p>
      <text:h text:style-name="P79" text:outline-level="3"><text:bookmark-start text:name="__RefHeading___Toc4755_1212987772"/><text:span text:style-name="T11">1. </text:span>Manipulando Strings (Textos)<text:bookmark-end text:name="__RefHeading___Toc4755_1212987772"/></text:h>
      <text:list text:style-name="L28">
        <text:list-item>
          <text:p text:style-name="P82"><text:span text:style-name="T1">Descobrir o tamanho (</text:span><text:span text:style-name="Source_20_Text"><text:span text:style-name="T1">.length</text:span></text:span><text:span text:style-name="T1">): Conta quantos caracteres o texto tem.</text:span></text:p>
        </text:list-item>
        <text:list-item>
          <text:p text:style-name="P82"><text:span text:style-name="T1">Mudar a caixa (</text:span><text:span text:style-name="Source_20_Text"><text:span text:style-name="T1">.toUpperCase()</text:span></text:span><text:span text:style-name="T1"> / </text:span><text:span text:style-name="Source_20_Text"><text:span text:style-name="T1">.toLowerCase()</text:span></text:span><text:span text:style-name="T1">): Deixar tudo em maiúsculo ou minúsculo.</text:span></text:p>
        </text:list-item>
        <text:list-item>
          <text:p text:style-name="P82"><text:span text:style-name="T1">Cortar pedaços (</text:span><text:span text:style-name="Source_20_Text"><text:span text:style-name="T1">.slice()</text:span></text:span><text:span text:style-name="T1">): Extrair apenas uma parte do texto.</text:span></text:p>
        </text:list-item>
      </text:list>
      <text:p text:style-name="P34">JavaScript</text:p>
      <text:p text:style-name="P27"><text:bookmark-start text:name="__DdeLink__2437_2084900037"/><text:span text:style-name="Source_20_Text"><text:span text:style-name="T10">const frase = "JavaScript é incrível!";</text:span></text:span><text:bookmark-end text:name="__DdeLink__2437_2084900037"/></text:p>
      <text:p text:style-name="P81"/>
      <text:p text:style-name="P27"><text:bookmark-start text:name="__DdeLink__2439_2084900037"/><text:span text:style-name="Source_20_Text"><text:span text:style-name="T10">console.log(frase.length); </text:span></text:span><text:bookmark-end text:name="__DdeLink__2439_2084900037"/><text:span text:style-name="Source_20_Text"><text:span text:style-name="T10"><text:s text:c="7"/>// 22 (contando os espaços)</text:span></text:span></text:p>
      <text:p text:style-name="P27"><text:bookmark-start text:name="__DdeLink__2442_2084900037"/><text:bookmark-start text:name="__DdeLink__2435_2084900037"/><text:span text:style-name="Source_20_Text"><text:span text:style-name="T10">console.log(frase.toUpperCase());</text:span></text:span><text:bookmark-end text:name="__DdeLink__2442_2084900037"/><text:bookmark-end text:name="__DdeLink__2435_2084900037"/><text:span text:style-name="Source_20_Text"><text:span text:style-name="T10"> // "JAVASCRIPT É INCRÍVEL!"</text:span></text:span></text:p>
      <text:h text:style-name="Heading_20_3" text:outline-level="3"><text:bookmark-start text:name="__RefHeading___Toc4757_1212987772"/><text:span text:style-name="T13">2. </text:span><text:span text:style-name="T1">Manipulando Números (Objeto </text:span><text:span text:style-name="Source_20_Text"><text:span text:style-name="T1">Math</text:span></text:span><text:span text:style-name="T1">)</text:span><text:bookmark-end text:name="__RefHeading___Toc4757_1212987772"/></text:h>
      <text:p text:style-name="Text_20_body"><text:span text:style-name="T1">Para contas complexas ou ajustes, usamos o objeto nativo </text:span><text:span text:style-name="Source_20_Text"><text:span text:style-name="T1">Math</text:span></text:span><text:span text:style-name="T1">.</text:span></text:p>
      <text:list text:style-name="L29">
        <text:list-item>
          <text:p text:style-name="P83"><text:span text:style-name="T1">Arredondar: </text:span><text:span text:style-name="Source_20_Text"><text:span text:style-name="T1">Math.round()</text:span></text:span><text:span text:style-name="T1"> (arredonda para o mais próximo), </text:span><text:span text:style-name="Source_20_Text"><text:span text:style-name="T1">Math.ceil()</text:span></text:span><text:span text:style-name="T1"> (para cima) ou </text:span><text:span text:style-name="Source_20_Text"><text:span text:style-name="T1">Math.floor()</text:span></text:span><text:span text:style-name="T1"> (para baixo).</text:span></text:p>
        </text:list-item>
        <text:list-item>
          <text:p text:style-name="P83"><text:span text:style-name="T1">Gerar número aleatório: </text:span><text:span text:style-name="Source_20_Text"><text:span text:style-name="T1">Math.random()</text:span></text:span><text:span text:style-name="T1">.</text:span></text:p>
        </text:list-item>
      </text:list>
      <text:p text:style-name="P84">JavaScript</text:p>
      <text:p text:style-name="P21"><text:span text:style-name="Source_20_Text"><text:span text:style-name="T10">const nota = 7.6;</text:span></text:span></text:p>
      <text:p text:style-name="P21"><text:span text:style-name="Source_20_Text"><text:span text:style-name="T10">console.log(Math.round(nota)); // 8</text:span></text:span></text:p>
      <text:p text:style-name="P85"><text:span text:style-name="Source_20_Text"><text:span text:style-name="T10">console.log(Math.floor(nota)); // 7</text:span></text:span></text:p>
      <text:p text:style-name="P85"><text:span text:style-name="Source_20_Text"><text:span text:style-name="T14"/></text:span></text:p>
      <text:h text:style-name="Heading_20_2" text:outline-level="2"><text:bookmark-start text:name="__RefHeading___Toc4759_1212987772"/><text:span text:style-name="Source_20_Text"><text:span text:style-name="T15">Formatação de Dados</text:span></text:span><text:bookmark-end text:name="__RefHeading___Toc4759_1212987772"/></text:h>
      <text:p text:style-name="Text_20_body"><text:span text:style-name="Source_20_Text"><text:span text:style-name="T1">Formatar é preparar o texto para que ele seja exibido de forma bonita e legível para o usuário final.</text:span></text:span></text:p>
      <text:h text:style-name="P86" text:outline-level="3"><text:bookmark-start text:name="__RefHeading___Toc4761_1212987772"/><text:span text:style-name="T16">1</text:span>. Formatação de String<text:bookmark-end text:name="__RefHeading___Toc4761_1212987772"/></text:h>
      <text:p text:style-name="Text_20_body"><text:span text:style-name="T3">O Jeito Antigo</text:span><text:span text:style-name="T1">: Concatenação. Juntar textos e variáveis usando o sinal de </text:span><text:span text:style-name="Source_20_Text"><text:span text:style-name="T1">+</text:span></text:span><text:span text:style-name="T1">. Costuma ficar confuso muito rápido.</text:span></text:p>
      <text:p text:style-name="P34">JavaScript</text:p>
      <text:p text:style-name="P27"><text:soft-page-break/><text:span text:style-name="Source_20_Text"><text:span text:style-name="T10">const nome = "Carlos";</text:span></text:span></text:p>
      <text:p text:style-name="P27"><text:span text:style-name="Source_20_Text"><text:span text:style-name="T10">const tecnologia = "React";</text:span></text:span></text:p>
      <text:p text:style-name="P27"><text:span text:style-name="Source_20_Text"><text:span text:style-name="T10">console.log("O aluno " + nome + " está estudando " + tecnologia + ".");</text:span></text:span></text:p>
      <text:p text:style-name="Text_20_body"><text:span text:style-name="T1">O </text:span><text:span text:style-name="T3">Jeito Moderno</text:span><text:span text:style-name="T1">: Template Strings (ES6). Usamos as crases (` `) e colocamos as variáveis dentro de </text:span><text:span text:style-name="Source_20_Text"><text:span text:style-name="T1">${}</text:span></text:span><text:span text:style-name="T1">. O código fica muito mais limpo e aceita quebra de linhas.</text:span></text:p>
      <text:p text:style-name="P34">JavaScript</text:p>
      <text:p text:style-name="P27"><text:span text:style-name="Source_20_Text"><text:span text:style-name="T10">const nome = "Carlos";</text:span></text:span></text:p>
      <text:p text:style-name="P27"><text:span text:style-name="Source_20_Text"><text:span text:style-name="T10">const tecnologia = "React";</text:span></text:span></text:p>
      <text:p text:style-name="P81"/>
      <text:p text:style-name="P27"><text:span text:style-name="Source_20_Text"><text:span text:style-name="T10">// Muito mais fácil de ler e manter!</text:span></text:span></text:p>
      <text:p text:style-name="P27"><text:span text:style-name="Source_20_Text"><text:span text:style-name="T10">console.log(`O aluno ${nome} está estudando ${tecnologia}.`);</text:span></text:span></text:p>
      <text:h text:style-name="P79" text:outline-level="3"><text:bookmark-start text:name="__RefHeading___Toc4763_1212987772"/><text:span text:style-name="T16">2</text:span>. Formatação de Números<text:bookmark-end text:name="__RefHeading___Toc4763_1212987772"/></text:h>
      <text:p text:style-name="Text_20_body"><text:span text:style-name="T1">Mostrar números brutos no sistema pode parecer pouco profissional (ex: </text:span><text:span text:style-name="Source_20_Text"><text:span text:style-name="T1">1250.5</text:span></text:span><text:span text:style-name="T1">). Precisamos formatá-los para a realidade do usuário, como moedas ou casas decimais fixas.</text:span></text:p>
      <text:p text:style-name="Text_20_body"><text:span text:style-name="T3">Fixar Casas Decimais (</text:span><text:span text:style-name="Source_20_Text"><text:span text:style-name="T3">.toFixed()</text:span></text:span><text:span text:style-name="T3">)</text:span></text:p>
      <text:p text:style-name="P8">Determina quantas casas vão aparecer após o ponto. Atenção: este método transforma o número em uma string.</text:p>
      <text:p text:style-name="P34">JavaScript</text:p>
      <text:p text:style-name="P27"><text:span text:style-name="Source_20_Text"><text:span text:style-name="T10">const precoBruto = 19.99321;</text:span></text:span></text:p>
      <text:p text:style-name="P27"><text:span text:style-name="Source_20_Text"><text:span text:style-name="T10">console.log(precoBruto.toFixed(2)); // "19.99"</text:span></text:span></text:p>
      <text:p text:style-name="P87"/>
      <text:p text:style-name="P88"><text:span text:style-name="T17">Formatação de Moedas e Regiões (</text:span><text:span text:style-name="Source_20_Text"><text:span text:style-name="T17">Intl.NumberFormat</text:span></text:span><text:span text:style-name="T17">)</text:span></text:p>
      <text:p text:style-name="P8">A forma mais profissional e poderosa do JavaScript para formatar moedas, porcentagens e padrões de países automaticamente.</text:p>
      <text:p text:style-name="P34">JavaScript</text:p>
      <text:p text:style-name="P27"><text:span text:style-name="Source_20_Text"><text:span text:style-name="T10">const salario = 5000.50;</text:span></text:span></text:p>
      <text:p text:style-name="P81"/>
      <text:p text:style-name="P27"><text:span text:style-name="Source_20_Text"><text:span text:style-name="T10">// Formatando para o Real Brasileiro (R$)</text:span></text:span></text:p>
      <text:p text:style-name="P27"><text:span text:style-name="Source_20_Text"><text:span text:style-name="T10">const formatadorReal = new Intl.NumberFormat('pt-BR', {</text:span></text:span></text:p>
      <text:p text:style-name="P27"><text:span text:style-name="Source_20_Text"><text:span text:style-name="T10"><text:s text:c="2"/>style: 'currency',</text:span></text:span></text:p>
      <text:p text:style-name="P27"><text:span text:style-name="Source_20_Text"><text:span text:style-name="T10"><text:s text:c="2"/>currency: 'BRL'</text:span></text:span></text:p>
      <text:p text:style-name="P27"><text:span text:style-name="Source_20_Text"><text:span text:style-name="T10">});</text:span></text:span></text:p>
      <text:p text:style-name="P89"/>
      <text:p text:style-name="Preformatted_20_Text"><text:span text:style-name="Source_20_Text"><text:span text:style-name="T1">console.log(formatadorReal.format(salario)); // Exibe: R$ 5.000,50</text:span></text:span></text:p>
      <text:p text:style-name="P8">Esses quatro pontos dão a você o controle total sobre as informações que entram e saem do seu programa.</text:p>
      <text:h text:style-name="Heading_20_2" text:outline-level="2"><text:bookmark-start text:name="__RefHeading___Toc4765_1212987772"/><text:span text:style-name="Source_20_Text"><text:span text:style-name="T15">Operadores</text:span></text:span><text:bookmark-end text:name="__RefHeading___Toc4765_1212987772"/></text:h>
      <text:h text:style-name="P79" text:outline-level="3"><text:bookmark-start text:name="__RefHeading___Toc4767_1212987772"/>1. Operadores Aritméticos<text:bookmark-end text:name="__RefHeading___Toc4767_1212987772"/></text:h>
      <text:p text:style-name="P8">São os operadores matemáticos clássicos que usamos para fazer cálculos.</text:p>
      <text:list text:style-name="L30">
        <text:list-item>
          <text:p text:style-name="P90">Os Símbolos:</text:p>
          <text:list>
            <text:list-item>
              <text:p text:style-name="P91"><text:span text:style-name="Source_20_Text"><text:span text:style-name="T1">+</text:span></text:span><text:span text:style-name="T1"> (Adição) / </text:span><text:span text:style-name="Source_20_Text"><text:span text:style-name="T1">-</text:span></text:span><text:span text:style-name="T1"> (Subtração)</text:span></text:p>
            </text:list-item>
            <text:list-item>
              <text:p text:style-name="P91"><text:span text:style-name="Source_20_Text"><text:span text:style-name="T1">*</text:span></text:span><text:span text:style-name="T1"> (Multiplicação) / </text:span><text:span text:style-name="Source_20_Text"><text:span text:style-name="T1">/</text:span></text:span><text:span text:style-name="T1"> (Divisão)</text:span></text:p>
            </text:list-item>
            <text:list-item>
              <text:p text:style-name="P91"><text:span text:style-name="Source_20_Text"><text:span text:style-name="T1">%</text:span></text:span><text:span text:style-name="T1"> (Módulo / Resto da divisão): Muito usado para descobrir se um número é par ou ímpar.</text:span></text:p>
            </text:list-item>
            <text:list-item>
              <text:p text:style-name="P90">(Exponenciação): Elevar um número a uma potência.</text:p>
            </text:list-item>
          </text:list>
        </text:list-item>
        <text:list-item>
          <text:p text:style-name="P90">Exemplo:</text:p>
          <text:list>
            <text:list-header>
              <text:p text:style-name="P92">JavaScript</text:p>
              <text:p text:style-name="P93"><text:span text:style-name="Source_20_Text"><text:span text:style-name="T10">const resto = 11 % 2; // O resultado é 1 (porque 11 dividido por 2 dá 5 e sobra 1)</text:span></text:span></text:p>
              <text:p text:style-name="P93"><text:span text:style-name="Source_20_Text"><text:span text:style-name="T10">const quadrado = 3 ** 2; // 3 elevado a 2 = 9</text:span></text:span></text:p>
            </text:list-header>
          </text:list>
        </text:list-item>
      </text:list>
      <text:h text:style-name="P79" text:outline-level="3"><text:bookmark-start text:name="__RefHeading___Toc4769_1212987772"/><text:span text:style-name="T11">2</text:span>. Operadores Relacionais (Comparação)<text:bookmark-end text:name="__RefHeading___Toc4769_1212987772"/></text:h>
      <text:p text:style-name="Text_20_body"><text:span text:style-name="T1">Servem para comparar dois valores e avaliar a relação entre eles. O resultado dessa comparação é sempre um booleano (</text:span><text:span text:style-name="Source_20_Text"><text:span text:style-name="T1">true</text:span></text:span><text:span text:style-name="T1"> ou </text:span><text:span text:style-name="Source_20_Text"><text:span text:style-name="T1">false</text:span></text:span><text:span text:style-name="T1">).</text:span></text:p>
      <text:list text:style-name="L31">
        <text:list-item>
          <text:p text:style-name="P94">Os Símbolos:</text:p>
          <text:list>
            <text:list-item>
              <text:p text:style-name="P95"><text:span text:style-name="Source_20_Text"><text:span text:style-name="T1">&gt;</text:span></text:span><text:span text:style-name="T1"> (Maior que) / </text:span><text:span text:style-name="Source_20_Text"><text:span text:style-name="T1">&lt;</text:span></text:span><text:span text:style-name="T1"> (Menor que)</text:span></text:p>
            </text:list-item>
            <text:list-item>
              <text:p text:style-name="P95"><text:span text:style-name="Source_20_Text"><text:span text:style-name="T1">&gt;=</text:span></text:span><text:span text:style-name="T1"> (Maior ou igual) / </text:span><text:span text:style-name="Source_20_Text"><text:span text:style-name="T1">&lt;=</text:span></text:span><text:span text:style-name="T1"> (Menor ou igual)</text:span></text:p>
            </text:list-item>
            <text:list-item>
              <text:p text:style-name="P95"><text:span text:style-name="Source_20_Text"><text:span text:style-name="T1">==</text:span></text:span><text:span text:style-name="T1"> (Igualdade ampla): Compara apenas o valor, ignorando o tipo de dado. (Evite usar)</text:span></text:p>
            </text:list-item>
            <text:list-item>
              <text:p text:style-name="P95"><text:soft-page-break/><text:span text:style-name="Source_20_Text"><text:span text:style-name="T1">===</text:span></text:span><text:span text:style-name="T1"> (Igualdade estrita): Compara o valor E o tipo de dado. (Sempre use este)</text:span></text:p>
            </text:list-item>
            <text:list-item>
              <text:p text:style-name="P95"><text:span text:style-name="Source_20_Text"><text:span text:style-name="T1">!==</text:span></text:span><text:span text:style-name="T1"> (Diferente estrito): Verifica se os valores ou tipos são diferentes.</text:span></text:p>
            </text:list-item>
          </text:list>
        </text:list-item>
        <text:list-item>
          <text:p text:style-name="P94">Exemplo:</text:p>
          <text:list>
            <text:list-header>
              <text:p text:style-name="P96">JavaScript</text:p>
              <text:p text:style-name="P97"><text:span text:style-name="Source_20_Text"><text:span text:style-name="T10">console.log(5 == "5"); <text:s/>// true (o JS converte o texto para número antes de comparar)</text:span></text:span></text:p>
              <text:p text:style-name="P97"><text:span text:style-name="Source_20_Text"><text:span text:style-name="T10">console.log(5 === "5"); // false (são iguais no valor, mas um é Number e o outro é String)</text:span></text:span></text:p>
            </text:list-header>
          </text:list>
        </text:list-item>
      </text:list>
      <text:h text:style-name="P79" text:outline-level="3"><text:bookmark-start text:name="__RefHeading___Toc4771_1212987772"/><text:span text:style-name="T11">3</text:span>. Operadores Lógicos<text:bookmark-end text:name="__RefHeading___Toc4771_1212987772"/></text:h>
      <text:p text:style-name="P8">Servem para combinar várias comparações relacionais e criar regras de negócio mais complexas.</text:p>
      <text:list text:style-name="L32">
        <text:list-item>
          <text:p text:style-name="P98">Os Símbolos:</text:p>
          <text:list>
            <text:list-item>
              <text:p text:style-name="P99"><text:span text:style-name="Source_20_Text"><text:span text:style-name="T1">&amp;&amp;</text:span></text:span><text:span text:style-name="T1"> (E / AND): A frase inteira só é verdade se tudo for verdade.</text:span></text:p>
            </text:list-item>
            <text:list-item>
              <text:p text:style-name="P99"><text:span text:style-name="Source_20_Text"><text:span text:style-name="T1">||</text:span></text:span><text:span text:style-name="T1"> (OU / OR): A frase inteira é verdade se pelo menos um elemento for verdade.</text:span></text:p>
            </text:list-item>
            <text:list-item>
              <text:p text:style-name="P99"><text:span text:style-name="Source_20_Text"><text:span text:style-name="T1">!</text:span></text:span><text:span text:style-name="T1"> (NÃO / NOT): Inverte o booleano. Se algo era </text:span><text:span text:style-name="Source_20_Text"><text:span text:style-name="T1">true</text:span></text:span><text:span text:style-name="T1">, vira </text:span><text:span text:style-name="Source_20_Text"><text:span text:style-name="T1">false</text:span></text:span><text:span text:style-name="T1">.</text:span></text:p>
            </text:list-item>
          </text:list>
        </text:list-item>
        <text:list-item>
          <text:p text:style-name="P98">Exemplo:</text:p>
          <text:list>
            <text:list-header>
              <text:p text:style-name="P100">JavaScript</text:p>
              <text:p text:style-name="P101"><text:span text:style-name="Source_20_Text"><text:span text:style-name="T10">const temIdade = true;</text:span></text:span></text:p>
              <text:p text:style-name="P101"><text:span text:style-name="Source_20_Text"><text:span text:style-name="T10">const temPermissaoDosPais = false;</text:span></text:span></text:p>
              <text:p text:style-name="P102"/>
              <text:p text:style-name="P101"><text:span text:style-name="Source_20_Text"><text:span text:style-name="T10">// O jovem pode viajar se tiver idade OU a permissão</text:span></text:span></text:p>
              <text:p text:style-name="P101"><text:span text:style-name="Source_20_Text"><text:span text:style-name="T10">const podeViajar = temIdade || temPermissaoDosPais; // true</text:span></text:span></text:p>
            </text:list-header>
          </text:list>
        </text:list-item>
      </text:list>
      <text:h text:style-name="P79" text:outline-level="3"><text:bookmark-start text:name="__RefHeading___Toc4773_1212987772"/><text:span text:style-name="T11">4</text:span>. Operador Ternário<text:bookmark-end text:name="__RefHeading___Toc4773_1212987772"/></text:h>
      <text:p text:style-name="Text_20_body"><text:span text:style-name="T1">O operador ternário é um atalho elegante para criar uma estrutura de decisão rápida (um </text:span><text:span text:style-name="Source_20_Text"><text:span text:style-name="T1">if / else</text:span></text:span><text:span text:style-name="T1"> de uma linha só). Ele recebe esse nome porque é o único operador do JavaScript que usa três argumentos.</text:span></text:p>
      <text:list text:style-name="L33">
        <text:list-item>
          <text:p text:style-name="P103"><text:span text:style-name="T1">A Estrutura: </text:span><text:span text:style-name="Source_20_Text"><text:span text:style-name="T1">condição ? valor_se_verdade : valor_se_falso;</text:span></text:span></text:p>
        </text:list-item>
        <text:list-item>
          <text:p text:style-name="P104">Exemplo:</text:p>
          <text:list>
            <text:list-header>
              <text:p text:style-name="P105">JavaScript</text:p>
              <text:p text:style-name="P106"><text:span text:style-name="Source_20_Text"><text:span text:style-name="T10">const idade = 20; </text:span></text:span></text:p>
              <text:p text:style-name="P106"><text:span text:style-name="Source_20_Text"><text:span text:style-name="T10">// Se idade for maior ou igual a 18, retorna "Maior de idade", senão retorna "Menor de idade"</text:span></text:span></text:p>
              <text:p text:style-name="P107"><text:span text:style-name="Source_20_Text"><text:span text:style-name="T10">const status = idade &gt;= 18 ? "Maior de idade" : "Menor de idade";</text:span></text:span></text:p>
              <text:p text:style-name="P107"><text:span text:style-name="Source_20_Text"><text:span text:style-name="T10">console.log(status); // "Maior de idade"</text:span></text:span></text:p>
            </text:list-header>
          </text:list>
        </text:list-item>
      </text:list>
      <text:p text:style-name="Text_20_body"><text:span text:style-name="T1">O operador ternário e os operadores relacionais (</text:span><text:span text:style-name="Source_20_Text"><text:span text:style-name="T1">===</text:span></text:span><text:span text:style-name="T1">) são os que os iniciantes mais demoram para se acostumar, mas são os mais usados no dia a dia.</text:span></text:p>
      <text:h text:style-name="P108" text:outline-level="3"><text:bookmark-start text:name="__RefHeading___Toc4775_1212987772"/><text:s/><text:span text:style-name="T11">5</text:span>. Operadores de Atribuição<text:bookmark-end text:name="__RefHeading___Toc4775_1212987772"/></text:h>
      <text:p text:style-name="P109"><text:span text:style-name="T1">Servem para guardar ou atualizar o valor de uma variável. O operador básico você já conhece: o sinal de igual (</text:span><text:span text:style-name="Source_20_Text"><text:span text:style-name="T1">=</text:span></text:span><text:span text:style-name="T1">). Mas existem atalhos inteligentes:</text:span></text:p>
      <text:list text:style-name="L34">
        <text:list-item>
          <text:p text:style-name="P110">Os Símbolos:</text:p>
          <text:list>
            <text:list-item>
              <text:p text:style-name="P111"><text:soft-page-break/><text:span text:style-name="Source_20_Text"><text:span text:style-name="T1">=</text:span></text:span><text:span text:style-name="T1"> (Atribuição simples)</text:span></text:p>
            </text:list-item>
            <text:list-item>
              <text:p text:style-name="P111"><text:span text:style-name="Source_20_Text"><text:span text:style-name="T1">+=</text:span></text:span><text:span text:style-name="T1"> (Soma e atribui): Pega o valor atual e soma mais um tanto.</text:span></text:p>
            </text:list-item>
            <text:list-item>
              <text:p text:style-name="P111"><text:span text:style-name="Source_20_Text"><text:span text:style-name="T1">-=</text:span></text:span><text:span text:style-name="T1"> (Subtrai e atribui)</text:span></text:p>
            </text:list-item>
            <text:list-item>
              <text:p text:style-name="P111"><text:span text:style-name="Source_20_Text"><text:span text:style-name="T1">*=</text:span></text:span><text:span text:style-name="T1"> (Multiplica e atribui)</text:span></text:p>
            </text:list-item>
          </text:list>
        </text:list-item>
        <text:list-item>
          <text:p text:style-name="P110">Exemplo:</text:p>
          <text:list>
            <text:list-header>
              <text:p text:style-name="P112">JavaScript</text:p>
              <text:p text:style-name="P113"><text:span text:style-name="Source_20_Text"><text:span text:style-name="T10">let pontos = 10;</text:span></text:span></text:p>
              <text:p text:style-name="P114"/>
              <text:p text:style-name="P113"><text:span text:style-name="Source_20_Text"><text:span text:style-name="T10">// O jeito longo: pontos = pontos + 5;</text:span></text:span></text:p>
              <text:p text:style-name="P113"><text:span text:style-name="Source_20_Text"><text:span text:style-name="T10">// O jeito inteligente (Operador de Atribuição):</text:span></text:span></text:p>
              <text:p text:style-name="P113"><text:span text:style-name="Source_20_Text"><text:span text:style-name="T10">pontos += 5; // Agora pontos vale 15</text:span></text:span></text:p>
            </text:list-header>
          </text:list>
        </text:list-item>
      </text:list>
      <text:h text:style-name="P79" text:outline-level="3"><text:bookmark-start text:name="__RefHeading___Toc4777_1212987772"/><text:span text:style-name="T11">6</text:span><text:span text:style-name="T18">. </text:span>Operadores de Atribuição Composta<text:bookmark-end text:name="__RefHeading___Toc4777_1212987772"/></text:h>
      <text:p text:style-name="Text_20_body"><text:bookmark-start text:name="__DdeLink__1786_3647141495"/><text:span text:style-name="T1">Operadores de Atribuição Composta</text:span><text:bookmark-end text:name="__DdeLink__1786_3647141495"/><text:span text:style-name="T1"> (ou simplesmente "simplificação de atribuição"). Em programação, passamos muito tempo atualizando o valor de uma variável com base no valor que ela já possuía antes. O JavaScript nos oferece esse "atalho" <text:s/>para não termos que repetir o nome da variável duas vezes. </text:span><text:span text:style-name="T19">A</text:span><text:span text:style-name="T1">ssumindo que começamos com </text:span><text:span text:style-name="Source_20_Text"><text:span text:style-name="T1">let n = 3</text:span></text:span><text:span text:style-name="T1">:</text:span></text:p>
      <text:p text:style-name="Text_20_body"><text:span text:style-name="T3">1. Adição Simplificada (</text:span><text:span text:style-name="Source_20_Text"><text:span text:style-name="T3">+=</text:span></text:span><text:span text:style-name="T3">)</text:span></text:p>
      <text:list text:style-name="L35">
        <text:list-item>
          <text:p text:style-name="P115"><text:span text:style-name="T1">Forma longa: </text:span><text:span text:style-name="Source_20_Text"><text:span text:style-name="T1">n = n + 4</text:span></text:span><text:span text:style-name="T1"> (Pega o valor atual de </text:span><text:span text:style-name="Source_20_Text"><text:span text:style-name="T1">n</text:span></text:span><text:span text:style-name="T1">, que é 3, soma 4 e guarda o resultado 7 de volta em </text:span><text:span text:style-name="Source_20_Text"><text:span text:style-name="T1">n</text:span></text:span><text:span text:style-name="T1">).</text:span></text:p>
        </text:list-item>
        <text:list-item>
          <text:p text:style-name="P115"><text:span text:style-name="T1">Forma simplificada: </text:span><text:span text:style-name="Source_20_Text"><text:span text:style-name="T1">n += 4</text:span></text:span></text:p>
        </text:list-item>
        <text:list-item>
          <text:p text:style-name="P115"><text:span text:style-name="T1">Resultado: </text:span><text:span text:style-name="Source_20_Text"><text:span text:style-name="T1">7</text:span></text:span></text:p>
        </text:list-item>
      </text:list>
      <text:p text:style-name="Text_20_body"><text:span text:style-name="T3">2. Subtração Simplificada (</text:span><text:span text:style-name="Source_20_Text"><text:span text:style-name="T3">-=</text:span></text:span><text:span text:style-name="T3">)</text:span></text:p>
      <text:list text:style-name="L36">
        <text:list-item>
          <text:p text:style-name="P116"><text:span text:style-name="T1">Forma longa: </text:span><text:span text:style-name="Source_20_Text"><text:span text:style-name="T1">n = n - 5</text:span></text:span><text:span text:style-name="T1"> (Pega o valor atual de </text:span><text:span text:style-name="Source_20_Text"><text:span text:style-name="T1">n</text:span></text:span><text:span text:style-name="T1">, subtrai 5 e guarda o resultado).</text:span></text:p>
        </text:list-item>
        <text:list-item>
          <text:p text:style-name="P116"><text:span text:style-name="T1">Forma simplificada: </text:span><text:span text:style-name="Source_20_Text"><text:span text:style-name="T1">n -= 5</text:span></text:span></text:p>
        </text:list-item>
        <text:list-item>
          <text:p text:style-name="P116"><text:span text:style-name="T1">Resultado: Se </text:span><text:span text:style-name="Source_20_Text"><text:span text:style-name="T1">n</text:span></text:span><text:span text:style-name="T1"> era 7, </text:span><text:span text:style-name="Source_20_Text"><text:span text:style-name="T1">7 - 5 = 2</text:span></text:span><text:span text:style-name="T1">.</text:span></text:p>
        </text:list-item>
      </text:list>
      <text:p text:style-name="Text_20_body"><text:span text:style-name="T3">3. Multiplicação Simplificada (</text:span><text:span text:style-name="Source_20_Text"><text:span text:style-name="T3">*=</text:span></text:span><text:span text:style-name="T3">)</text:span></text:p>
      <text:list text:style-name="L37">
        <text:list-item>
          <text:p text:style-name="P117"><text:span text:style-name="T1">Forma longa: </text:span><text:span text:style-name="Source_20_Text"><text:span text:style-name="T1">n = n * 4</text:span></text:span><text:span text:style-name="T1"> (Multiplica o valor atual por 4).</text:span></text:p>
        </text:list-item>
        <text:list-item>
          <text:p text:style-name="P117"><text:span text:style-name="T1">Forma simplificada: </text:span><text:span text:style-name="Source_20_Text"><text:span text:style-name="T1">n *= 4</text:span></text:span></text:p>
        </text:list-item>
        <text:list-item>
          <text:p text:style-name="P117"><text:span text:style-name="T1">Resultado: Se </text:span><text:span text:style-name="Source_20_Text"><text:span text:style-name="T1">n</text:span></text:span><text:span text:style-name="T1"> era 2, </text:span><text:span text:style-name="Source_20_Text"><text:span text:style-name="T1">2 * 4 = 8</text:span></text:span><text:span text:style-name="T1">.</text:span></text:p>
        </text:list-item>
      </text:list>
      <text:p text:style-name="Text_20_body"><text:span text:style-name="T3">4. Divisão Simplificada (</text:span><text:span text:style-name="Source_20_Text"><text:span text:style-name="T3">/=</text:span></text:span><text:span text:style-name="T3">)</text:span></text:p>
      <text:list text:style-name="L38">
        <text:list-item>
          <text:p text:style-name="P118"><text:span text:style-name="T1">Forma longa: </text:span><text:span text:style-name="Source_20_Text"><text:span text:style-name="T1">n = n / 2</text:span></text:span><text:span text:style-name="T1"> (Divide o valor atual por 2).</text:span></text:p>
        </text:list-item>
        <text:list-item>
          <text:p text:style-name="P118"><text:span text:style-name="T1">Forma simplificada: </text:span><text:span text:style-name="Source_20_Text"><text:span text:style-name="T1">n /= 2</text:span></text:span></text:p>
        </text:list-item>
        <text:list-item>
          <text:p text:style-name="P118"><text:span text:style-name="T1">Resultado: Se </text:span><text:span text:style-name="Source_20_Text"><text:span text:style-name="T1">n</text:span></text:span><text:span text:style-name="T1"> era 8, </text:span><text:span text:style-name="Source_20_Text"><text:span text:style-name="T1">8 / 2 = 4</text:span></text:span><text:span text:style-name="T1">.</text:span></text:p>
        </text:list-item>
      </text:list>
      <text:p text:style-name="Text_20_body"><text:soft-page-break/><text:span text:style-name="T3">5. Exponenciação Simplificada (</text:span><text:span text:style-name="Source_20_Text"><text:span text:style-name="T3">=</text:span></text:span><text:span text:style-name="T3">)</text:span></text:p>
      <text:list text:style-name="L39">
        <text:list-item>
          <text:p text:style-name="P119"><text:span text:style-name="T1">Forma longa: </text:span><text:span text:style-name="Source_20_Text"><text:span text:style-name="T1">n = n 2</text:span></text:span><text:span text:style-name="T1"> (Eleva o valor de </text:span><text:span text:style-name="Source_20_Text"><text:span text:style-name="T1">n</text:span></text:span><text:span text:style-name="T1"> ao quadrado).</text:span></text:p>
        </text:list-item>
        <text:list-item>
          <text:p text:style-name="P119"><text:span text:style-name="T1">Forma simplificada: </text:span><text:span text:style-name="Source_20_Text"><text:span text:style-name="T1">n = 2</text:span></text:span></text:p>
        </text:list-item>
        <text:list-item>
          <text:p text:style-name="P119"><text:span text:style-name="T1">Resultado: Se </text:span><text:span text:style-name="Source_20_Text"><text:span text:style-name="T1">n</text:span></text:span><text:span text:style-name="T1"> era 4, </text:span><text:span text:style-name="Source_20_Text"><text:span text:style-name="T1">4 2</text:span></text:span><text:span text:style-name="T1"> (4 elevado a 2) = </text:span><text:span text:style-name="Source_20_Text"><text:span text:style-name="T1">16</text:span></text:span><text:span text:style-name="T1">.</text:span></text:p>
        </text:list-item>
      </text:list>
      <text:p text:style-name="Text_20_body"><text:span text:style-name="T3">6. Módulo Simplificado (</text:span><text:span text:style-name="Source_20_Text"><text:span text:style-name="T3">%=</text:span></text:span><text:span text:style-name="T3">)</text:span></text:p>
      <text:list text:style-name="L40">
        <text:list-item>
          <text:p text:style-name="P120"><text:span text:style-name="T1">Forma longa: </text:span><text:span text:style-name="Source_20_Text"><text:span text:style-name="T1">n = n % 5</text:span></text:span><text:span text:style-name="T1"> (Pega o resto da divisão de </text:span><text:span text:style-name="Source_20_Text"><text:span text:style-name="T1">n</text:span></text:span><text:span text:style-name="T1"> por 5).</text:span></text:p>
        </text:list-item>
        <text:list-item>
          <text:p text:style-name="P120"><text:span text:style-name="T1">Forma simplificada: </text:span><text:span text:style-name="Source_20_Text"><text:span text:style-name="T1">n %= 5</text:span></text:span></text:p>
        </text:list-item>
        <text:list-item>
          <text:p text:style-name="P120"><text:span text:style-name="T1">Resultado: Se </text:span><text:span text:style-name="Source_20_Text"><text:span text:style-name="T1">n</text:span></text:span><text:span text:style-name="T1"> era 16, ao dividir 16 por 5 dá 3 (que dá 15) e resta 1. Logo, o resultado é </text:span><text:span text:style-name="Source_20_Text"><text:span text:style-name="T1">1</text:span></text:span><text:span text:style-name="T1">.</text:span></text:p>
        </text:list-item>
      </text:list>
      <text:p text:style-name="P121">💡 Por que os programadores usam isso?</text:p>
      <text:p text:style-name="P8">No dia a dia, você verá quase todo mundo usando a versão da direita. Ela deixa o código mais limpo, mais rápido de ler e evita erros de digitação quando as variáveis possuem nomes longos, como:</text:p>
      <text:p text:style-name="P34">JavaScript</text:p>
      <text:p text:style-name="P27"><text:span text:style-name="Source_20_Text"><text:span text:style-name="T10">// Ruim / Longo</text:span></text:span></text:p>
      <text:p text:style-name="P27"><text:span text:style-name="Source_20_Text"><text:span text:style-name="T10">quantidadeItensNoCarrinho = quantidadeItensNoCarrinho + 1;</text:span></text:span></text:p>
      <text:p text:style-name="P81"/>
      <text:p text:style-name="P27"><text:span text:style-name="Source_20_Text"><text:span text:style-name="T10">// Lindo / Simplificado</text:span></text:span></text:p>
      <text:p text:style-name="P27"><text:span text:style-name="Source_20_Text"><text:span text:style-name="T10">quantidadeItensNoCarrinho += 1;</text:span></text:span></text:p>
      <text:h text:style-name="P78" text:outline-level="2"><text:bookmark-start text:name="__RefHeading___Toc4779_1212987772"/>Ordem de Precedência dos Operadores.<text:bookmark-end text:name="__RefHeading___Toc4779_1212987772"/></text:h>
      <text:p text:style-name="P8"><text:s/><text:bookmark-start text:name="__DdeLink__2043_3647141495"/>Ordem de Precedência dos Operadores.<text:bookmark-end text:name="__DdeLink__2043_3647141495"/> Assim como na matemática da escola nós aprendemos que a multiplicação deve ser feita antes da soma, o JavaScript também tem uma lista de prioridades para decidir o que ele vai calcular primeiro quando encontra uma linha de código cheia de operadores misturados.</text:p>
      <text:p text:style-name="P8">A seta branca do lado esquerdo indica a ordem de leitura do motor do JavaScript: de cima para baixo (o que está no topo tem a maior prioridade e é resolvido primeiro).</text:p>
      <text:p text:style-name="P8">Vamos entender esse fluxo de prioridades dividido em grupos:</text:p>
      <text:h text:style-name="P79" text:outline-level="3"><text:bookmark-start text:name="__RefHeading___Toc4781_1212987772"/>1º Grupo: Operadores Aritméticos (Matemática)<text:bookmark-end text:name="__RefHeading___Toc4781_1212987772"/></text:h>
      <text:p text:style-name="P8">No topo da tabela, a matemática acontece primeiro.</text:p>
      <text:list text:style-name="L41">
        <text:list-item>
          <text:p text:style-name="P122"><text:span text:style-name="Source_20_Text"><text:span text:style-name="T1">()</text:span></text:span><text:span text:style-name="T1"> Parênteses: Têm prioridade máxima absoluta sobre qualquer outra coisa. Se você quiser que uma soma seja feita antes de uma multiplicação, coloque-a entre parênteses.</text:span></text:p>
        </text:list-item>
        <text:list-item>
          <text:p text:style-name="P123">Exponenciação: É resolvida logo em seguida.</text:p>
        </text:list-item>
        <text:list-item>
          <text:p text:style-name="P122"><text:span text:style-name="Source_20_Text"><text:span text:style-name="T1">/</text:span></text:span><text:span text:style-name="T1"> , </text:span><text:span text:style-name="Source_20_Text"><text:span text:style-name="T1">*</text:span></text:span><text:span text:style-name="T1"> , </text:span><text:span text:style-name="Source_20_Text"><text:span text:style-name="T1">%</text:span></text:span><text:span text:style-name="T1">: Divisão, multiplicação e resto têm a mesma prioridade entre si (se aparecerem juntos, o JS resolve quem estiver mais à esquerda primeiro).</text:span></text:p>
        </text:list-item>
        <text:list-item>
          <text:p text:style-name="P122"><text:span text:style-name="T1">Nota: Embora não apareçam na imagem, o </text:span><text:span text:style-name="Source_20_Text"><text:span text:style-name="T1">+</text:span></text:span><text:span text:style-name="T1"> e o </text:span><text:span text:style-name="Source_20_Text"><text:span text:style-name="T1">-</text:span></text:span><text:span text:style-name="T1"> vêm logo abaixo deles.</text:span></text:p>
        </text:list-item>
      </text:list>
      <text:h text:style-name="P79" text:outline-level="3"><text:bookmark-start text:name="__RefHeading___Toc4783_1212987772"/><text:soft-page-break/>2º Grupo: Operadores Relacionais (Comparações)<text:bookmark-end text:name="__RefHeading___Toc4783_1212987772"/></text:h>
      <text:p text:style-name="P8">Depois que todas as contas matemáticas da linha foram resolvidas e viraram números limpos, o JavaScript passa para as comparações.</text:p>
      <text:list text:style-name="L42">
        <text:list-item>
          <text:p text:style-name="P124"><text:span text:style-name="Source_20_Text"><text:span text:style-name="T1">&gt;</text:span></text:span><text:span text:style-name="T1"> , </text:span><text:span text:style-name="Source_20_Text"><text:span text:style-name="T1">&lt;</text:span></text:span><text:span text:style-name="T1"> , </text:span><text:span text:style-name="Source_20_Text"><text:span text:style-name="T1">&gt;=</text:span></text:span><text:span text:style-name="T1"> , </text:span><text:span text:style-name="Source_20_Text"><text:span text:style-name="T1">&lt;=</text:span></text:span><text:span text:style-name="T1"> , </text:span><text:span text:style-name="Source_20_Text"><text:span text:style-name="T1">===</text:span></text:span><text:span text:style-name="T1"> , </text:span><text:span text:style-name="Source_20_Text"><text:span text:style-name="T1">!==</text:span></text:span><text:span text:style-name="T1">: Ele avalia se um número é maior, menor ou igual ao outro. O resultado desse grupo sempre se transforma em </text:span><text:span text:style-name="Source_20_Text"><text:span text:style-name="T1">true</text:span></text:span><text:span text:style-name="T1"> ou </text:span><text:span text:style-name="Source_20_Text"><text:span text:style-name="T1">false</text:span></text:span><text:span text:style-name="T1">.</text:span></text:p>
        </text:list-item>
      </text:list>
      <text:h text:style-name="P79" text:outline-level="3"><text:bookmark-start text:name="__RefHeading___Toc4785_1212987772"/>3º Grupo: Operadores Lógicos (Decisões)<text:bookmark-end text:name="__RefHeading___Toc4785_1212987772"/></text:h>
      <text:p text:style-name="Text_20_body"><text:span text:style-name="T1">Por último, o JavaScript pega os resultados </text:span><text:span text:style-name="Source_20_Text"><text:span text:style-name="T1">true</text:span></text:span><text:span text:style-name="T1"> ou </text:span><text:span text:style-name="Source_20_Text"><text:span text:style-name="T1">false</text:span></text:span><text:span text:style-name="T1"> das comparações e aplica as regras lógicas. Eles possuem uma ordem interna muito rígida entre si:</text:span></text:p>
      <text:list text:style-name="L43">
        <text:list-item>
          <text:p text:style-name="P125"><text:span text:style-name="Source_20_Text"><text:span text:style-name="T1">!</text:span></text:span><text:span text:style-name="T1"> (NÃO / NOT): É o primeiro a agir, invertendo o valor lógico que estiver colado nele.</text:span></text:p>
        </text:list-item>
        <text:list-item>
          <text:p text:style-name="P125"><text:span text:style-name="Source_20_Text"><text:span text:style-name="T1">&amp;&amp;</text:span></text:span><text:span text:style-name="T1"> (E / AND): É o próximo a ser resolvido.</text:span></text:p>
        </text:list-item>
        <text:list-item>
          <text:p text:style-name="P125"><text:span text:style-name="Source_20_Text"><text:span text:style-name="T1">||</text:span></text:span><text:span text:style-name="T1"> (OU / OR): É o último da fila. Tem a menor prioridade de todos.</text:span></text:p>
        </text:list-item>
      </text:list>
      <text:p text:style-name="P121">Verificando na Prática (O poder dos parênteses)</text:p>
      <text:p text:style-name="P8">Veja como a ordem de precedência muda completamente o resultado final com os mesmos elementos:</text:p>
      <text:p text:style-name="P121">Cenário A (Sem parênteses)</text:p>
      <text:p text:style-name="P126">JavaScript</text:p>
      <text:p text:style-name="P127"><text:span text:style-name="Source_20_Text"><text:span text:style-name="T10">const resultado = 5 + 10 * 2 &gt; 20 &amp;&amp; true;</text:span></text:span></text:p>
      <text:list text:style-name="L44">
        <text:list-item>
          <text:p text:style-name="P128"><text:span text:style-name="T10">Aritmética primeiro: O JS faz </text:span><text:span text:style-name="Source_20_Text"><text:span text:style-name="T10">10 * 2</text:span></text:span><text:span text:style-name="T10"> (20) e depois soma </text:span><text:span text:style-name="Source_20_Text"><text:span text:style-name="T10">5</text:span></text:span><text:span text:style-name="T10"> $\rightarrow$ </text:span><text:span text:style-name="Source_20_Text"><text:span text:style-name="T10">25</text:span></text:span><text:span text:style-name="T10">.</text:span></text:p>
        </text:list-item>
        <text:list-item>
          <text:p text:style-name="P128"><text:span text:style-name="T10">Relacional depois: Ele compara </text:span><text:span text:style-name="Source_20_Text"><text:span text:style-name="T10">25 &gt; 20</text:span></text:span><text:span text:style-name="T10"> $\rightarrow$ </text:span><text:span text:style-name="Source_20_Text"><text:span text:style-name="T10">true</text:span></text:span><text:span text:style-name="T10">.</text:span></text:p>
        </text:list-item>
        <text:list-item>
          <text:p text:style-name="P128"><text:span text:style-name="T10">Lógico por último: Ele avalia </text:span><text:span text:style-name="Source_20_Text"><text:span text:style-name="T10">true &amp;&amp; true</text:span></text:span><text:span text:style-name="T10"> $\rightarrow$ </text:span><text:span text:style-name="Source_20_Text"><text:span text:style-name="T10">true</text:span></text:span><text:span text:style-name="T10">.</text:span></text:p>
        </text:list-item>
      </text:list>
      <text:p text:style-name="P121">Cenário B (Forçando com parênteses)</text:p>
      <text:p text:style-name="P129">JavaScript</text:p>
      <text:p text:style-name="Preformatted_20_Text"><text:span text:style-name="Source_20_Text"><text:span text:style-name="T10">const resultado = (5 + 10) * 2 &gt; 40 || true;</text:span></text:span></text:p>
      <text:list text:style-name="L45">
        <text:list-item>
          <text:p text:style-name="P130"><text:span text:style-name="T10">Parênteses no topo: O JS ignora a regra da multiplicação e faz primeiro </text:span><text:span text:style-name="Source_20_Text"><text:span text:style-name="T10">5 + 10</text:span></text:span><text:span text:style-name="T10"> (15).</text:span></text:p>
        </text:list-item>
        <text:list-item>
          <text:p text:style-name="P130"><text:span text:style-name="T10">Resto da aritmética: Faz </text:span><text:span text:style-name="Source_20_Text"><text:span text:style-name="T10">15 * 2</text:span></text:span><text:span text:style-name="T10"> $\rightarrow$ </text:span><text:span text:style-name="Source_20_Text"><text:span text:style-name="T10">30</text:span></text:span><text:span text:style-name="T10">.</text:span></text:p>
        </text:list-item>
        <text:list-item>
          <text:p text:style-name="P130"><text:span text:style-name="T10">Relacional: Compara </text:span><text:span text:style-name="Source_20_Text"><text:span text:style-name="T10">30 &gt; 40</text:span></text:span><text:span text:style-name="T10"> $\rightarrow$ </text:span><text:span text:style-name="Source_20_Text"><text:span text:style-name="T10">false</text:span></text:span><text:span text:style-name="T10">.</text:span></text:p>
        </text:list-item>
        <text:list-item>
          <text:p text:style-name="P130"><text:span text:style-name="T10">Lógico por último: Avalia </text:span><text:span text:style-name="Source_20_Text"><text:span text:style-name="T10">false || true</text:span></text:span><text:span text:style-name="T10"> $\rightarrow$ </text:span><text:span text:style-name="Source_20_Text"><text:span text:style-name="T10">true</text:span></text:span><text:span text:style-name="T10">.</text:span></text:p>
        </text:list-item>
      </text:list>
      <text:h text:style-name="P131" text:outline-level="2"><text:bookmark-start text:name="__RefHeading___Toc4787_1212987772"/>DOM <text:bookmark-end text:name="__RefHeading___Toc4787_1212987772"/></text:h>
      <text:p text:style-name="P8">O DOM (Document Object Model) é o ponto de virada na jornada de qualquer pessoa que estuda JavaScript. É através dele que o JavaScript deixa de ser apenas lógica no console e passa a dar vida, cor e movimento às páginas web reais. Aqui está a estrutura completa para entender o DOM do zero:</text:p>
      <text:h text:style-name="P79" text:outline-level="3"><text:bookmark-start text:name="__RefHeading___Toc4789_1212987772"/><text:soft-page-break/>1. O que é o <text:bookmark-start text:name="__DdeLink__247_3057886858"/>DOM <text:bookmark-end text:name="__DdeLink__247_3057886858"/>(Document Object Model)?<text:bookmark-end text:name="__RefHeading___Toc4789_1212987772"/></text:h>
      <text:p text:style-name="P8">Quando você abre um site, o navegador lê o arquivo HTML e cria, na memória dele, uma representação viva e organizada daquela página. Essa estrutura é o DOM.</text:p>
      <text:list text:style-name="L46">
        <text:list-item>
          <text:p text:style-name="P132">O Conceito: O DOM transforma o seu código HTML em um "objeto" gigante que o JavaScript consegue ler, alterar, adicionar ou apagar.</text:p>
        </text:list-item>
        <text:list-item>
          <text:p text:style-name="P133"><text:span text:style-name="T1">A Árvore do DOM (DOM Tree): O DOM organiza a página como se fosse uma árvore genealógica invertida. O topo de tudo é o </text:span><text:span text:style-name="Source_20_Text"><text:span text:style-name="T1">document</text:span></text:span><text:span text:style-name="T1">. Abaixo dele vêm a "tag pai" (</text:span><text:span text:style-name="Source_20_Text"><text:span text:style-name="T1">&lt;html&gt;</text:span></text:span><text:span text:style-name="T1">), que se ramifica nos "filhos" (</text:span><text:span text:style-name="Source_20_Text"><text:span text:style-name="T1">&lt;head&gt;</text:span></text:span><text:span text:style-name="T1"> e </text:span><text:span text:style-name="Source_20_Text"><text:span text:style-name="T1">&lt;body&gt;</text:span></text:span><text:span text:style-name="T1">), que por sua vez têm seus próprios filhos (</text:span><text:span text:style-name="Source_20_Text"><text:span text:style-name="T1">&lt;h1&gt;</text:span></text:span><text:span text:style-name="T1">, </text:span><text:span text:style-name="Source_20_Text"><text:span text:style-name="T1">&lt;p&gt;</text:span></text:span><text:span text:style-name="T1">, </text:span><text:span text:style-name="Source_20_Text"><text:span text:style-name="T1">&lt;a&gt;</text:span></text:span><text:span text:style-name="T1">, </text:span><text:span text:style-name="Source_20_Text"><text:span text:style-name="T1">&lt;button&gt;</text:span></text:span><text:span text:style-name="T1">).</text:span></text:p>
        </text:list-item>
      </text:list>
      <text:h text:style-name="P79" text:outline-level="3"><text:bookmark-start text:name="__RefHeading___Toc4791_1212987772"/>2. Selecionando Elementos (Como o JS encontra as coisas)<text:bookmark-end text:name="__RefHeading___Toc4791_1212987772"/></text:h>
      <text:p text:style-name="P8">Antes de mudar qualquer elemento na página, o JavaScript precisa "encontrar" esse elemento. Antigamente existiam muitos comandos para isso, mas hoje usamos principalmente dois:</text:p>
      <text:list text:style-name="L47">
        <text:list-item>
          <text:p text:style-name="P134"><text:span text:style-name="Source_20_Text"><text:span text:style-name="T3">document.querySelector()</text:span></text:span><text:span text:style-name="T1">: É o canivete suíço. Ele encontra o primeiro elemento que corresponda ao seletor CSS que você passar (seja o nome da tag, uma classe ou um ID).</text:span></text:p>
        </text:list-item>
        <text:list-item>
          <text:p text:style-name="P134"><text:span text:style-name="Source_20_Text"><text:span text:style-name="T3">document.querySelectorAll()</text:span></text:span><text:span text:style-name="T1">: Encontra todos os elementos que batem com a descrição e os coloca em uma lista (uma espécie de array).</text:span></text:p>
        </text:list-item>
      </text:list>
      <text:p text:style-name="P34">JavaScript</text:p>
      <text:p text:style-name="P27"><text:span text:style-name="Source_20_Text"><text:span text:style-name="T10">// Selecionando pelo nome da tag</text:span></text:span></text:p>
      <text:p text:style-name="P27"><text:span text:style-name="Source_20_Text"><text:span text:style-name="T10">const titulo = document.querySelector("h1");</text:span></text:span></text:p>
      <text:p text:style-name="P27"><text:span text:style-name="Source_20_Text"><text:span text:style-name="T10"/></text:span></text:p>
      <text:p text:style-name="P27"><text:span text:style-name="Source_20_Text"><text:span text:style-name="T10">// Selecionando por uma classe (usa o ponto .)</text:span></text:span></text:p>
      <text:p text:style-name="P27"><text:span text:style-name="Source_20_Text"><text:span text:style-name="T10">const botaoSucesso = document.querySelector(".btn-enviar");</text:span></text:span></text:p>
      <text:p text:style-name="P81"/>
      <text:p text:style-name="P27"><text:span text:style-name="Source_20_Text"><text:span text:style-name="T10">// Selecionando por um ID (usa a hashtag #)</text:span></text:span></text:p>
      <text:p text:style-name="P27"><text:span text:style-name="Source_20_Text"><text:span text:style-name="T10">const inputNome = document.querySelector("#campo-nome");</text:span></text:span></text:p>
      <text:p text:style-name="Preformatted_20_Text"><text:span text:style-name="Source_20_Text"><text:span text:style-name="T20"/></text:span></text:p>
      <text:h text:style-name="P79" text:outline-level="3"><text:bookmark-start text:name="__RefHeading___Toc4793_1212987772"/>3. Manipulando Elementos (Como o JS altera a página)<text:bookmark-end text:name="__RefHeading___Toc4793_1212987772"/></text:h>
      <text:p text:style-name="P8">Depois de selecionar o elemento e guardá-lo em uma variável, você pode usar as propriedades do JavaScript para modificar a página em tempo real.</text:p>
      <text:p text:style-name="P121">Alterando Textos e Conteúdos</text:p>
      <text:list text:style-name="L48">
        <text:list-item>
          <text:p text:style-name="P135"><text:span text:style-name="Source_20_Text"><text:span text:style-name="T3">.innerText</text:span></text:span><text:span text:style-name="T3"> ou </text:span><text:span text:style-name="Source_20_Text"><text:span text:style-name="T3">.textContent</text:span></text:span><text:span text:style-name="T1">: Altera apenas o texto puro dentro do elemento.</text:span></text:p>
        </text:list-item>
        <text:list-item>
          <text:p text:style-name="P135"><text:span text:style-name="Source_20_Text"><text:span text:style-name="T3">.innerHTML</text:span></text:span><text:span text:style-name="T1">: Permite alterar o texto e ainda injetar novas tags HTML lá dentro.</text:span></text:p>
        </text:list-item>
      </text:list>
      <text:p text:style-name="P84">JavaScript</text:p>
      <text:p text:style-name="P136"><text:span text:style-name="Source_20_Text"><text:span text:style-name="T10">titulo.innerText = "Bem-vindo ao meu site interativo!";</text:span></text:span></text:p>
      <text:p text:style-name="P121">Alterando Estilos (CSS)</text:p>
      <text:p text:style-name="Text_20_body"><text:span text:style-name="T1">Você pode mudar qualquer propriedade visual usando o atributo </text:span><text:span text:style-name="Source_20_Text"><text:span text:style-name="T1">.style</text:span></text:span><text:span text:style-name="T1">.</text:span></text:p>
      <text:p text:style-name="P137">JavaScript</text:p>
      <text:p text:style-name="P27"><text:soft-page-break/><text:span text:style-name="Source_20_Text"><text:span text:style-name="T20">// Deixando o fundo do botão vermelho</text:span></text:span></text:p>
      <text:p text:style-name="P27"><text:span text:style-name="Source_20_Text"><text:span text:style-name="T20">botaoSucesso.style.backgroundColor = "red";</text:span></text:span></text:p>
      <text:p text:style-name="P27"><text:span text:style-name="Source_20_Text"><text:span text:style-name="T20">botaoSucesso.style.color = "white";</text:span></text:span></text:p>
      <text:p text:style-name="P121">Manipulando Classes (A melhor prática)</text:p>
      <text:p text:style-name="Text_20_body"><text:span text:style-name="T1">Em vez de mudar o CSS linha por linha no JavaScript, o ideal é criar uma classe no CSS e apenas "ligar ou desligar" essa classe usando o </text:span><text:span text:style-name="Source_20_Text"><text:span text:style-name="T1">.classList</text:span></text:span><text:span text:style-name="T1">.</text:span></text:p>
      <text:p text:style-name="P137">JavaScript</text:p>
      <text:p text:style-name="P27"><text:span text:style-name="Source_20_Text"><text:span text:style-name="T20">titulo.classList.add("destaque"); <text:s text:c="3"/>// Adiciona a classe</text:span></text:span></text:p>
      <text:p text:style-name="P27"><text:span text:style-name="Source_20_Text"><text:span text:style-name="T20">titulo.classList.remove("escondido"); // Remove a classe</text:span></text:span></text:p>
      <text:p text:style-name="P27"><text:span text:style-name="Source_20_Text"><text:span text:style-name="T20">titulo.classList.toggle("modo-escuro"); // Se tiver a classe remove, se não tiver adiciona!</text:span></text:span></text:p>
      <text:h text:style-name="P79" text:outline-level="3"><text:bookmark-start text:name="__RefHeading___Toc4795_1212987772"/>4. Eventos (Como o JS reage ao Usuário)<text:bookmark-end text:name="__RefHeading___Toc4795_1212987772"/></text:h>
      <text:p text:style-name="P8">Os eventos são as ações que acontecem no navegador: um clique, um movimento de mouse, o pressionar de uma tecla ou o envio de um formulário. O JavaScript fica "escutando" esses eventos para disparar um bloco de código (função) quando eles acontecem.</text:p>
      <text:p text:style-name="Text_20_body"><text:span text:style-name="T1">Usamos o método </text:span><text:span text:style-name="Source_20_Text"><text:span text:style-name="T3">addEventListener()</text:span></text:span><text:span text:style-name="T1">, que precisa de dois argumentos: o nome do evento que ele deve ouvir e o que ele deve fazer quando o evento acontecer.</text:span></text:p>
      <text:p text:style-name="P137">JavaScript</text:p>
      <text:p text:style-name="P27"><text:span text:style-name="Source_20_Text"><text:span text:style-name="T20">const botao = document.querySelector("#meu-botao");</text:span></text:span></text:p>
      <text:p text:style-name="P138"/>
      <text:p text:style-name="P27"><text:span text:style-name="Source_20_Text"><text:span text:style-name="T20">// Criando a função de ação</text:span></text:span></text:p>
      <text:p text:style-name="P27"><text:span text:style-name="Source_20_Text"><text:span text:style-name="T20">function darBoasVindas() {</text:span></text:span></text:p>
      <text:p text:style-name="P27"><text:span text:style-name="Source_20_Text"><text:span text:style-name="T20"><text:s text:c="4"/>alert("Você clicou no botão! Parabéns!");</text:span></text:span></text:p>
      <text:p text:style-name="P27"><text:span text:style-name="Source_20_Text"><text:span text:style-name="T20">}</text:span></text:span></text:p>
      <text:p text:style-name="P138"/>
      <text:p text:style-name="P27"><text:span text:style-name="Source_20_Text"><text:span text:style-name="T20">// Dizendo ao botão para escutar o "click" e rodar a função</text:span></text:span></text:p>
      <text:p text:style-name="P27"><text:span text:style-name="Source_20_Text"><text:span text:style-name="T20">botao.addEventListener("click", darBoasVindas);</text:span></text:span></text:p>
      <text:h text:style-name="P79" text:outline-level="3"><text:bookmark-start text:name="__RefHeading___Toc4797_1212987772"/>🚀 Resumo do Fluxo do DOM<text:bookmark-end text:name="__RefHeading___Toc4797_1212987772"/></text:h>
      <text:p text:style-name="P8">Toda e qualquer interatividade que você vê na internet hoje segue este mesmo ciclo de 3 passos:</text:p>
      <text:list text:style-name="L49">
        <text:list-item>
          <text:p text:style-name="P139">Selecionar: O JS encontra o elemento (ex: o botão do carrinho de compras).</text:p>
        </text:list-item>
        <text:list-item>
          <text:p text:style-name="P139">Escutar: O JS espera a ação do usuário (ex: o clique no botão).</text:p>
        </text:list-item>
        <text:list-item>
          <text:p text:style-name="P139">Executar: O JS roda uma função que altera a página (ex: adiciona "+1" no ícone do carrinho).</text:p>
        </text:list-item>
      </text:list>
      <text:h text:style-name="P78" text:outline-level="2"><text:bookmark-start text:name="__RefHeading___Toc4799_1212987772"/>Arvore DOM<text:bookmark-end text:name="__RefHeading___Toc4799_1212987772"/></text:h>
      <text:p text:style-name="P8">Para entender a Árvore DOM (DOM Tree), imagine que o navegador é um tradutor. Ele pega o arquivo de texto bruto (o seu código HTML) e o transforma em um grande mapa ramificado cheio de conexões.</text:p>
      <text:p text:style-name="P8">Esse mapa tem o formato de uma árvore genealógica invertida, onde tudo nasce de uma única raiz e vai se dividindo em galhos (ramos) e folhas. Cada elemento, texto ou atributo do seu HTML se transforma em um Nó (Node) dentro dessa árvore. Veja como o navegador organiza essa hierarquia:</text:p>
      <text:h text:style-name="Heading_20_3" text:outline-level="3"><text:bookmark-start text:name="__RefHeading___Toc4801_1212987772"/><text:soft-page-break/><text:span text:style-name="T1"><text:tab/>1. A Raiz (</text:span><text:span text:style-name="Source_20_Text"><text:span text:style-name="T1">document</text:span></text:span><text:span text:style-name="T1">)</text:span><text:bookmark-end text:name="__RefHeading___Toc4801_1212987772"/></text:h>
      <text:p text:style-name="Text_20_body"><text:span text:style-name="T1">É a base de tudo. O objeto </text:span><text:span text:style-name="Source_20_Text"><text:span text:style-name="T3">document</text:span></text:span><text:span text:style-name="T3"> </text:span><text:span text:style-name="T1">é o ponto de partida para qualquer coisa que você queira fazer no JavaScript. Se você quer tocar em um botão, você tem que pedir licença ao </text:span><text:span text:style-name="Source_20_Text"><text:span text:style-name="T1">document</text:span></text:span><text:span text:style-name="T1"> primeiro.</text:span></text:p>
      <text:h text:style-name="Heading_20_3" text:outline-level="3"><text:bookmark-start text:name="__RefHeading___Toc4803_1212987772"/><text:span text:style-name="T1"><text:tab/>2. O Elemento Raiz (</text:span><text:span text:style-name="Source_20_Text"><text:span text:style-name="T1">&lt;html&gt;</text:span></text:span><text:span text:style-name="T1">)</text:span><text:bookmark-end text:name="__RefHeading___Toc4803_1212987772"/></text:h>
      <text:p text:style-name="P8">É o primeiro galho real da árvore. Ele engloba absolutamente tudo o que existe na sua página.</text:p>
      <text:h text:style-name="P79" text:outline-level="3"><text:bookmark-start text:name="__RefHeading___Toc4805_1212987772"/><text:tab/>3. Os Elementos Pais (Parents)<text:bookmark-end text:name="__RefHeading___Toc4805_1212987772"/></text:h>
      <text:p text:style-name="Text_20_body"><text:span text:style-name="T1">São as tags que possuem outras tags dentro delas. No nível principal, o </text:span><text:span text:style-name="Source_20_Text"><text:span text:style-name="T1">&lt;html&gt;</text:span></text:span><text:span text:style-name="T1"> se divide em dois filhos grandes:</text:span></text:p>
      <text:list text:style-name="L50">
        <text:list-item>
          <text:p text:style-name="P140"><text:span text:style-name="Source_20_Text"><text:span text:style-name="T1">&lt;head&gt;</text:span></text:span><text:span text:style-name="T1"> (informações de bastidores, como o título da aba).</text:span></text:p>
        </text:list-item>
        <text:list-item>
          <text:p text:style-name="P140"><text:span text:style-name="Source_20_Text"><text:span text:style-name="T1">&lt;body&gt;</text:span></text:span><text:span text:style-name="T1"> (tudo o que o usuário realmente vê na tela).</text:span></text:p>
        </text:list-item>
      </text:list>
      <text:h text:style-name="P79" text:outline-level="3"><text:bookmark-start text:name="__RefHeading___Toc4807_1212987772"/><text:tab/>4. Os Elementos Filhos (Children) e Irmãos (Siblings)<text:bookmark-end text:name="__RefHeading___Toc4807_1212987772"/></text:h>
      <text:p text:style-name="Text_20_body"><text:span text:style-name="T1">As tags dentro do </text:span><text:span text:style-name="Source_20_Text"><text:span text:style-name="T1">&lt;body&gt;</text:span></text:span><text:span text:style-name="T1"> continuam se ramificando.</text:span></text:p>
      <text:list text:style-name="L51">
        <text:list-item>
          <text:p text:style-name="P141"><text:span text:style-name="T1">Se você tem uma tag </text:span><text:span text:style-name="Source_20_Text"><text:span text:style-name="T1">&lt;div&gt;</text:span></text:span><text:span text:style-name="T1"> e dentro dela um </text:span><text:span text:style-name="Source_20_Text"><text:span text:style-name="T1">&lt;h1&gt;</text:span></text:span><text:span text:style-name="T1"> e um </text:span><text:span text:style-name="Source_20_Text"><text:span text:style-name="T1">&lt;p&gt;</text:span></text:span><text:span text:style-name="T1">, a </text:span><text:span text:style-name="Source_20_Text"><text:span text:style-name="T1">&lt;div&gt;</text:span></text:span><text:span text:style-name="T1"> é a mãe/pai, enquanto o </text:span><text:span text:style-name="Source_20_Text"><text:span text:style-name="T1">&lt;h1&gt;</text:span></text:span><text:span text:style-name="T1"> e o </text:span><text:span text:style-name="Source_20_Text"><text:span text:style-name="T1">&lt;p&gt;</text:span></text:span><text:span text:style-name="T1"> são filhos entre si e irmãos um do outro.</text:span></text:p>
        </text:list-item>
      </text:list>
      <text:h text:style-name="P78" text:outline-level="2"><text:bookmark-start text:name="__RefHeading___Toc4809_1212987772"/>Como o HTML se transforma em Árvore (Na Prática)<text:bookmark-end text:name="__RefHeading___Toc4809_1212987772"/></text:h>
      <text:p text:style-name="P8">Se você escrever este código HTML simples:</text:p>
      <text:p text:style-name="P142">HTML</text:p>
      <text:p text:style-name="Preformatted_20_Text"><text:span text:style-name="Source_20_Text"><text:span text:style-name="T21">&lt;!DOCTYPE html&gt;</text:span></text:span></text:p>
      <text:p text:style-name="Preformatted_20_Text"><text:span text:style-name="Source_20_Text"><text:span text:style-name="T21">&lt;html&gt;</text:span></text:span></text:p>
      <text:p text:style-name="Preformatted_20_Text"><text:span text:style-name="Source_20_Text"><text:span text:style-name="T21"><text:s text:c="2"/>&lt;head&gt;</text:span></text:span></text:p>
      <text:p text:style-name="Preformatted_20_Text"><text:span text:style-name="Source_20_Text"><text:span text:style-name="T21"><text:s text:c="4"/>&lt;title&gt;Meu Site&lt;/title&gt;</text:span></text:span></text:p>
      <text:p text:style-name="Preformatted_20_Text"><text:span text:style-name="Source_20_Text"><text:span text:style-name="T21"><text:s text:c="2"/>&lt;/head&gt;</text:span></text:span></text:p>
      <text:p text:style-name="Preformatted_20_Text"><text:span text:style-name="Source_20_Text"><text:span text:style-name="T21"><text:s text:c="2"/>&lt;body&gt;</text:span></text:span></text:p>
      <text:p text:style-name="Preformatted_20_Text"><text:span text:style-name="Source_20_Text"><text:span text:style-name="T21"><text:s text:c="4"/>&lt;h1&gt;Olá Mundo!&lt;/h1&gt;</text:span></text:span></text:p>
      <text:p text:style-name="Preformatted_20_Text"><text:span text:style-name="Source_20_Text"><text:span text:style-name="T21"><text:s text:c="4"/>&lt;p&gt;Este é um parágrafo.&lt;/p&gt;</text:span></text:span></text:p>
      <text:p text:style-name="Preformatted_20_Text"><text:span text:style-name="Source_20_Text"><text:span text:style-name="T21"><text:s text:c="2"/>&lt;/body&gt;</text:span></text:span></text:p>
      <text:p text:style-name="Preformatted_20_Text"><text:span text:style-name="Source_20_Text"><text:span text:style-name="T21">&lt;/html&gt;</text:span></text:span></text:p>
      <text:p text:style-name="P142">O navegador vai construir a seguinte árvore lógica na memória:</text:p>
      <text:list text:style-name="L52">
        <text:list-item>
          <text:p text:style-name="P143">document</text:p>
          <text:list>
            <text:list-item>
              <text:p text:style-name="P144"><text:span text:style-name="Source_20_Text"><text:span text:style-name="T21">&lt;html&gt;</text:span></text:span></text:p>
              <text:list>
                <text:list-item>
                  <text:p text:style-name="P144"><text:span text:style-name="Source_20_Text"><text:span text:style-name="T21">&lt;head&gt;</text:span></text:span></text:p>
                  <text:list>
                    <text:list-item>
                      <text:p text:style-name="P144"><text:span text:style-name="Source_20_Text"><text:span text:style-name="T21">&lt;title&gt;</text:span></text:span></text:p>
                      <text:list>
                        <text:list-item>
                          <text:p text:style-name="P143">Texto: "Meu Site"</text:p>
                        </text:list-item>
                      </text:list>
                    </text:list-item>
                  </text:list>
                </text:list-item>
                <text:list-item>
                  <text:p text:style-name="P144"><text:span text:style-name="Source_20_Text"><text:span text:style-name="T21">&lt;body&gt;</text:span></text:span></text:p>
                  <text:list>
                    <text:list-item>
                      <text:p text:style-name="P144"><text:soft-page-break/><text:span text:style-name="Source_20_Text"><text:span text:style-name="T21">&lt;h1&gt;</text:span></text:span></text:p>
                      <text:list>
                        <text:list-item>
                          <text:p text:style-name="P143">Texto: "Olá Mundo!"</text:p>
                        </text:list-item>
                      </text:list>
                    </text:list-item>
                    <text:list-item>
                      <text:p text:style-name="P144"><text:span text:style-name="Source_20_Text"><text:span text:style-name="T21">&lt;p&gt;</text:span></text:span></text:p>
                      <text:list>
                        <text:list-item>
                          <text:p text:style-name="P143">Texto: "Este é um parágrafo."</text:p>
                        </text:list-item>
                      </text:list>
                    </text:list-item>
                  </text:list>
                </text:list-item>
              </text:list>
            </text:list-item>
          </text:list>
        </text:list-item>
      </text:list>
      <text:p text:style-name="P121">Por que essa estrutura é tão importante?</text:p>
      <text:p text:style-name="Text_20_body"><text:span text:style-name="T1">O JavaScript só consegue navegar pela sua página porque o DOM é uma árvore organizada. Isso permite que você use a lógica de "andar pelos galhos" usando código. Por exemplo, você pode dizer ao JavaScript: "Ache o elemento </text:span><text:span text:style-name="Source_20_Text"><text:span text:style-name="T1">&lt;body&gt;</text:span></text:span><text:span text:style-name="T1">, pegue o primeiro filho dele (que é o </text:span><text:span text:style-name="Source_20_Text"><text:span text:style-name="T1">&lt;h1&gt;</text:span></text:span><text:span text:style-name="T1">) e mude a cor dele para azul."</text:span></text:p>
      <text:h text:style-name="P145" text:outline-level="2"><text:bookmark-start text:name="__RefHeading___Toc3287_2888328453"/>Tratamento de Eventos no DOM: Guia Completo de Engenharia Front-End<text:bookmark-end text:name="__RefHeading___Toc3287_2888328453"/></text:h>
      <text:h text:style-name="P146" text:outline-level="3"><text:bookmark-start text:name="__RefHeading___Toc4811_1212987772"/>1. O que é um Evento DOM?<text:bookmark-end text:name="__RefHeading___Toc4811_1212987772"/></text:h>
      <text:p text:style-name="P8">No ecossistema da Web, um <text:span text:style-name="T22">Evento</text:span> é um sinal emitido pelo navegador para notificar a sua aplicação de que algo relevante aconteceu. Essas interações podem ser disparadas diretamente pelo usuário (como cliques e digitação) ou pelo próprio ciclo de vida do navegador (como o término do carregamento de uma página ou falhas de rede).</text:p>
      <text:p text:style-name="P8">O DOM funciona em um modelo assíncrono baseado no padrão de arquitetura <text:span text:style-name="T22">Observer (Publish-Subscribe)</text:span>: o navegador publica o evento, e o seu código Javascript se inscreve para "escutar" e reagir a esse disparo através de funções chamadas <text:span text:style-name="T22">Event Listeners</text:span> (ou <text:span text:style-name="T23">Event Handlers</text:span>).</text:p>
      <text:h text:style-name="P146" text:outline-level="3"><text:bookmark-start text:name="__RefHeading___Toc4813_1212987772"/>2. Métodos de Vinculação (Como Escutar Eventos)<text:bookmark-end text:name="__RefHeading___Toc4813_1212987772"/></text:h>
      <text:p text:style-name="P8">A evolução do desenvolvimento web gerou três maneiras de conectar um evento ao código Javascript. Compreender a diferença entre elas é crucial para a manutenção de código limpo.</text:p>
      <text:p text:style-name="P121">A. Atributos Inline (Má Prática / Legado)</text:p>
      <text:p text:style-name="P8">O código Javascript é injetado diretamente dentro da tag HTML.</text:p>
      <text:list text:style-name="L53">
        <text:list-item>
          <text:p text:style-name="P147"><text:span text:style-name="T22">Desvantagem:</text:span> Quebra o princípio de separação de conceitos (HTML para estrutura, JS para comportamento), polui o código e dificulta testes automatizados.</text:p>
        </text:list-item>
      </text:list>
      <text:p text:style-name="P148">HTML</text:p>
      <text:p text:style-name="P149"><text:span text:style-name="Source_20_Text"><text:span text:style-name="T21">&lt;button onclick="alert('Clicou!')"&gt;Enviar&lt;/button&gt;</text:span></text:span></text:p>
      <text:p text:style-name="P121">B. Propriedades do Elemento (DOM Level 0)</text:p>
      <text:p text:style-name="P8">O evento é atribuído como uma propriedade do objeto gerado pelo DOM.</text:p>
      <text:list text:style-name="L54">
        <text:list-item>
          <text:p text:style-name="P150"><text:span text:style-name="T22">Limitação:</text:span> Você só pode atribuir <text:span text:style-name="T22">uma única função</text:span> por tipo de evento. Se outra parte do script tentar assinar o mesmo evento, ela irá sobrescrever a função anterior.</text:p>
        </text:list-item>
      </text:list>
      <text:p text:style-name="P148">JavaScript</text:p>
      <text:p text:style-name="P149"><text:span text:style-name="Source_20_Text"><text:span text:style-name="T21">const botao = document.querySelector('button');</text:span></text:span></text:p>
      <text:p text:style-name="P149"><text:span text:style-name="Source_20_Text"><text:span text:style-name="T21">botao.onclick = function() { console.log("Ação 1"); };</text:span></text:span></text:p>
      <text:p text:style-name="P149"><text:span text:style-name="Source_20_Text"><text:span text:style-name="T21">botao.onclick = function() { console.log("Ação 2"); }; // Sobrescreveu a Ação 1!</text:span></text:span></text:p>
      <text:p text:style-name="Text_20_body"><text:span text:style-name="T3">C. </text:span><text:span text:style-name="Source_20_Text"><text:span text:style-name="T3">addEventListener</text:span></text:span><text:span text:style-name="T3"> (Padrão Moderno - DOM Level 2)</text:span></text:p>
      <text:p text:style-name="P8">É o método recomendado pela W3C. Ele aceita o tipo do evento, a função de callback e um objeto opcional de configurações.</text:p>
      <text:list text:style-name="L55">
        <text:list-item>
          <text:p text:style-name="P151"><text:span text:style-name="T24">Vantagens:</text:span><text:span text:style-name="T1"> Permite adicionar múltiplos ouvintes ao mesmo evento, oferece controle fino de propagação e permite a remoção limpa do ouvinte usando </text:span><text:span text:style-name="Source_20_Text"><text:span text:style-name="T1">removeEventListener</text:span></text:span><text:span text:style-name="T1">.</text:span></text:p>
        </text:list-item>
      </text:list>
      <text:p text:style-name="P148"><text:soft-page-break/>JavaScript</text:p>
      <text:p text:style-name="P149"><text:span text:style-name="Source_20_Text"><text:span text:style-name="T21">const botao = document.querySelector('button');</text:span></text:span></text:p>
      <text:p text:style-name="P152"/>
      <text:p text:style-name="P149"><text:span text:style-name="Source_20_Text"><text:span text:style-name="T21">function dispararLog() { console.log("Botão acionado!"); }</text:span></text:span></text:p>
      <text:p text:style-name="P149"><text:span text:style-name="Source_20_Text"><text:span text:style-name="T21">// Adicionando o ouvinte</text:span></text:span></text:p>
      <text:p text:style-name="P149"><text:span text:style-name="Source_20_Text"><text:span text:style-name="T21">botao.addEventListener('click', dispararLog);</text:span></text:span></text:p>
      <text:p text:style-name="P149"><text:span text:style-name="Source_20_Text"><text:span text:style-name="T21">// Removendo quando não for mais necessário (evita vazamento de memória)</text:span></text:span></text:p>
      <text:p text:style-name="P149"><text:span text:style-name="Source_20_Text"><text:span text:style-name="T21">botao.removeEventListener('click', dispararLog);</text:span></text:span></text:p>
      <text:h text:style-name="P79" text:outline-level="3"><text:bookmark-start text:name="__RefHeading___Toc4815_1212987772"/>3. O Fluxo de Propriação: Event Bubbling e Capturing<text:bookmark-end text:name="__RefHeading___Toc4815_1212987772"/></text:h>
      <text:p text:style-name="P8">Quando um evento acontece em um elemento do DOM, ele não afeta apenas aquele elemento isolado. Ele viaja por toda a árvore de elementos. Esse comportamento segue um fluxo oficial dividido em <text:span text:style-name="T22">3 fases essenciais</text:span>:</text:p>
      <text:p text:style-name="P121">As Três Fases:</text:p>
      <text:list text:style-name="L56">
        <text:list-item>
          <text:p text:style-name="P153"><text:span text:style-name="T24">Fase de Captura (</text:span><text:span text:style-name="Source_20_Text"><text:span text:style-name="T24">Capture Phase</text:span></text:span><text:span text:style-name="T24">):</text:span><text:span text:style-name="T1"> O evento desce a árvore do DOM, partindo do elemento raiz (</text:span><text:span text:style-name="Source_20_Text"><text:span text:style-name="T1">window</text:span></text:span><text:span text:style-name="T1">, </text:span><text:span text:style-name="Source_20_Text"><text:span text:style-name="T1">document</text:span></text:span><text:span text:style-name="T1">, </text:span><text:span text:style-name="Source_20_Text"><text:span text:style-name="T1">&lt;body&gt;</text:span></text:span><text:span text:style-name="T1">) até chegar bem perto do elemento real que sofreu a ação.</text:span></text:p>
        </text:list-item>
        <text:list-item>
          <text:p text:style-name="P153"><text:span text:style-name="T24">Fase de Alvo (</text:span><text:span text:style-name="Source_20_Text"><text:span text:style-name="T24">Target Phase</text:span></text:span><text:span text:style-name="T24">):</text:span><text:span text:style-name="T1"> O navegador detecta que chegou ao elemento exato onde a ação ocorreu (ex: o </text:span><text:span text:style-name="Source_20_Text"><text:span text:style-name="T1">&lt;a&gt;</text:span></text:span><text:span text:style-name="T1"> ou </text:span><text:span text:style-name="Source_20_Text"><text:span text:style-name="T1">&lt;button&gt;</text:span></text:span><text:span text:style-name="T1"> clicado) e dispara o gatilho nele.</text:span></text:p>
        </text:list-item>
        <text:list-item>
          <text:p text:style-name="P153"><text:span text:style-name="T24">Fase de Borbulhamento (</text:span><text:span text:style-name="Source_20_Text"><text:span text:style-name="T24">Bubbling Phase</text:span></text:span><text:span text:style-name="T24">):</text:span><text:span text:style-name="T1"> O evento faz o caminho inverso: ele sobe de volta pela árvore do DOM, do elemento filho até a raiz, disparando os ouvintes de todos os elementos pais no caminho. </text:span><text:span text:style-name="T24">Este é o comportamento padrão do navegador.</text:span></text:p>
        </text:list-item>
      </text:list>
      <text:p text:style-name="P121">Controlando o Fluxo com Código</text:p>
      <text:p text:style-name="Text_20_body"><text:span text:style-name="T1">O objeto de evento (</text:span><text:span text:style-name="Source_20_Text"><text:span text:style-name="T1">event</text:span></text:span><text:span text:style-name="T1">) nos dá ferramentas para gerenciar e interromper essa viagem na árvore:</text:span></text:p>
      <text:list text:style-name="L57">
        <text:list-item>
          <text:p text:style-name="P154"><text:span text:style-name="Source_20_Text"><text:span text:style-name="T24">event.stopPropagation()</text:span></text:span><text:span text:style-name="T24">:</text:span><text:span text:style-name="T1"> Interrompe o borbulhamento imediatamente. Se você clicar em um botão interno, o evento não subirá para a </text:span><text:span text:style-name="Source_20_Text"><text:span text:style-name="T1">&lt;div&gt;</text:span></text:span><text:span text:style-name="T1"> mãe. Muito útil para janelas modais ou menus drop-down onde o clique de dentro não deve fechar a caixa externa.</text:span></text:p>
        </text:list-item>
        <text:list-item>
          <text:p text:style-name="P154"><text:span text:style-name="Source_20_Text"><text:span text:style-name="T24">event.stopImmediatePropagation()</text:span></text:span><text:span text:style-name="T24">:</text:span><text:span text:style-name="T1"> Além de impedir o evento de subir para os pais, ele impede que outros </text:span><text:span text:style-name="T25">listeners</text:span><text:span text:style-name="T1"> configurados no mesmo elemento atual executem.</text:span></text:p>
        </text:list-item>
      </text:list>
      <text:h text:style-name="Heading_20_3" text:outline-level="3"><text:bookmark-start text:name="__RefHeading___Toc4817_1212987772"/><text:span text:style-name="T1">4. O Objeto do Evento (</text:span><text:span text:style-name="Source_20_Text"><text:span text:style-name="T1">Event Object</text:span></text:span><text:span text:style-name="T1">)</text:span><text:bookmark-end text:name="__RefHeading___Toc4817_1212987772"/></text:h>
      <text:p text:style-name="Text_20_body"><text:span text:style-name="T1">Sempre que um callback é executado, o navegador injeta automaticamente um argumento contendo uma coleção rica de metadados sobre o ocorrido. Por convenção de código, os desenvolvedores capturam essa variável nomeando-a como </text:span><text:span text:style-name="Source_20_Text"><text:span text:style-name="T1">e</text:span></text:span><text:span text:style-name="T1">, </text:span><text:span text:style-name="Source_20_Text"><text:span text:style-name="T1">evt</text:span></text:span><text:span text:style-name="T1"> ou </text:span><text:span text:style-name="Source_20_Text"><text:span text:style-name="T1">event</text:span></text:span><text:span text:style-name="T1">.</text:span></text:p>
      <text:p text:style-name="P121">Propriedades e Métodos Fundamentais:</text:p>
      <text:list text:style-name="L58">
        <text:list-item>
          <text:p text:style-name="P155"><text:soft-page-break/><text:span text:style-name="Source_20_Text"><text:span text:style-name="T24">e.target</text:span></text:span><text:span text:style-name="T24">:</text:span><text:span text:style-name="T1"> Faz referência ao </text:span><text:span text:style-name="T24">elemento exato que disparou o evento</text:span><text:span text:style-name="T1"> (onde o usuário realmente interagiu, ex: a imagem dentro de um botão).</text:span></text:p>
        </text:list-item>
        <text:list-item>
          <text:p text:style-name="P155"><text:span text:style-name="Source_20_Text"><text:span text:style-name="T24">e.currentTarget</text:span></text:span><text:span text:style-name="T24">:</text:span><text:span text:style-name="T1"> Faz referência ao elemento que </text:span><text:span text:style-name="T24">está escutando o evento</text:span><text:span text:style-name="T1"> (onde o </text:span><text:span text:style-name="Source_20_Text"><text:span text:style-name="T1">.addEventListener</text:span></text:span><text:span text:style-name="T1"> foi atrelado). Eles podem ser diferentes devido ao efeito de borbulhamento.</text:span></text:p>
        </text:list-item>
        <text:list-item>
          <text:p text:style-name="P155"><text:span text:style-name="Source_20_Text"><text:span text:style-name="T24">e.type</text:span></text:span><text:span text:style-name="T24">:</text:span><text:span text:style-name="T1"> Retorna uma string com o nome do evento executado (ex: </text:span><text:span text:style-name="Source_20_Text"><text:span text:style-name="T1">"click"</text:span></text:span><text:span text:style-name="T1">, </text:span><text:span text:style-name="Source_20_Text"><text:span text:style-name="T1">"keyup"</text:span></text:span><text:span text:style-name="T1">).</text:span></text:p>
        </text:list-item>
        <text:list-item>
          <text:p text:style-name="P155"><text:span text:style-name="Source_20_Text"><text:span text:style-name="T24">e.preventDefault()</text:span></text:span><text:span text:style-name="T24">:</text:span><text:span text:style-name="T1"> Cancela o comportamento nativo padrão que o navegador executaria para aquela tag. Exemplos: impede uma tag </text:span><text:span text:style-name="Source_20_Text"><text:span text:style-name="T1">&lt;a&gt;</text:span></text:span><text:span text:style-name="T1"> de redirecionar a URL ou impede um </text:span><text:span text:style-name="Source_20_Text"><text:span text:style-name="T1">&lt;form&gt;</text:span></text:span><text:span text:style-name="T1"> de recarregar a página ao enviar dados.</text:span></text:p>
        </text:list-item>
      </text:list>
      <text:h text:style-name="Heading_20_3" text:outline-level="3"><text:bookmark-start text:name="__RefHeading___Toc4819_1212987772"/><text:span text:style-name="T1">5. Delegação de Eventos (</text:span><text:span text:style-name="Source_20_Text"><text:span text:style-name="T1">Event Delegation</text:span></text:span><text:span text:style-name="T1">)</text:span><text:bookmark-end text:name="__RefHeading___Toc4819_1212987772"/></text:h>
      <text:p text:style-name="Text_20_body"><text:span text:style-name="T1">Em aplicações robustas e dinâmicas (como listas infinitas ou e-commerces onde itens entram e saem da tela a todo momento), adicionar um </text:span><text:span text:style-name="Source_20_Text"><text:span text:style-name="T1">.addEventListener</text:span></text:span><text:span text:style-name="T1"> para cada botão individual prejudica o consumo de memória do dispositivo.</text:span></text:p>
      <text:p text:style-name="Text_20_body"><text:span text:style-name="T1">A técnica de </text:span><text:span text:style-name="T24">Delegação de Eventos</text:span><text:span text:style-name="T1"> resolve isso aproveitando o mecanismo de </text:span><text:span text:style-name="T25">Event Bubbling</text:span><text:span text:style-name="T1">. Em vez de ouvir os filhos, nós penduramos </text:span><text:span text:style-name="T24">um único ouvinte no elemento pai</text:span><text:span text:style-name="T1"> e inspecionamos quem disparou a ação usando </text:span><text:span text:style-name="Source_20_Text"><text:span text:style-name="T1">e.target</text:span></text:span><text:span text:style-name="T1">.</text:span></text:p>
      <text:p text:style-name="P121">Exemplo Prático de Arquitetura Limpa:</text:p>
      <text:p text:style-name="P148">JavaScript</text:p>
      <text:p text:style-name="P156"><text:span text:style-name="Source_20_Text"><text:span text:style-name="T21">// Capturamos a lista (Pai) e não os itens (Filhos)</text:span></text:span></text:p>
      <text:p text:style-name="P156"><text:span text:style-name="Source_20_Text"><text:span text:style-name="T21">const listaProdutos = document.querySelector('#lista-produtos');</text:span></text:span></text:p>
      <text:p text:style-name="P157"/>
      <text:p text:style-name="P156"><text:span text:style-name="Source_20_Text"><text:span text:style-name="T21">listaProdutos.addEventListener('click', function(e) {</text:span></text:span></text:p>
      <text:p text:style-name="P156"><text:span text:style-name="Source_20_Text"><text:span text:style-name="T21"><text:s text:c="4"/>// Verifica se o clique aconteceu de fato em um botão de exclusão</text:span></text:span></text:p>
      <text:p text:style-name="P156"><text:span text:style-name="Source_20_Text"><text:span text:style-name="T21"><text:s text:c="4"/>if (e.target &amp;&amp; e.target.classList.contains('btn-deletar')) {</text:span></text:span></text:p>
      <text:p text:style-name="P156"><text:span text:style-name="Source_20_Text"><text:span text:style-name="T21"><text:s text:c="8"/>const idProduto = e.target.dataset.id;</text:span></text:span></text:p>
      <text:p text:style-name="P156"><text:span text:style-name="Source_20_Text"><text:span text:style-name="T21"><text:s text:c="8"/>console.log(`Produto ${idProduto} removido com sucesso!`);</text:span></text:span></text:p>
      <text:p text:style-name="P156"><text:span text:style-name="Source_20_Text"><text:span text:style-name="T21"><text:s text:c="4"/>}</text:span></text:span></text:p>
      <text:p text:style-name="P156"><text:span text:style-name="Source_20_Text"><text:span text:style-name="T21">});</text:span></text:span></text:p>
      <text:h text:style-name="P158" text:outline-level="2"><text:bookmark-start text:name="__RefHeading___Toc4821_1212987772"/>6. Classificação dos Principais Eventos do DOM<text:bookmark-end text:name="__RefHeading___Toc4821_1212987772"/></text:h>
      <text:p text:style-name="P8">Para facilitar o mapeamento cognitivo, agrupamos os eventos em categorias com base em sua origem no sistema:</text:p>
      <text:h text:style-name="P159" text:outline-level="3"><text:bookmark-start text:name="__RefHeading___Toc4823_1212987772"/>Eventos de Mouse<text:bookmark-end text:name="__RefHeading___Toc4823_1212987772"/></text:h>
      <text:list text:style-name="L59">
        <text:list-item>
          <text:p text:style-name="P160"><text:span text:style-name="Source_20_Text"><text:span text:style-name="T1">click</text:span></text:span><text:span text:style-name="T1">: Disparado com um clique rápido (pressionar e soltar).</text:span></text:p>
        </text:list-item>
        <text:list-item>
          <text:p text:style-name="P160"><text:soft-page-break/><text:span text:style-name="Source_20_Text"><text:span text:style-name="T1">dblclick</text:span></text:span><text:span text:style-name="T1">: Clique duplo rápido.</text:span></text:p>
        </text:list-item>
        <text:list-item>
          <text:p text:style-name="P160"><text:span text:style-name="Source_20_Text"><text:span text:style-name="T1">mouseenter</text:span></text:span><text:span text:style-name="T1"> / </text:span><text:span text:style-name="Source_20_Text"><text:span text:style-name="T1">mouseleave</text:span></text:span><text:span text:style-name="T1">: Disparados quando o ponteiro entra ou sai da área do elemento. (Não borbulham, ao contrário de </text:span><text:span text:style-name="Source_20_Text"><text:span text:style-name="T1">mouseover</text:span></text:span><text:span text:style-name="T1">/</text:span><text:span text:style-name="Source_20_Text"><text:span text:style-name="T1">mouseout</text:span></text:span><text:span text:style-name="T1">).</text:span></text:p>
        </text:list-item>
        <text:list-item>
          <text:p text:style-name="P160"><text:span text:style-name="Source_20_Text"><text:span text:style-name="T1">mousemove</text:span></text:span><text:span text:style-name="T1">: Disparado continuamente a cada pixel que o mouse se move sobre a caixa.</text:span></text:p>
        </text:list-item>
      </text:list>
      <text:h text:style-name="P159" text:outline-level="3"><text:bookmark-start text:name="__RefHeading___Toc4825_1212987772"/>Eventos de Teclado<text:bookmark-end text:name="__RefHeading___Toc4825_1212987772"/></text:h>
      <text:list text:style-name="L60">
        <text:list-item>
          <text:p text:style-name="P161"><text:span text:style-name="Source_20_Text"><text:span text:style-name="T1">keydown</text:span></text:span><text:span text:style-name="T1">: Disparado no momento em que uma tecla é pressionada.</text:span></text:p>
        </text:list-item>
        <text:list-item>
          <text:p text:style-name="P161"><text:span text:style-name="Source_20_Text"><text:span text:style-name="T1">keyup</text:span></text:span><text:span text:style-name="T1">: Disparado quando a tecla é solta.</text:span></text:p>
        </text:list-item>
        <text:list-item>
          <text:p text:style-name="P161"><text:span text:style-name="T25">Nota Técnica:</text:span><text:span text:style-name="T1"> Para capturar qual caractere foi acionado, inspecione as propriedades </text:span><text:span text:style-name="Source_20_Text"><text:span text:style-name="T1">e.key</text:span></text:span><text:span text:style-name="T1"> (retorna o caractere visual, ex: </text:span><text:span text:style-name="Source_20_Text"><text:span text:style-name="T1">"Enter"</text:span></text:span><text:span text:style-name="T1">) ou </text:span><text:span text:style-name="Source_20_Text"><text:span text:style-name="T1">e.code</text:span></text:span><text:span text:style-name="T1"> (retorna o código físico da tecla, ex: </text:span><text:span text:style-name="Source_20_Text"><text:span text:style-name="T1">"KeyA"</text:span></text:span><text:span text:style-name="T1">).</text:span></text:p>
        </text:list-item>
      </text:list>
      <text:h text:style-name="P159" text:outline-level="3"><text:bookmark-start text:name="__RefHeading___Toc4827_1212987772"/>Eventos de Formulário<text:bookmark-end text:name="__RefHeading___Toc4827_1212987772"/></text:h>
      <text:list text:style-name="L61">
        <text:list-item>
          <text:p text:style-name="P162"><text:span text:style-name="Source_20_Text"><text:span text:style-name="T1">submit</text:span></text:span><text:span text:style-name="T1">: Disparado no envio do formulário (essencial capturar para validações antes do envio HTTP).</text:span></text:p>
        </text:list-item>
        <text:list-item>
          <text:p text:style-name="P162"><text:span text:style-name="Source_20_Text"><text:span text:style-name="T1">change</text:span></text:span><text:span text:style-name="T1">: Disparado quando o valor de um campo muda e o usuário perde o foco dele (comum em </text:span><text:span text:style-name="Source_20_Text"><text:span text:style-name="T1">&lt;select&gt;</text:span></text:span><text:span text:style-name="T1">).</text:span></text:p>
        </text:list-item>
        <text:list-item>
          <text:p text:style-name="P162"><text:span text:style-name="Source_20_Text"><text:span text:style-name="T1">input</text:span></text:span><text:span text:style-name="T1">: Disparado em tempo real a cada caractere digitado ou apagado em um campo de texto.</text:span></text:p>
        </text:list-item>
      </text:list>
      <text:h text:style-name="P159" text:outline-level="3"><text:bookmark-start text:name="__RefHeading___Toc4829_1212987772"/>Eventos do Ciclo de Vida do Documento<text:bookmark-end text:name="__RefHeading___Toc4829_1212987772"/></text:h>
      <text:list text:style-name="L62">
        <text:list-item>
          <text:p text:style-name="P163"><text:span text:style-name="Source_20_Text"><text:span text:style-name="T1">DOMContentLoaded</text:span></text:span><text:span text:style-name="T1">: Disparado quando o HTML foi totalmente lido e a árvore do DOM foi construída na memória, sem esperar por imagens ou folhas de estilo externas. Excelente ponto para iniciar scripts.</text:span></text:p>
        </text:list-item>
        <text:list-item>
          <text:p text:style-name="P163"><text:span text:style-name="Source_20_Text"><text:span text:style-name="T1">load</text:span></text:span><text:span text:style-name="T1">: Disparado na janela (</text:span><text:span text:style-name="Source_20_Text"><text:span text:style-name="T1">window</text:span></text:span><text:span text:style-name="T1">) apenas quando tudo na página (incluindo imagens pesadas, scripts e CSS) foi baixado com sucesso.</text:span></text:p>
        </text:list-item>
        <text:list-item>
          <text:p text:style-name="P163"><text:span text:style-name="Source_20_Text"><text:span text:style-name="T1">resize</text:span></text:span><text:span text:style-name="T1">: Disparado quando o tamanho da janela do navegador é alterado.</text:span></text:p>
        </text:list-item>
        <text:list-item>
          <text:p text:style-name="P163"><text:span text:style-name="Source_20_Text"><text:span text:style-name="T1">scroll</text:span></text:span><text:span text:style-name="T1">: Disparado quando o usuário rola a tela vertical ou horizontalmente.</text:span></text:p>
        </text:list-item>
      </text:list>
      <text:h text:style-name="P78" text:outline-level="2"><text:bookmark-start text:name="__RefHeading___Toc4831_1212987772"/>Estruturas Condicionais em JavaScript: Guia de Controle de Fluxo<text:bookmark-end text:name="__RefHeading___Toc4831_1212987772"/></text:h>
      <text:h text:style-name="P146" text:outline-level="3"><text:bookmark-start text:name="__RefHeading___Toc4833_1212987772"/>1. O que é o Controle de Fluxo Condicional?<text:bookmark-end text:name="__RefHeading___Toc4833_1212987772"/></text:h>
      <text:p text:style-name="P164">Por padrão, os interpretadores de JavaScript executam o código de forma linear: de cima para baixo, linha por linha. As <text:span text:style-name="T22">estruturas condicionais</text:span> quebram essa linearidade. Elas atuam como bifurcações no código, permitindo que a aplicação tome decisões em tempo de execução com base em testes lógicos (expressões booleanas).</text:p>
      <text:p text:style-name="P165"><text:soft-page-break/><text:span text:style-name="T1">Se a condição estipulada for avaliada como verdadeira (</text:span><text:span text:style-name="Source_20_Text"><text:span text:style-name="T1">true</text:span></text:span><text:span text:style-name="T1">), um bloco específico de código é executado; se for falsa (</text:span><text:span text:style-name="Source_20_Text"><text:span text:style-name="T1">false</text:span></text:span><text:span text:style-name="T1">), o interpretador ignora esse bloco e segue outro caminho.</text:span></text:p>
      <text:h text:style-name="P166" text:outline-level="3"><text:bookmark-start text:name="__RefHeading___Toc4835_1212987772"/><text:span text:style-name="T1">2. A Estrutura Base: </text:span><text:span text:style-name="Source_20_Text"><text:span text:style-name="T1">if</text:span></text:span><text:span text:style-name="T1">, </text:span><text:span text:style-name="Source_20_Text"><text:span text:style-name="T1">else if</text:span></text:span><text:span text:style-name="T1"> e </text:span><text:span text:style-name="Source_20_Text"><text:span text:style-name="T1">else</text:span></text:span><text:bookmark-end text:name="__RefHeading___Toc4835_1212987772"/></text:h>
      <text:p text:style-name="P164">É a ferramenta mais comum para tomada de decisão no JavaScript. Ela avalia expressões lógicas e direciona o fluxo do script.</text:p>
      <text:p text:style-name="Text_20_body"><text:span text:style-name="T3">A. O Bloco </text:span><text:span text:style-name="Source_20_Text"><text:span text:style-name="T3">if</text:span></text:span><text:span text:style-name="T3"> (Se)</text:span></text:p>
      <text:p text:style-name="P164">Executa um bloco de código apenas se a condição entre parênteses for verdadeira.</text:p>
      <text:p text:style-name="P167">JavaScript</text:p>
      <text:p text:style-name="P168"><text:span text:style-name="Source_20_Text"><text:span text:style-name="T20">const velocidade = 85;</text:span></text:span></text:p>
      <text:p text:style-name="P169"/>
      <text:p text:style-name="P168"><text:span text:style-name="Source_20_Text"><text:span text:style-name="T20">if (velocidade &gt; 80) {</text:span></text:span></text:p>
      <text:p text:style-name="P168"><text:span text:style-name="Source_20_Text"><text:span text:style-name="T20"><text:s text:c="4"/>console.log("Usuário multado por excesso de velocidade!");</text:span></text:span></text:p>
      <text:p text:style-name="P170"><text:span text:style-name="Source_20_Text"><text:span text:style-name="T20">}</text:span></text:span></text:p>
      <text:p text:style-name="Text_20_body"><text:span text:style-name="T3">B. O Bloco </text:span><text:span text:style-name="Source_20_Text"><text:span text:style-name="T3">else</text:span></text:span><text:span text:style-name="T3"> (Senão)</text:span></text:p>
      <text:p text:style-name="P165"><text:span text:style-name="T1">Funciona como um plano de contingência. Ele executa um código alternativo caso a condição do </text:span><text:span text:style-name="Source_20_Text"><text:span text:style-name="T1">if</text:span></text:span><text:span text:style-name="T1"> seja falsa.</text:span></text:p>
      <text:p text:style-name="P167">JavaScript</text:p>
      <text:p text:style-name="P168"><text:span text:style-name="Source_20_Text"><text:span text:style-name="T20">const idade = 16;</text:span></text:span></text:p>
      <text:p text:style-name="P169"/>
      <text:p text:style-name="P168"><text:span text:style-name="Source_20_Text"><text:span text:style-name="T20">if (idade &gt;= 18) {</text:span></text:span></text:p>
      <text:p text:style-name="P168"><text:span text:style-name="Source_20_Text"><text:span text:style-name="T20"><text:s text:c="4"/>console.log("Acesso autorizado.");</text:span></text:span></text:p>
      <text:p text:style-name="P168"><text:span text:style-name="Source_20_Text"><text:span text:style-name="T20">} else {</text:span></text:span></text:p>
      <text:p text:style-name="P168"><text:span text:style-name="Source_20_Text"><text:span text:style-name="T20"><text:s text:c="4"/>console.log("Acesso negado. Usuário menor de idade.");</text:span></text:span></text:p>
      <text:p text:style-name="P170"><text:span text:style-name="Source_20_Text"><text:span text:style-name="T20">}</text:span></text:span></text:p>
      <text:p text:style-name="Text_20_body"><text:span text:style-name="T3">C. O Encadeamento com </text:span><text:span text:style-name="Source_20_Text"><text:span text:style-name="T3">else if</text:span></text:span><text:span text:style-name="T3"> (Senão Se)</text:span></text:p>
      <text:p text:style-name="P164">Utilizado quando há mais de dois caminhos possíveis para resolver o problema. O JavaScript avalia as condições em ordem e executa o <text:span text:style-name="T23">primeiro</text:span> bloco que for verdadeiro.</text:p>
      <text:p text:style-name="P167">JavaScript</text:p>
      <text:p text:style-name="P168"><text:span text:style-name="Source_20_Text"><text:span text:style-name="T20">const nota = 7.5;</text:span></text:span></text:p>
      <text:p text:style-name="P169"/>
      <text:p text:style-name="P168"><text:span text:style-name="Source_20_Text"><text:span text:style-name="T20">if (nota &gt;= 9.0) {</text:span></text:span></text:p>
      <text:p text:style-name="P168"><text:span text:style-name="Source_20_Text"><text:span text:style-name="T20"><text:s text:c="4"/>console.log("Excelente! Quadro de honra.");</text:span></text:span></text:p>
      <text:p text:style-name="P168"><text:span text:style-name="Source_20_Text"><text:span text:style-name="T20">} else if (nota &gt;= 7.0) {</text:span></text:span></text:p>
      <text:p text:style-name="P168"><text:span text:style-name="Source_20_Text"><text:span text:style-name="T20"><text:s text:c="4"/>console.log("Aprovado regular.");</text:span></text:span></text:p>
      <text:p text:style-name="P168"><text:span text:style-name="Source_20_Text"><text:span text:style-name="T20">} else if (nota &gt;= 5.0) {</text:span></text:span></text:p>
      <text:p text:style-name="P168"><text:span text:style-name="Source_20_Text"><text:span text:style-name="T20"><text:s text:c="4"/>console.log("Em recuperação.");</text:span></text:span></text:p>
      <text:p text:style-name="P168"><text:span text:style-name="Source_20_Text"><text:span text:style-name="T20">} else {</text:span></text:span></text:p>
      <text:p text:style-name="P168"><text:span text:style-name="Source_20_Text"><text:span text:style-name="T20"><text:s text:c="4"/>console.log("Reprovado.");</text:span></text:span></text:p>
      <text:p text:style-name="P170"><text:span text:style-name="Source_20_Text"><text:span text:style-name="T20">}</text:span></text:span></text:p>
      <text:h text:style-name="P166" text:outline-level="3"><text:bookmark-start text:name="__RefHeading___Toc4837_1212987772"/><text:soft-page-break/><text:span text:style-name="T1">3. </text:span><text:span text:style-name="T26">Condição Múltipla</text:span><text:span text:style-name="T1">: </text:span><text:span text:style-name="Source_20_Text"><text:span text:style-name="T1">switch</text:span></text:span><text:bookmark-end text:name="__RefHeading___Toc4837_1212987772"/></text:h>
      <text:p text:style-name="P165"><text:span text:style-name="T1">Quando você precisa testar uma única variável contra múltiplos valores exatos fixos, o encadeamento de muitos </text:span><text:span text:style-name="Source_20_Text"><text:span text:style-name="T1">else if</text:span></text:span><text:span text:style-name="T1"> pode tornar o código poluído e difícil de ler. O bloco </text:span><text:span text:style-name="Source_20_Text"><text:span text:style-name="T1">switch</text:span></text:span><text:span text:style-name="T1"> organiza essa estrutura de forma limpa através de "casos".</text:span></text:p>
      <text:p text:style-name="Text_20_body"><text:span text:style-name="T3">Anatomia do </text:span><text:span text:style-name="Source_20_Text"><text:span text:style-name="T3">switch</text:span></text:span><text:span text:style-name="T3">:</text:span></text:p>
      <text:list text:style-name="L63">
        <text:list-item>
          <text:p text:style-name="P171"><text:span text:style-name="Source_20_Text"><text:span text:style-name="T24">case</text:span></text:span><text:span text:style-name="T24">:</text:span><text:span text:style-name="T1"> Define o valor a ser comparado com a variável.</text:span></text:p>
        </text:list-item>
        <text:list-item>
          <text:p text:style-name="P171"><text:span text:style-name="Source_20_Text"><text:span text:style-name="T24">break</text:span></text:span><text:span text:style-name="T24">:</text:span><text:span text:style-name="T1"> Interrompe a execução do switch. Se você esquecer o </text:span><text:span text:style-name="Source_20_Text"><text:span text:style-name="T1">break</text:span></text:span><text:span text:style-name="T1">, o interpretador continuará executando todos os próximos casos abaixo de forma cascata, mesmo que eles não correspondam ao valor (comportamento conhecido como </text:span><text:span text:style-name="T25">fall-through</text:span><text:span text:style-name="T1">).</text:span></text:p>
        </text:list-item>
        <text:list-item>
          <text:p text:style-name="P171"><text:span text:style-name="Source_20_Text"><text:span text:style-name="T24">default</text:span></text:span><text:span text:style-name="T24">:</text:span><text:span text:style-name="T1"> Funciona como o </text:span><text:span text:style-name="Source_20_Text"><text:span text:style-name="T1">else</text:span></text:span><text:span text:style-name="T1">. É o código executado se nenhum dos casos anteriores for correspondido.</text:span></text:p>
        </text:list-item>
      </text:list>
      <text:p text:style-name="P172">JavaScript</text:p>
      <text:p text:style-name="P173"><text:span text:style-name="Source_20_Text"><text:span text:style-name="T20">const diaSemana = 3;</text:span></text:span></text:p>
      <text:p text:style-name="P173"><text:span text:style-name="Source_20_Text"><text:span text:style-name="T20">let nomeDia = "";</text:span></text:span></text:p>
      <text:p text:style-name="P174"/>
      <text:p text:style-name="P173"><text:span text:style-name="Source_20_Text"><text:span text:style-name="T20">switch (diaSemana) {</text:span></text:span></text:p>
      <text:p text:style-name="P173"><text:span text:style-name="Source_20_Text"><text:span text:style-name="T20"><text:s text:c="4"/>case 1:</text:span></text:span></text:p>
      <text:p text:style-name="P173"><text:span text:style-name="Source_20_Text"><text:span text:style-name="T20"><text:s text:c="8"/>nomeDia = "Segunda-feira";</text:span></text:span></text:p>
      <text:p text:style-name="P173"><text:span text:style-name="Source_20_Text"><text:span text:style-name="T20"><text:s text:c="8"/>break;</text:span></text:span></text:p>
      <text:p text:style-name="P173"><text:span text:style-name="Source_20_Text"><text:span text:style-name="T20"><text:s text:c="4"/>case 2:</text:span></text:span></text:p>
      <text:p text:style-name="P173"><text:span text:style-name="Source_20_Text"><text:span text:style-name="T20"><text:s text:c="8"/>nomeDia = "Terça-feira";</text:span></text:span></text:p>
      <text:p text:style-name="P173"><text:span text:style-name="Source_20_Text"><text:span text:style-name="T20"><text:s text:c="8"/>break;</text:span></text:span></text:p>
      <text:p text:style-name="P173"><text:span text:style-name="Source_20_Text"><text:span text:style-name="T20"><text:s text:c="4"/>case 3:</text:span></text:span></text:p>
      <text:p text:style-name="P173"><text:span text:style-name="Source_20_Text"><text:span text:style-name="T20"><text:s text:c="8"/>nomeDia = "Quarta-feira";</text:span></text:span></text:p>
      <text:p text:style-name="P173"><text:span text:style-name="Source_20_Text"><text:span text:style-name="T20"><text:s text:c="8"/>break;</text:span></text:span></text:p>
      <text:p text:style-name="P173"><text:span text:style-name="Source_20_Text"><text:span text:style-name="T20"><text:s text:c="4"/>default:</text:span></text:span></text:p>
      <text:p text:style-name="P173"><text:span text:style-name="Source_20_Text"><text:span text:style-name="T20"><text:s text:c="8"/>nomeDia = "Dia inválido ou final de semana";</text:span></text:span></text:p>
      <text:p text:style-name="P175"><text:span text:style-name="Source_20_Text"><text:span text:style-name="T20">}</text:span></text:span></text:p>
      <text:p text:style-name="P174"/>
      <text:p text:style-name="P173"><text:span text:style-name="Source_20_Text"><text:span text:style-name="T20">console.log(nomeDia); // Saída: Quarta-feira</text:span></text:span></text:p>
      <text:h text:style-name="P146" text:outline-level="3"><text:bookmark-start text:name="__RefHeading___Toc4839_1212987772"/>4. O Operador Ternário (Condicional Curto)<text:bookmark-end text:name="__RefHeading___Toc4839_1212987772"/></text:h>
      <text:p text:style-name="P165"><text:span text:style-name="T1">O operador ternário é uma forma compacta de escrever um </text:span><text:span text:style-name="Source_20_Text"><text:span text:style-name="T1">if / else</text:span></text:span><text:span text:style-name="T1"> que serve puramente para </text:span><text:span text:style-name="T24">atribuir um valor ou retornar um dado</text:span><text:span text:style-name="T1">. Ele recebe esse nome porque é o único operador do JavaScript que exige três operandos.</text:span></text:p>
      <text:p text:style-name="P121">Sintaxe:</text:p>
      <text:p text:style-name="P164">$$\text{condição } ? \text{ valor\_se\_verdadeiro} : \text{ valor\_se\_falso}$$</text:p>
      <text:p text:style-name="P121">Exemplo Prático:</text:p>
      <text:p text:style-name="P176">JavaScript</text:p>
      <text:p text:style-name="P168"><text:span text:style-name="Source_20_Text"><text:span text:style-name="T1">const saldo = 150;</text:span></text:span></text:p>
      <text:p text:style-name="P170"/>
      <text:p text:style-name="P168"><text:soft-page-break/><text:span text:style-name="Source_20_Text"><text:span text:style-name="T1">// Utilizando IF / ELSE tradicional</text:span></text:span></text:p>
      <text:p text:style-name="P168"><text:span text:style-name="Source_20_Text"><text:span text:style-name="T1">let statusConta;</text:span></text:span></text:p>
      <text:p text:style-name="P168"><text:span text:style-name="Source_20_Text"><text:span text:style-name="T1">if (saldo &gt;= 0) {</text:span></text:span></text:p>
      <text:p text:style-name="P168"><text:span text:style-name="Source_20_Text"><text:span text:style-name="T1"><text:s text:c="4"/>statusConta = "Positivo";</text:span></text:span></text:p>
      <text:p text:style-name="P168"><text:span text:style-name="Source_20_Text"><text:span text:style-name="T1">} else {</text:span></text:span></text:p>
      <text:p text:style-name="P168"><text:span text:style-name="Source_20_Text"><text:span text:style-name="T1"><text:s text:c="4"/>statusConta = "Negativo";</text:span></text:span></text:p>
      <text:p text:style-name="P170"><text:span text:style-name="Source_20_Text"><text:span text:style-name="T1">}</text:span></text:span></text:p>
      <text:p text:style-name="P170"/>
      <text:p text:style-name="P168"><text:span text:style-name="Source_20_Text"><text:span text:style-name="T1">// O mesmo comportamento refatorado com Operador Ternário:</text:span></text:span></text:p>
      <text:p text:style-name="P177"><text:span text:style-name="Source_20_Text"><text:span text:style-name="T1">const statusTernario = saldo &gt;= 0 ? "Positivo" : "Negativo";</text:span></text:span></text:p>
      <text:p text:style-name="P178"><text:span text:style-name="T27">Nota de UI/UX e Código Limpo:</text:span><text:span text:style-name="T28"> Não encadeie múltiplos operadores ternários uns dentro dos outros (ex: </text:span><text:span text:style-name="Source_20_Text"><text:span text:style-name="T28">condicao ? var1 : condicao2 ? var2 : var3</text:span></text:span><text:span text:style-name="T28">). Isso destrói a legibilidade do código. Se houver mais de duas opções, prefira o </text:span><text:span text:style-name="Source_20_Text"><text:span text:style-name="T28">if / else</text:span></text:span><text:span text:style-name="T28"> ou </text:span><text:span text:style-name="Source_20_Text"><text:span text:style-name="T28">switch</text:span></text:span><text:span text:style-name="T28">.</text:span></text:p>
      <text:h text:style-name="P146" text:outline-level="3"><text:bookmark-start text:name="__RefHeading___Toc4841_1212987772"/>5. Conceito Avançado: Truthy e Falsy<text:bookmark-end text:name="__RefHeading___Toc4841_1212987772"/></text:h>
      <text:p text:style-name="P165"><text:span text:style-name="T1">No JavaScript, uma condição dentro do </text:span><text:span text:style-name="Source_20_Text"><text:span text:style-name="T1">if</text:span></text:span><text:span text:style-name="T1"> não precisa ser necessariamente uma expressão matemática ou lógica pura (como </text:span><text:span text:style-name="Source_20_Text"><text:span text:style-name="T1">x &gt; 5</text:span></text:span><text:span text:style-name="T1">). Você pode passar qualquer tipo de dado (strings, números, objetos) diretamente na condição.</text:span></text:p>
      <text:p text:style-name="P165"><text:span text:style-name="T1">O JavaScript converte esse dado implicitamente para um booleano (</text:span><text:span text:style-name="Source_20_Text"><text:span text:style-name="T1">true</text:span></text:span><text:span text:style-name="T1"> ou </text:span><text:span text:style-name="Source_20_Text"><text:span text:style-name="T1">false</text:span></text:span><text:span text:style-name="T1">). É aqui que entram os conceitos de </text:span><text:span text:style-name="T24">Truthy</text:span><text:span text:style-name="T1"> e </text:span><text:span text:style-name="T24">Falsy</text:span><text:span text:style-name="T1">:</text:span></text:p>
      <text:p text:style-name="Text_20_body"><text:span text:style-name="T3">Valores Falsy (Valores avaliados como </text:span><text:span text:style-name="Source_20_Text"><text:span text:style-name="T3">false</text:span></text:span><text:span text:style-name="T3">)</text:span></text:p>
      <text:p text:style-name="P164">Existem exatamente <text:span text:style-name="T22">6 valores</text:span> que o JavaScript sempre considerará falsos em uma condicional:</text:p>
      <text:list text:style-name="L64">
        <text:list-item>
          <text:p text:style-name="P179"><text:span text:style-name="Source_20_Text"><text:span text:style-name="T1">false</text:span></text:span><text:span text:style-name="T1"> (O booleano nativo)</text:span></text:p>
        </text:list-item>
        <text:list-item>
          <text:p text:style-name="P179"><text:span text:style-name="Source_20_Text"><text:span text:style-name="T1">0</text:span></text:span><text:span text:style-name="T1"> (O número zero, incluindo </text:span><text:span text:style-name="Source_20_Text"><text:span text:style-name="T1">-0</text:span></text:span><text:span text:style-name="T1">)</text:span></text:p>
        </text:list-item>
        <text:list-item>
          <text:p text:style-name="P179"><text:span text:style-name="Source_20_Text"><text:span text:style-name="T1">""</text:span></text:span><text:span text:style-name="T1"> ou </text:span><text:span text:style-name="Source_20_Text"><text:span text:style-name="T1">''</text:span></text:span><text:span text:style-name="T1"> (Strings vazias)</text:span></text:p>
        </text:list-item>
        <text:list-item>
          <text:p text:style-name="P179"><text:span text:style-name="Source_20_Text"><text:span text:style-name="T1">null</text:span></text:span><text:span text:style-name="T1"> (Ausência intencional de valor)</text:span></text:p>
        </text:list-item>
        <text:list-item>
          <text:p text:style-name="P179"><text:span text:style-name="Source_20_Text"><text:span text:style-name="T1">undefined</text:span></text:span><text:span text:style-name="T1"> (Variável declarada, mas não inicializada)</text:span></text:p>
        </text:list-item>
        <text:list-item>
          <text:p text:style-name="P179"><text:span text:style-name="Source_20_Text"><text:span text:style-name="T1">NaN</text:span></text:span><text:span text:style-name="T1"> (Not a Number - erro matemático)</text:span></text:p>
        </text:list-item>
      </text:list>
      <text:p text:style-name="Text_20_body"><text:span text:style-name="T3">Valores Truthy (Valores avaliados como </text:span><text:span text:style-name="Source_20_Text"><text:span text:style-name="T3">true</text:span></text:span><text:span text:style-name="T3">)</text:span></text:p>
      <text:p text:style-name="P165"><text:span text:style-name="T24">Todo o restante</text:span><text:span text:style-name="T1"> do JavaScript é avaliado como verdadeiro. Isso inclui arrays vazios </text:span><text:span text:style-name="Source_20_Text"><text:span text:style-name="T1">[]</text:span></text:span><text:span text:style-name="T1">, objetos vazios </text:span><text:span text:style-name="Source_20_Text"><text:span text:style-name="T1">{}</text:span></text:span><text:span text:style-name="T1"> e strings com pelo menos um caractere de espaço </text:span><text:span text:style-name="Source_20_Text"><text:span text:style-name="T1">" "</text:span></text:span><text:span text:style-name="T1">.</text:span></text:p>
      <text:p text:style-name="P121">Exemplo de uso prático em APIs:</text:p>
      <text:p text:style-name="P167">JavaScript</text:p>
      <text:p text:style-name="P168"><text:span text:style-name="Source_20_Text"><text:span text:style-name="T20">const usuarioLogado = "Gabriel"; // String preenchida (Truthy)</text:span></text:span></text:p>
      <text:p text:style-name="P169"/>
      <text:p text:style-name="P168"><text:span text:style-name="Source_20_Text"><text:span text:style-name="T20">if (usuarioLogado) {</text:span></text:span></text:p>
      <text:p text:style-name="P168"><text:span text:style-name="Source_20_Text"><text:span text:style-name="T20"><text:s text:c="4"/>console.log(`Bem-vindo, ${usuarioLogado}!`); // Executa porque a string não está vazia</text:span></text:span></text:p>
      <text:p text:style-name="P168"><text:span text:style-name="Source_20_Text"><text:span text:style-name="T20">} else {</text:span></text:span></text:p>
      <text:p text:style-name="P168"><text:span text:style-name="Source_20_Text"><text:span text:style-name="T20"><text:s text:c="4"/>console.log("Por favor, faça o login.");</text:span></text:span></text:p>
      <text:p text:style-name="P170"><text:soft-page-break/><text:span text:style-name="Source_20_Text"><text:span text:style-name="T20">}</text:span></text:span></text:p>
      <text:h text:style-name="P166" text:outline-level="3"><text:bookmark-start text:name="__RefHeading___Toc4843_1212987772"/><text:span text:style-name="T1">6. Curto-Circuito Lógico (</text:span><text:span text:style-name="Source_20_Text"><text:span text:style-name="T1">Short-Circuit Evaluation</text:span></text:span><text:span text:style-name="T1">)</text:span><text:bookmark-end text:name="__RefHeading___Toc4843_1212987772"/></text:h>
      <text:p text:style-name="P165"><text:span text:style-name="T1">Os operadores lógicos </text:span><text:span text:style-name="Source_20_Text"><text:span text:style-name="T1">&amp;&amp;</text:span></text:span><text:span text:style-name="T1"> (AND) e </text:span><text:span text:style-name="Source_20_Text"><text:span text:style-name="T1">||</text:span></text:span><text:span text:style-name="T1"> (OR) podem ser usados fora dos blocos </text:span><text:span text:style-name="Source_20_Text"><text:span text:style-name="T1">if</text:span></text:span><text:span text:style-name="T1"> para criar condicionais rápidas e elegantes. Eles interrompem a leitura assim que encontram o resultado definitivo da expressão.</text:span></text:p>
      <text:p text:style-name="Text_20_body"><text:span text:style-name="T3">Operador </text:span><text:span text:style-name="Source_20_Text"><text:span text:style-name="T3">&amp;&amp;</text:span></text:span><text:span text:style-name="T3"> (Executa se for verdadeiro)</text:span></text:p>
      <text:p text:style-name="P164">Ele avalia o código da esquerda. Se for verdadeiro, ele avança e executa/retorna o código da direita. É muito utilizado em frameworks modernos (como o React) para renderizar elementos na tela.</text:p>
      <text:p text:style-name="P167">JavaScript</text:p>
      <text:p text:style-name="P168"><text:span text:style-name="Source_20_Text"><text:span text:style-name="T20">const exibirMenu = true;</text:span></text:span></text:p>
      <text:p text:style-name="P168"><text:span text:style-name="Source_20_Text"><text:span text:style-name="T20">// Se exibirMenu for true, executa a função da direita. Se for false, o código para ali mesmo.</text:span></text:span></text:p>
      <text:p text:style-name="P180"><text:span text:style-name="Source_20_Text"><text:span text:style-name="T20">exibirMenu &amp;&amp; renderizarMenuNavegacao();</text:span></text:span></text:p>
      <text:p text:style-name="Text_20_body"><text:span text:style-name="T3">Operador </text:span><text:span text:style-name="Source_20_Text"><text:span text:style-name="T3">||</text:span></text:span><text:span text:style-name="T3"> (Garante um valor padrão se for falso)</text:span></text:p>
      <text:p text:style-name="P164">Ele avalia o código da esquerda. Se for verdadeiro, ele para ali mesmo e o retorna. Se for falso (ou seja, se a variável vier nula ou vazia), ele avança e assume o valor de segurança à direita.</text:p>
      <text:p text:style-name="P167">JavaScript</text:p>
      <text:p text:style-name="P168"><text:span text:style-name="Source_20_Text"><text:span text:style-name="T20">const nomeDigitado = ""; // Usuário não preencheu o campo (Falsy)</text:span></text:span></text:p>
      <text:p text:style-name="P169"/>
      <text:p text:style-name="P168"><text:span text:style-name="Source_20_Text"><text:span text:style-name="T20">// Garante que o sistema tenha um nome válido para exibir</text:span></text:span></text:p>
      <text:p text:style-name="P168"><text:span text:style-name="Source_20_Text"><text:span text:style-name="T20">const nomeFinal = nomeDigitado || "Usuário Anônimo"; </text:span></text:span></text:p>
      <text:p text:style-name="P168"><text:span text:style-name="Source_20_Text"><text:span text:style-name="T20">console.log(nomeFinal); // Saída: Usuário Anônimo</text:span></text:span></text:p>
      <text:h text:style-name="P78" text:outline-level="2"><text:bookmark-start text:name="__RefHeading___Toc4845_1212987772"/>Estruturas de Repetição em JavaScript: Automação e Loops<text:bookmark-end text:name="__RefHeading___Toc4845_1212987772"/></text:h>
      <text:h text:style-name="P79" text:outline-level="3"><text:bookmark-start text:name="__RefHeading___Toc4847_1212987772"/>1. O que são Estruturas de Repetição?<text:bookmark-end text:name="__RefHeading___Toc4847_1212987772"/></text:h>
      <text:p text:style-name="P8">No desenvolvimento de software, frequentemente precisamos executar o mesmo bloco de código várias vezes seguidas (por exemplo, ler os 50 produtos de um carrinho, renderizar 10 posts na tela ou rodar um cálculo até atingir um limite).</text:p>
      <text:p text:style-name="Text_20_body"><text:span text:style-name="T1">Em vez de copiar e colar linhas de código, utilizamos </text:span><text:span text:style-name="T24">estruturas de repetição</text:span><text:span text:style-name="T1"> (conhecidas como </text:span><text:span text:style-name="T29">Loops</text:span><text:span text:style-name="T3"> </text:span><text:span text:style-name="T1">ou </text:span><text:span text:style-name="T29">Laços</text:span><text:span text:style-name="T1">). Elas repetem uma instrução com base em uma condição lógica: enquanto a condição for verdadeira (</text:span><text:span text:style-name="Source_20_Text"><text:span text:style-name="T1">true</text:span></text:span><text:span text:style-name="T1">), o bloco continua rodando; no momento em que se torna falsa (</text:span><text:span text:style-name="Source_20_Text"><text:span text:style-name="T1">false</text:span></text:span><text:span text:style-name="T1">), o laço é quebrado e o programa segue em frente.</text:span></text:p>
      <text:p text:style-name="P181"><text:span text:style-name="T22">Aviso de Performance (Loop Infinito):</text:span> Se a condição do seu laço de repetição nunca se tornar falsa, o código rodará infinitamente. Isso consome 100% do processamento disponível e trava a aba do navegador do usuário.</text:p>
      <text:h text:style-name="P166" text:outline-level="3"><text:bookmark-start text:name="__RefHeading___Toc4849_1212987772"/><text:soft-page-break/><text:span text:style-name="T1">2. Estrutura Controlada por Contador: </text:span><text:span text:style-name="Source_20_Text"><text:span text:style-name="T1">for</text:span></text:span><text:bookmark-end text:name="__RefHeading___Toc4849_1212987772"/></text:h>
      <text:p text:style-name="Text_20_body"><text:span text:style-name="T1">O laço </text:span><text:span text:style-name="Source_20_Text"><text:span text:style-name="T1">for</text:span></text:span><text:span text:style-name="T1"> é a estrutura ideal quando você </text:span><text:span text:style-name="T24">sabe exatamente quantas vezes</text:span><text:span text:style-name="T1"> precisa repetir aquela ação. Ele centraliza em uma única linha as três etapas essenciais de um loop: a inicialização, a condição de parada e o incremento.</text:span></text:p>
      <text:p text:style-name="P182">Sintaxe:</text:p>
      <text:p text:style-name="P183">JavaScript</text:p>
      <text:p text:style-name="P184"><text:span text:style-name="Source_20_Text"><text:span text:style-name="T20">for (inicialização; condição; incremento) {</text:span></text:span></text:p>
      <text:p text:style-name="P184"><text:span text:style-name="Source_20_Text"><text:span text:style-name="T20"><text:s text:c="4"/>// Código que será repetido</text:span></text:span></text:p>
      <text:p text:style-name="P184"><text:span text:style-name="Source_20_Text"><text:span text:style-name="T20">}</text:span></text:span></text:p>
      <text:p text:style-name="P182">Exemplo Prático:</text:p>
      <text:p text:style-name="P183">JavaScript</text:p>
      <text:p text:style-name="P184"><text:span text:style-name="Source_20_Text"><text:span text:style-name="T20">// Contando de 1 até 5</text:span></text:span></text:p>
      <text:p text:style-name="P184"><text:span text:style-name="Source_20_Text"><text:span text:style-name="T20">for (let i = 1; i &lt;= 5; i++) {</text:span></text:span></text:p>
      <text:p text:style-name="P184"><text:span text:style-name="Source_20_Text"><text:span text:style-name="T20"><text:s text:c="4"/>console.log(`Contagem: ${i}`);</text:span></text:span></text:p>
      <text:p text:style-name="P184"><text:span text:style-name="Source_20_Text"><text:span text:style-name="T20">}</text:span></text:span></text:p>
      <text:list text:style-name="L65">
        <text:list-item>
          <text:p text:style-name="P185"><text:span text:style-name="Source_20_Text"><text:span text:style-name="T24">let i = 1</text:span></text:span><text:span text:style-name="T24">:</text:span><text:span text:style-name="T1"> Cria uma variável de controle (ponteiro) que começa no número 1.</text:span></text:p>
        </text:list-item>
        <text:list-item>
          <text:p text:style-name="P185"><text:span text:style-name="Source_20_Text"><text:span text:style-name="T24">i &lt;= 5</text:span></text:span><text:span text:style-name="T24">:</text:span><text:span text:style-name="T1"> A condição de teste. O loop vai rodar enquanto </text:span><text:span text:style-name="Source_20_Text"><text:span text:style-name="T1">i</text:span></text:span><text:span text:style-name="T1"> for menor ou igual a 5.</text:span></text:p>
        </text:list-item>
        <text:list-item>
          <text:p text:style-name="P185"><text:span text:style-name="Source_20_Text"><text:span text:style-name="T24">i++</text:span></text:span><text:span text:style-name="T24">:</text:span><text:span text:style-name="T1"> O incremento. Soma +1 na variável </text:span><text:span text:style-name="Source_20_Text"><text:span text:style-name="T1">i</text:span></text:span><text:span text:style-name="T1"> ao final de cada repetição.</text:span></text:p>
        </text:list-item>
      </text:list>
      <text:h text:style-name="P166" text:outline-level="3"><text:bookmark-start text:name="__RefHeading___Toc4851_1212987772"/><text:span text:style-name="T1">3. Estruturas Controladas por Condição: </text:span><text:span text:style-name="Source_20_Text"><text:span text:style-name="T1">while</text:span></text:span><text:span text:style-name="T1"> e </text:span><text:span text:style-name="Source_20_Text"><text:span text:style-name="T1">do...while</text:span></text:span><text:bookmark-end text:name="__RefHeading___Toc4851_1212987772"/></text:h>
      <text:p text:style-name="P8">Essas estruturas são perfeitas para cenários onde você <text:span text:style-name="T22">não sabe previamente quantas repetições</text:span> serão necessárias, pois dependem de uma condição que muda dinamicamente durante o processo (como esperar o usuário acertar uma senha).</text:p>
      <text:p text:style-name="P186"><text:span text:style-name="T3">A. O Laço </text:span><text:span text:style-name="Source_20_Text"><text:span text:style-name="T3">while</text:span></text:span><text:span text:style-name="T3"> (Enquanto)</text:span></text:p>
      <text:p text:style-name="P187">Ele avalia a condição <text:span text:style-name="T22">antes</text:span> de executar o bloco de código. Se a condição começar como falsa, o bloco dentro dele nunca será executado.</text:p>
      <text:p text:style-name="P183">JavaScript</text:p>
      <text:p text:style-name="P184"><text:span text:style-name="Source_20_Text"><text:span text:style-name="T20">let energia = 3;</text:span></text:span></text:p>
      <text:p text:style-name="P188"/>
      <text:p text:style-name="P184"><text:span text:style-name="Source_20_Text"><text:span text:style-name="T20">while (energia &gt; 0) {</text:span></text:span></text:p>
      <text:p text:style-name="P184"><text:span text:style-name="Source_20_Text"><text:span text:style-name="T20"><text:s text:c="4"/>console.log(`Correndo... Energia restante: ${energia}`);</text:span></text:span></text:p>
      <text:p text:style-name="P184"><text:span text:style-name="Source_20_Text"><text:span text:style-name="T20"><text:s text:c="4"/>energia--; // Modifica a variável para evitar o loop infinito</text:span></text:span></text:p>
      <text:p text:style-name="P184"><text:span text:style-name="Source_20_Text"><text:span text:style-name="T20">}</text:span></text:span></text:p>
      <text:p text:style-name="P186"><text:soft-page-break/><text:span text:style-name="T3">B. O Laço </text:span><text:span text:style-name="Source_20_Text"><text:span text:style-name="T3">do...while</text:span></text:span><text:span text:style-name="T3"> (Faça... Enquanto)</text:span></text:p>
      <text:p text:style-name="P187">Diferente do anterior, ele executa o bloco de código <text:span text:style-name="T22">pelo menos uma vez</text:span> antes de testar a condição. A validação lógica acontece apenas no final.</text:p>
      <text:p text:style-name="P189">J<text:span text:style-name="T30">avaScript</text:span></text:p>
      <text:p text:style-name="P184"><text:span text:style-name="Source_20_Text"><text:span text:style-name="T20">let tentativaConexao = 0;</text:span></text:span></text:p>
      <text:p text:style-name="P188"/>
      <text:p text:style-name="P184"><text:span text:style-name="Source_20_Text"><text:span text:style-name="T20">do {</text:span></text:span></text:p>
      <text:p text:style-name="P184"><text:span text:style-name="Source_20_Text"><text:span text:style-name="T20"><text:s text:c="4"/>tentativaConexao++;</text:span></text:span></text:p>
      <text:p text:style-name="P184"><text:span text:style-name="Source_20_Text"><text:span text:style-name="T20"><text:s text:c="4"/>console.log(`Tentando conectar ao servidor... Tentativa ${tentativaConexao}`);</text:span></text:span></text:p>
      <text:p text:style-name="P184"><text:span text:style-name="Source_20_Text"><text:span text:style-name="T20"><text:s text:c="4"/></text:span></text:span></text:p>
      <text:p text:style-name="P184"><text:span text:style-name="Source_20_Text"><text:span text:style-name="T20"><text:s text:c="4"/>// Supondo que a conexão falhou, o loop para se atingir 3 tentativas</text:span></text:span></text:p>
      <text:p text:style-name="P184"><text:span text:style-name="Source_20_Text"><text:span text:style-name="T20">} while (tentativaConexao &lt; 3);</text:span></text:span></text:p>
      <text:h text:style-name="P166" text:outline-level="3"><text:bookmark-start text:name="__RefHeading___Toc4853_1212987772"/><text:span text:style-name="T1">4. Loops Especializados para Coleções: </text:span><text:span text:style-name="Source_20_Text"><text:span text:style-name="T1">for...of</text:span></text:span><text:span text:style-name="T1"> e </text:span><text:span text:style-name="Source_20_Text"><text:span text:style-name="T1">for...in</text:span></text:span><text:bookmark-end text:name="__RefHeading___Toc4853_1212987772"/></text:h>
      <text:p text:style-name="P8">O JavaScript moderno oferece atalhos nativos elegantes para percorrer estruturas de dados compostas (como listas/arrays e objetos) sem a necessidade de gerenciar contadores manuais.</text:p>
      <text:p text:style-name="P186"><text:span text:style-name="T3">A. O Laço </text:span><text:span text:style-name="Source_20_Text"><text:span text:style-name="T3">for...of</text:span></text:span><text:span text:style-name="T3"> (Iterando sobre Arrays)</text:span></text:p>
      <text:p text:style-name="P187">Lê e entrega o <text:span text:style-name="T22">valor</text:span> de cada elemento de uma lista, um por um, do início ao fim.</text:p>
      <text:p text:style-name="P183">JavaScript</text:p>
      <text:p text:style-name="P184"><text:span text:style-name="Source_20_Text"><text:span text:style-name="T20">const tecnologias = ["HTML", "CSS", "JavaScript", "React"];</text:span></text:span></text:p>
      <text:p text:style-name="P188"/>
      <text:p text:style-name="P184"><text:span text:style-name="Source_20_Text"><text:span text:style-name="T20">for (const tech of tecnologias) {</text:span></text:span></text:p>
      <text:p text:style-name="P184"><text:span text:style-name="Source_20_Text"><text:span text:style-name="T20"><text:s text:c="4"/>console.log(`Estudando a tecnologia: ${tech}`);</text:span></text:span></text:p>
      <text:p text:style-name="P184"><text:span text:style-name="Source_20_Text"><text:span text:style-name="T20">}</text:span></text:span></text:p>
      <text:p text:style-name="P184"><text:span text:style-name="Source_20_Text"><text:span text:style-name="T20">// Saída: Entrega os nomes das tecnologias diretamente.</text:span></text:span></text:p>
      <text:p text:style-name="P186"><text:span text:style-name="T3">B. O Laço </text:span><text:span text:style-name="Source_20_Text"><text:span text:style-name="T3">for...in</text:span></text:span><text:span text:style-name="T3"> (Iterando sobre Objetos)</text:span></text:p>
      <text:p text:style-name="P187">Diferente do anterior, ele é projetado para percorrer as <text:span text:style-name="T22">propriedades (chaves)</text:span> de um objeto literal.</text:p>
      <text:p text:style-name="P183">JavaScript</text:p>
      <text:p text:style-name="P184"><text:span text:style-name="Source_20_Text"><text:span text:style-name="T20">const usuario = {</text:span></text:span></text:p>
      <text:p text:style-name="P184"><text:span text:style-name="Source_20_Text"><text:span text:style-name="T20"><text:s text:c="4"/>nome: "Alice",</text:span></text:span></text:p>
      <text:p text:style-name="P184"><text:span text:style-name="Source_20_Text"><text:span text:style-name="T20"><text:s text:c="4"/>idade: 25,</text:span></text:span></text:p>
      <text:p text:style-name="P184"><text:span text:style-name="Source_20_Text"><text:span text:style-name="T20"><text:s text:c="4"/>profissao: "Engenheira de Software"</text:span></text:span></text:p>
      <text:p text:style-name="P184"><text:span text:style-name="Source_20_Text"><text:span text:style-name="T20">};</text:span></text:span></text:p>
      <text:p text:style-name="P188"><text:soft-page-break/></text:p>
      <text:p text:style-name="P184"><text:span text:style-name="Source_20_Text"><text:span text:style-name="T20">for (const chave in usuario) {</text:span></text:span></text:p>
      <text:p text:style-name="P184"><text:span text:style-name="Source_20_Text"><text:span text:style-name="T20"><text:s text:c="4"/>console.log(`${chave}: ${usuario[chave]}`);</text:span></text:span></text:p>
      <text:p text:style-name="P184"><text:span text:style-name="Source_20_Text"><text:span text:style-name="T20">}</text:span></text:span></text:p>
      <text:p text:style-name="P184"><text:span text:style-name="Source_20_Text"><text:span text:style-name="T20">/* Saída:</text:span></text:span></text:p>
      <text:p text:style-name="P184"><text:span text:style-name="Source_20_Text"><text:span text:style-name="T20"><text:s text:c="3"/>nome: Alice</text:span></text:span></text:p>
      <text:p text:style-name="P184"><text:span text:style-name="Source_20_Text"><text:span text:style-name="T20"><text:s text:c="3"/>idade: 25</text:span></text:span></text:p>
      <text:p text:style-name="P184"><text:span text:style-name="Source_20_Text"><text:span text:style-name="T20"><text:s text:c="3"/>profissao: Engenheira de Software</text:span></text:span></text:p>
      <text:p text:style-name="P184"><text:span text:style-name="Source_20_Text"><text:span text:style-name="T20">*/</text:span></text:span></text:p>
      <text:h text:style-name="P166" text:outline-level="3"><text:bookmark-start text:name="__RefHeading___Toc4855_1212987772"/><text:span text:style-name="T1">5. Comandos de Interrupção de Fluxo: </text:span><text:span text:style-name="Source_20_Text"><text:span text:style-name="T1">break</text:span></text:span><text:span text:style-name="T1"> e </text:span><text:span text:style-name="Source_20_Text"><text:span text:style-name="T1">continue</text:span></text:span><text:bookmark-end text:name="__RefHeading___Toc4855_1212987772"/></text:h>
      <text:p text:style-name="P8">Às vezes, precisamos interferir no comportamento padrão do loop antes que a condição principal seja atingida. Para isso, o JavaScript disponibiliza duas palavras-chave:</text:p>
      <text:p text:style-name="P186"><text:span text:style-name="T3">A. O Comando </text:span><text:span text:style-name="Source_20_Text"><text:span text:style-name="T3">break</text:span></text:span></text:p>
      <text:p text:style-name="P187">Interrompe e <text:span text:style-name="T22">encerra o loop imediatamente</text:span>, jogando o fluxo do programa para a linha logo após a estrutura de repetição.</text:p>
      <text:p text:style-name="P190">JavaScript</text:p>
      <text:p text:style-name="P184"><text:span text:style-name="Source_20_Text"><text:span text:style-name="T31">const listaNumeros = [10, 20, 35, 40, 50];</text:span></text:span></text:p>
      <text:p text:style-name="P191"/>
      <text:p text:style-name="P184"><text:span text:style-name="Source_20_Text"><text:span text:style-name="T31">for (const num of listaNumeros) {</text:span></text:span></text:p>
      <text:p text:style-name="P184"><text:span text:style-name="Source_20_Text"><text:span text:style-name="T31"><text:s text:c="4"/>if (num === 35) {</text:span></text:span></text:p>
      <text:p text:style-name="P184"><text:span text:style-name="Source_20_Text"><text:span text:style-name="T31"><text:s text:c="8"/>console.log("Número 35 encontrado! Parando a busca.");</text:span></text:span></text:p>
      <text:p text:style-name="P184"><text:span text:style-name="Source_20_Text"><text:span text:style-name="T31"><text:s text:c="8"/>break; // O loop é cancelado e ignora os números 40 e 50.</text:span></text:span></text:p>
      <text:p text:style-name="P184"><text:span text:style-name="Source_20_Text"><text:span text:style-name="T31"><text:s text:c="4"/>}</text:span></text:span></text:p>
      <text:p text:style-name="P184"><text:span text:style-name="Source_20_Text"><text:span text:style-name="T31"><text:s text:c="4"/>console.log(`Analisando: ${num}`);</text:span></text:span></text:p>
      <text:p text:style-name="P184"><text:span text:style-name="Source_20_Text"><text:span text:style-name="T31">}</text:span></text:span></text:p>
      <text:p text:style-name="P186"><text:span text:style-name="T3">B. O Comando </text:span><text:span text:style-name="Source_20_Text"><text:span text:style-name="T3">continue</text:span></text:span></text:p>
      <text:p text:style-name="P187">Não encerra o loop. Em vez disso, ele <text:span text:style-name="T22">pula apenas a repetição atual</text:span> e vai direto para o próximo passo do laço.</text:p>
      <text:p text:style-name="P183">JavaScript</text:p>
      <text:p text:style-name="P184"><text:span text:style-name="Source_20_Text"><text:span text:style-name="T20">// Imprimindo apenas números ímpares (pulando os pares)</text:span></text:span></text:p>
      <text:p text:style-name="P184"><text:span text:style-name="Source_20_Text"><text:span text:style-name="T20">for (let i = 1; i &lt;= 5; i++) {</text:span></text:span></text:p>
      <text:p text:style-name="P184"><text:span text:style-name="Source_20_Text"><text:span text:style-name="T20"><text:s text:c="4"/>if (i % 2 === 0) {</text:span></text:span></text:p>
      <text:p text:style-name="P184"><text:span text:style-name="Source_20_Text"><text:span text:style-name="T20"><text:s text:c="8"/>continue; // Se for par, ignora o console.log abaixo e vai para o próximo número</text:span></text:span></text:p>
      <text:p text:style-name="P184"><text:soft-page-break/><text:span text:style-name="Source_20_Text"><text:span text:style-name="T20"><text:s text:c="4"/>}</text:span></text:span></text:p>
      <text:p text:style-name="P184"><text:span text:style-name="Source_20_Text"><text:span text:style-name="T20"><text:s text:c="4"/>console.log(`Número Ímpar: ${i}`);</text:span></text:span></text:p>
      <text:p text:style-name="P192"><text:span text:style-name="Source_20_Text"><text:span text:style-name="T20">}</text:span></text:span></text:p>
      <text:h text:style-name="P131" text:outline-level="2"><text:bookmark-start text:name="__RefHeading___Toc4857_1212987772"/>Variáveis Compostas (Arrays) em JavaScript: Estruturas de Dados<text:bookmark-end text:name="__RefHeading___Toc4857_1212987772"/></text:h>
      <text:p text:style-name="P193">No desenvolvimento de software, variáveis simples (como as que armazenam strings ou números) funcionam como caixas que guardam um único valor por vez. As <text:span text:style-name="T22">Variáveis Compostas</text:span>, popularmente conhecidas como <text:span text:style-name="T22">Arrays</text:span> (ou Vetores/Listas), mudam esse cenário: elas funcionam como armários organizados, capazes de armazenar <text:span text:style-name="T22">múltiplos valores sob o nome de uma única variável</text:span>.</text:p>
      <text:h text:style-name="P146" text:outline-level="3"><text:bookmark-start text:name="__RefHeading___Toc4859_1212987772"/>1. O que é um Array?<text:bookmark-end text:name="__RefHeading___Toc4859_1212987772"/></text:h>
      <text:p text:style-name="P8">Um Array é uma estrutura de dados linear e indexada. Ele permite agrupar diversos elementos em uma única coleção sequencial. No JavaScript, os arrays são dinâmicos (seu tamanho pode crescer ou diminuir em tempo de execução) e heterogêneos (um único array pode misturar números, strings, booleanos e até outros arrays).</text:p>
      <text:p text:style-name="P182">O Conceito de Índice (Index)</text:p>
      <text:p text:style-name="Text_20_body"><text:span text:style-name="T1">O segredo para gerenciar um array é entender que </text:span><text:span text:style-name="T24">toda posição possui um número de índice, e a contagem sempre começa no zero (</text:span><text:span text:style-name="Source_20_Text"><text:span text:style-name="T24">0</text:span></text:span><text:span text:style-name="T24">)</text:span><text:span text:style-name="T1">.</text:span></text:p>
      <text:h text:style-name="P146" text:outline-level="3"><text:bookmark-start text:name="__RefHeading___Toc4861_1212987772"/>2. Criação e Acesso a Elementos<text:bookmark-end text:name="__RefHeading___Toc4861_1212987772"/></text:h>
      <text:p text:style-name="P182">A. Criando um Array</text:p>
      <text:p text:style-name="Text_20_body"><text:span text:style-name="T1">A forma mais recomendada e limpa de declarar um array é utilizando colchetes </text:span><text:span text:style-name="Source_20_Text"><text:span text:style-name="T1">[]</text:span></text:span><text:span text:style-name="T1">.</text:span></text:p>
      <text:p text:style-name="P194">JavaScript</text:p>
      <text:p text:style-name="P195"><text:span text:style-name="Source_20_Text"><text:span text:style-name="T21">// Criando um array de strings</text:span></text:span></text:p>
      <text:p text:style-name="P195"><text:span text:style-name="Source_20_Text"><text:span text:style-name="T21">const frutas = ["Abacaxi", "Banana", "Morango", "Uva"];</text:span></text:span></text:p>
      <text:p text:style-name="P182">B. Acessando Valores pelo Índice</text:p>
      <text:p text:style-name="P8">Para ler ou modificar um valor específico de dentro do array, referenciamos o nome da variável seguido pelo índice desejado entre colchetes.</text:p>
      <text:p text:style-name="P194">JavaScript</text:p>
      <text:p text:style-name="P195"><text:span text:style-name="Source_20_Text"><text:span text:style-name="T21">console.log(frutas[0]); // Saída: "Abacaxi" (Primeiro elemento)</text:span></text:span></text:p>
      <text:p text:style-name="P195"><text:span text:style-name="Source_20_Text"><text:span text:style-name="T21">console.log(frutas[2]); // Saída: "Morango"</text:span></text:span></text:p>
      <text:p text:style-name="P195"><text:span text:style-name="Source_20_Text"><text:span text:style-name="T21">// Modificando um valor existente</text:span></text:span></text:p>
      <text:p text:style-name="P195"><text:span text:style-name="Source_20_Text"><text:span text:style-name="T21">frutas[1] = "Melancia"; // Substitui "Banana" por "Melancia"</text:span></text:span></text:p>
      <text:p text:style-name="P195"><text:span text:style-name="Source_20_Text"><text:span text:style-name="T21">console.log(frutas); <text:s text:c="3"/>// Saída: ["Abacaxi", "Melancia", "Morango", "Uva"]</text:span></text:span></text:p>
      <text:p text:style-name="P182"><text:soft-page-break/>C. Descobrindo o Tamanho do Array</text:p>
      <text:p text:style-name="Text_20_body"><text:span text:style-name="T1">A propriedade nativa </text:span><text:span text:style-name="Source_20_Text"><text:span text:style-name="T3">.length</text:span></text:span><text:span text:style-name="T1"> retorna a quantidade total de elementos contidos no array.</text:span></text:p>
      <text:p text:style-name="P194">JavaScript</text:p>
      <text:p text:style-name="P195"><text:span text:style-name="Source_20_Text"><text:span text:style-name="T21">console.log(frutas.length); // Saída: 4</text:span></text:span></text:p>
      <text:p text:style-name="P196"><text:span text:style-name="T32">Nota de Engenharia:</text:span><text:span text:style-name="T21"> Como os índices começam no </text:span><text:span text:style-name="Source_20_Text"><text:span text:style-name="T21">0</text:span></text:span><text:span text:style-name="T21">, o último elemento de qualquer array sempre estará localizado na posição </text:span><text:span text:style-name="Source_20_Text"><text:span text:style-name="T21">array.length - 1</text:span></text:span><text:span text:style-name="T21">.</text:span></text:p>
      <text:h text:style-name="P146" text:outline-level="3"><text:bookmark-start text:name="__RefHeading___Toc4863_1212987772"/>3. Métodos Fundamentais de Manipulação (Inserção e Remoção)<text:bookmark-end text:name="__RefHeading___Toc4863_1212987772"/></text:h>
      <text:p text:style-name="P8">O JavaScript fornece uma API rica em métodos prontos para modificar os elementos de um array sem a necessidade de reescrevê-lo manualmente:</text:p>
      <text:p text:style-name="P182">No Final do Array:</text:p>
      <text:list text:style-name="L66">
        <text:list-item>
          <text:p text:style-name="P197"><text:span text:style-name="Source_20_Text"><text:span text:style-name="T24">push(elemento)</text:span></text:span><text:span text:style-name="T24">:</text:span><text:span text:style-name="T1"> Adiciona um ou mais elementos ao </text:span><text:span text:style-name="T24">final</text:span><text:span text:style-name="T1"> do array.</text:span></text:p>
        </text:list-item>
        <text:list-item>
          <text:p text:style-name="P197"><text:span text:style-name="Source_20_Text"><text:span text:style-name="T24">pop()</text:span></text:span><text:span text:style-name="T24">:</text:span><text:span text:style-name="T1"> Remove e retorna o </text:span><text:span text:style-name="T24">último</text:span><text:span text:style-name="T1"> elemento do array.</text:span></text:p>
        </text:list-item>
      </text:list>
      <text:p text:style-name="P198">JavaScript</text:p>
      <text:p text:style-name="P199"><text:span text:style-name="Source_20_Text"><text:span text:style-name="T21">const numeros = [10, 20];</text:span></text:span></text:p>
      <text:p text:style-name="P200"/>
      <text:p text:style-name="P199"><text:span text:style-name="Source_20_Text"><text:span text:style-name="T21">numeros.push(30); // [10, 20, 30]</text:span></text:span></text:p>
      <text:p text:style-name="P199"><text:span text:style-name="Source_20_Text"><text:span text:style-name="T21">numeros.pop(); <text:s text:c="3"/>// [10, 20] (o número 30 foi removido)</text:span></text:span></text:p>
      <text:p text:style-name="P182">No Início do Array:</text:p>
      <text:list text:style-name="L67">
        <text:list-item>
          <text:p text:style-name="P201"><text:span text:style-name="Source_20_Text"><text:span text:style-name="T24">unshift(elemento)</text:span></text:span><text:span text:style-name="T24">:</text:span><text:span text:style-name="T1"> Insere um elemento na </text:span><text:span text:style-name="T24">primeira posição</text:span><text:span text:style-name="T1"> (índice 0) e empurra todos os outros para a frente.</text:span></text:p>
        </text:list-item>
        <text:list-item>
          <text:p text:style-name="P201"><text:span text:style-name="Source_20_Text"><text:span text:style-name="T24">shift()</text:span></text:span><text:span text:style-name="T24">:</text:span><text:span text:style-name="T1"> Remove o </text:span><text:span text:style-name="T24">primeiro</text:span><text:span text:style-name="T1"> elemento do array, reindexando todos os demais.</text:span></text:p>
        </text:list-item>
      </text:list>
      <text:p text:style-name="P198">JavaScript</text:p>
      <text:p text:style-name="P199"><text:span text:style-name="Source_20_Text"><text:span text:style-name="T21">const clientes = ["Carlos", "Ana"];</text:span></text:span></text:p>
      <text:p text:style-name="P200"/>
      <text:p text:style-name="P199"><text:span text:style-name="Source_20_Text"><text:span text:style-name="T21">clientes.unshift("Bruno"); // ["Bruno", "Carlos", "Ana"]</text:span></text:span></text:p>
      <text:p text:style-name="P199"><text:span text:style-name="Source_20_Text"><text:span text:style-name="T21">clientes.shift(); <text:s text:c="11"/>// ["Carlos", "Ana"] (Bruno foi removido)</text:span></text:span></text:p>
      <text:p text:style-name="P182">Em Qualquer Posição:</text:p>
      <text:list text:style-name="L68">
        <text:list-item>
          <text:p text:style-name="P202"><text:span text:style-name="Source_20_Text"><text:span text:style-name="T24">splice(indice, quantidade, novos_elementos)</text:span></text:span><text:span text:style-name="T24">:</text:span><text:span text:style-name="T1"> Um método versátil. Ele pode remover itens de qualquer lugar do array e, opcionalmente, injetar novos valores no lugar.</text:span></text:p>
        </text:list-item>
      </text:list>
      <text:p text:style-name="P198">JavaScript</text:p>
      <text:p text:style-name="P199"><text:span text:style-name="Source_20_Text"><text:span text:style-name="T21">const cores = ["Vermelho", "Verde", "Azul", "Amarelo"];</text:span></text:span></text:p>
      <text:p text:style-name="P199"><text:soft-page-break/><text:span text:style-name="Source_20_Text"><text:span text:style-name="T21">// Remove 2 elementos a partir do índice 1 (remove "Verde" e "Azul")</text:span></text:span></text:p>
      <text:p text:style-name="P199"><text:span text:style-name="Source_20_Text"><text:span text:style-name="T21">cores.splice(1, 2); </text:span></text:span></text:p>
      <text:p text:style-name="P199"><text:span text:style-name="Source_20_Text"><text:span text:style-name="T21">console.log(cores); // Saída: ["Vermelho", "Amarelo"]</text:span></text:span></text:p>
      <text:h text:style-name="P146" text:outline-level="3"><text:bookmark-start text:name="__RefHeading___Toc4865_1212987772"/>4. Combinando Repetições com Arrays (Iteração)<text:bookmark-end text:name="__RefHeading___Toc4865_1212987772"/></text:h>
      <text:p text:style-name="P8">Arrays e Loops nasceram para trabalhar juntos. Percorrer uma variável composta para ler ou processar seus dados é uma das tarefas mais comuns do desenvolvimento.</text:p>
      <text:p text:style-name="P186"><text:span text:style-name="T3">A. Iteração com </text:span><text:span text:style-name="Source_20_Text"><text:span text:style-name="T3">for</text:span></text:span><text:span text:style-name="T3"> Tradicional (Contador)</text:span></text:p>
      <text:p text:style-name="P187">Útil quando você precisa saber o número do índice durante a execução.</text:p>
      <text:p text:style-name="P203">JavaScript</text:p>
      <text:p text:style-name="P184"><text:span text:style-name="Source_20_Text"><text:span text:style-name="T21">const precos = [100, 250, 400];</text:span></text:span></text:p>
      <text:p text:style-name="P204"/>
      <text:p text:style-name="P184"><text:span text:style-name="Source_20_Text"><text:span text:style-name="T21">for (let i = 0; i &lt; precos.length; i++) {</text:span></text:span></text:p>
      <text:p text:style-name="P184"><text:span text:style-name="Source_20_Text"><text:span text:style-name="T21"><text:s text:c="4"/>console.log(`O produto no índice ${i} custa R$ ${precos[i]}`);</text:span></text:span></text:p>
      <text:p text:style-name="P184"><text:span text:style-name="Source_20_Text"><text:span text:style-name="T21">}</text:span></text:span></text:p>
      <text:p text:style-name="P186"><text:span text:style-name="T3">B. Iteração Avançada com </text:span><text:span text:style-name="Source_20_Text"><text:span text:style-name="T3">for...of</text:span></text:span></text:p>
      <text:p text:style-name="P187">A forma mais limpa e elegante caso você precise apenas dos <text:span text:style-name="T22">valores</text:span> e não se importe com os números dos índices.</text:p>
      <text:p text:style-name="P203">JavaScript</text:p>
      <text:p text:style-name="P184"><text:span text:style-name="Source_20_Text"><text:span text:style-name="T21">const nomes = ["Julia", "Pedro", "Lucas"];</text:span></text:span></text:p>
      <text:p text:style-name="P184"><text:span text:style-name="Source_20_Text"><text:span text:style-name="T21">for (const nome of nomes) {</text:span></text:span></text:p>
      <text:p text:style-name="P184"><text:span text:style-name="Source_20_Text"><text:span text:style-name="T21"><text:s text:c="4"/>console.log(`Olá, ${nome}!`);</text:span></text:span></text:p>
      <text:p text:style-name="P184"><text:span text:style-name="Source_20_Text"><text:span text:style-name="T21">}</text:span></text:span></text:p>
      <text:h text:style-name="P146" text:outline-level="3"><text:bookmark-start text:name="__RefHeading___Toc4867_1212987772"/>5. Arrays Multidimensionais (Matrizes)<text:bookmark-end text:name="__RefHeading___Toc4867_1212987772"/></text:h>
      <text:p text:style-name="P8">Como o JavaScript permite armazenar qualquer tipo de dados dentro de um array, você pode colocar <text:span text:style-name="T22">arrays dentro de outros arrays</text:span>. Isso cria estruturas bidimensionais (como tabelas com linhas e colunas), conhecidas matematicamente como Matrizes.</text:p>
      <text:p text:style-name="P205">Exemplo Prático:</text:p>
      <text:p text:style-name="P148">JavaScript</text:p>
      <text:p text:style-name="P156"><text:span text:style-name="Source_20_Text"><text:span text:style-name="T21">// Uma matriz de jogo da velha (3x3)</text:span></text:span></text:p>
      <text:p text:style-name="P156"><text:span text:style-name="Source_20_Text"><text:span text:style-name="T21">const tabuleiro = [</text:span></text:span></text:p>
      <text:p text:style-name="P156"><text:span text:style-name="Source_20_Text"><text:span text:style-name="T21"><text:s text:c="4"/>["X", "O", "X"], // Linha 0</text:span></text:span></text:p>
      <text:p text:style-name="P156"><text:span text:style-name="Source_20_Text"><text:span text:style-name="T21"><text:s text:c="4"/>["O", "X", " "], // Linha 1</text:span></text:span></text:p>
      <text:p text:style-name="P156"><text:soft-page-break/><text:span text:style-name="Source_20_Text"><text:span text:style-name="T21"><text:s text:c="4"/>["X", " ", "O"] <text:s/>// Linha 2</text:span></text:span></text:p>
      <text:p text:style-name="P156"><text:span text:style-name="Source_20_Text"><text:span text:style-name="T21">];</text:span></text:span></text:p>
      <text:p text:style-name="P156"><text:span text:style-name="Source_20_Text"><text:span text:style-name="T21">// Para acessar um elemento, passamos dois colchetes: [linha][coluna]</text:span></text:span></text:p>
      <text:p text:style-name="P156"><text:span text:style-name="Source_20_Text"><text:span text:style-name="T21">console.log(tabuleiro[0][1]); // Saída: "O" (Linha 0, Coluna 1)</text:span></text:span></text:p>
      <text:p text:style-name="P156"><text:span text:style-name="Source_20_Text"><text:span text:style-name="T21">console.log(tabuleiro[2][0]); // Saída: "X" (Linha 2, Coluna 0)</text:span></text:span></text:p>
      <text:h text:style-name="P131" text:outline-level="2"/>
      <text:h text:style-name="P145" text:outline-level="2">Funções em JavaScript: Modularização e Escopo</text:h>
      <text:p text:style-name="P206">As <text:span text:style-name="T22">Funções</text:span> são um dos pilares mais importantes do JavaScript. Elas funcionam como "fábricas de processamento" ou blocos de receitas: você isola um pedaço de código que executa uma tarefa específica, dá um nome a ele e pode <text:span text:style-name="T22">reutilizá-lo quantas vezes quiser</text:span> ao longo do seu programa, evitando repetição de código.</text:p>
      <text:h text:style-name="P79" text:outline-level="3">1. O que é uma Função?</text:h>
      <text:p text:style-name="P8">Em termos lógicos, uma função é um subprograma que recebe dados de entrada (chamados de <text:span text:style-name="T22">parâmetros</text:span>), processa esses dados através de um conjunto de instruções e envia uma resposta de saída (o <text:span text:style-name="T22">retorno</text:span>).</text:p>
      <text:p text:style-name="P8">O ciclo de vida de uma função é dividido em dois momentos cruciais:</text:p>
      <text:list text:style-name="L69">
        <text:list-item>
          <text:p text:style-name="P207"><text:span text:style-name="T22">Declaração:</text:span> Quando você cria a receita e diz ao JavaScript o que ela faz. (O código não roda aqui).</text:p>
        </text:list-item>
        <text:list-item>
          <text:p text:style-name="P207"><text:span text:style-name="T22">Invocação (ou Chamada):</text:span> Quando você ativa a função para executar as instruções na memória.</text:p>
        </text:list-item>
      </text:list>
      <text:h text:style-name="P79" text:outline-level="3">2. Anatomia de uma Função Tradicional</text:h>
      <text:p text:style-name="P8">A forma clássica de declarar uma função no JavaScript utiliza a palavra-chave <text:span text:style-name="Source_20_Text"><text:span text:style-name="T3">function</text:span></text:span>.</text:p>
      <text:p text:style-name="P148">JavaScript</text:p>
      <text:p text:style-name="P149"><text:span text:style-name="Source_20_Text"><text:span text:style-name="T21">// 1. DECLARAÇÃO: Criando a função</text:span></text:span></text:p>
      <text:p text:style-name="P149"><text:span text:style-name="Source_20_Text"><text:span text:style-name="T21">function calcularDobro(numero) { </text:span></text:span></text:p>
      <text:p text:style-name="P149"><text:span text:style-name="Source_20_Text"><text:span text:style-name="T21"><text:s text:c="4"/>// 'numero' é o parâmetro (a variável de entrada)</text:span></text:span></text:p>
      <text:p text:style-name="P149"><text:span text:style-name="Source_20_Text"><text:span text:style-name="T21"><text:s text:c="4"/>const resultado = numero * 2;</text:span></text:span></text:p>
      <text:p text:style-name="P149"><text:span text:style-name="Source_20_Text"><text:span text:style-name="T21"><text:s text:c="4"/>return resultado; // Envia o valor processado para fora da função</text:span></text:span></text:p>
      <text:p text:style-name="P149"><text:span text:style-name="Source_20_Text"><text:span text:style-name="T21">}</text:span></text:span></text:p>
      <text:p text:style-name="P149"><text:span text:style-name="Source_20_Text"><text:span text:style-name="T21">// 2. INVOCAÇÃO: Chamando a função para ser usada</text:span></text:span></text:p>
      <text:p text:style-name="P149"><text:span text:style-name="Source_20_Text"><text:span text:style-name="T21">const valorFinal = calcularDobro(5); // Passamos o número 5 como 'argumento'</text:span></text:span></text:p>
      <text:p text:style-name="P149"><text:span text:style-name="Source_20_Text"><text:span text:style-name="T21">console.log(valorFinal); // Saída: 10</text:span></text:span></text:p>
      <text:p text:style-name="Text_20_body"><text:span text:style-name="T2">O papel da instrução </text:span><text:span text:style-name="Source_20_Text"><text:span text:style-name="T3">return</text:span></text:span><text:span text:style-name="T2">:</text:span></text:p>
      <text:p text:style-name="P8">A palavra-chave<text:span text:style-name="T2"> </text:span><text:span text:style-name="Source_20_Text"><text:span text:style-name="T3">return</text:span></text:span> é fundamental. Ela encerra a execução da função imediatamente e "cospe" o resultado para quem a chamou. Se você esquecer de colocar o <text:span text:style-name="Source_20_Text"><text:span text:style-name="T1">return</text:span></text:span>, a função executará suas linhas mas retornará o valor <text:span text:style-name="Source_20_Text"><text:span text:style-name="T1">undefined</text:span></text:span>.</text:p>
      <text:h text:style-name="Heading_20_3" text:outline-level="3"><text:soft-page-break/>3. Tipos de Funções no JavaScript</text:h>
      <text:p text:style-name="P8">O JavaScript evoluiu e oferece diferentes maneiras de escrever funções, adaptando-se a necessidades de performance e estilo de escrita de código.</text:p>
      <text:p text:style-name="P208">A. Funções Anônimas (Expressão de Função)</text:p>
      <text:p text:style-name="P8">É uma função que não possui um nome explícito após a palavra <text:span text:style-name="Source_20_Text"><text:span text:style-name="T1">function</text:span></text:span>. Ela é armazenada diretamente dentro de uma variável comum.</text:p>
      <text:p text:style-name="P148">JavaScript</text:p>
      <text:p text:style-name="P149"><text:span text:style-name="Source_20_Text"><text:span text:style-name="T21">const saudar = function(nome) {</text:span></text:span></text:p>
      <text:p text:style-name="P149"><text:span text:style-name="Source_20_Text"><text:span text:style-name="T21"><text:s text:c="4"/>return `Olá, ${nome}!`;</text:span></text:span></text:p>
      <text:p text:style-name="P149"><text:span text:style-name="Source_20_Text"><text:span text:style-name="T21">};</text:span></text:span></text:p>
      <text:p text:style-name="P149"><text:span text:style-name="Source_20_Text"><text:span text:style-name="T21">console.log(saudar("Mariana")); // Saída: Olá, Mariana!</text:span></text:span></text:p>
      <text:p text:style-name="P208">B. Arrow Functions (Funções de Seta)</text:p>
      <text:p text:style-name="P8">Introduzidas no JavaScript moderno (ES6), as Arrow Functions fornecem uma sintaxe extremamente compacta. Elas removem a necessidade da palavra <text:span text:style-name="Source_20_Text"><text:span text:style-name="T1">function</text:span></text:span> e usam o símbolo <text:span text:style-name="Source_20_Text"><text:span text:style-name="T1">=&gt;</text:span></text:span>.</text:p>
      <text:p text:style-name="P148">JavaScript</text:p>
      <text:p text:style-name="P149"><text:span text:style-name="Source_20_Text"><text:span text:style-name="T21">// Sintaxe padrão da Arrow Function</text:span></text:span></text:p>
      <text:p text:style-name="P149"><text:span text:style-name="Source_20_Text"><text:span text:style-name="T21">const somar = (a, b) =&gt; {</text:span></text:span></text:p>
      <text:p text:style-name="P149"><text:span text:style-name="Source_20_Text"><text:span text:style-name="T21"><text:s text:c="4"/>return a + b;</text:span></text:span></text:p>
      <text:p text:style-name="P149"><text:span text:style-name="Source_20_Text"><text:span text:style-name="T21">};</text:span></text:span></text:p>
      <text:p text:style-name="P149"><text:span text:style-name="Source_20_Text"><text:span text:style-name="T21">// Se a função tiver apenas UMA linha de código, podemos encurtar ainda mais:</text:span></text:span></text:p>
      <text:p text:style-name="P149"><text:span text:style-name="Source_20_Text"><text:span text:style-name="T21">// O retorno torna-se implícito (não precisa digitar a palavra 'return' nem chaves)</text:span></text:span></text:p>
      <text:p text:style-name="P149"><text:span text:style-name="Source_20_Text"><text:span text:style-name="T21">const multiplicar = (a, b) =&gt; a * b;</text:span></text:span></text:p>
      <text:p text:style-name="P149"><text:span text:style-name="Source_20_Text"><text:span text:style-name="T21">console.log(multiplicar(3, 4)); // Saída: 12</text:span></text:span></text:p>
      <text:h text:style-name="Heading_20_3" text:outline-level="3">4. Parâmetros vs. Argumentos</text:h>
      <text:p text:style-name="P8">Embora sejam usados como sinônimos, há uma diferença técnica conceitual:</text:p>
      <text:list text:style-name="L70">
        <text:list-item>
          <text:p text:style-name="P209"><text:span text:style-name="T22">Parâmetros:</text:span> São os nomes das variáveis declarados na definição da função (as "vagas" esperando preenchimento).</text:p>
        </text:list-item>
        <text:list-item>
          <text:p text:style-name="P209"><text:span text:style-name="T22">Argumentos:</text:span> São os valores reais passados para a função no momento em que ela é invocada.</text:p>
        </text:list-item>
      </text:list>
      <text:p text:style-name="P208">Parâmetros com Valor Padrão (Default Parameters)</text:p>
      <text:p text:style-name="P8">Você pode definir um valor de segurança para caso quem chame a função esqueça de passar um argumento.</text:p>
      <text:p text:style-name="P148">JavaScript</text:p>
      <text:p text:style-name="P149"><text:soft-page-break/><text:span text:style-name="Source_20_Text"><text:span text:style-name="T21">function configurarDesconto(preco, taxa = 0.1) {</text:span></text:span></text:p>
      <text:p text:style-name="P149"><text:span text:style-name="Source_20_Text"><text:span text:style-name="T21"><text:s text:c="4"/>return preco - (preco * taxa);</text:span></text:span></text:p>
      <text:p text:style-name="P149"><text:span text:style-name="Source_20_Text"><text:span text:style-name="T21">}</text:span></text:span></text:p>
      <text:p text:style-name="P149"><text:span text:style-name="Source_20_Text"><text:span text:style-name="T21">console.log(configurarDesconto(100)); <text:s text:c="6"/>// Saída: 90 (Usou a taxa padrão de 10%)</text:span></text:span></text:p>
      <text:p text:style-name="P149"><text:span text:style-name="Source_20_Text"><text:span text:style-name="T21">console.log(configurarDesconto(100, 0.3)); <text:s/>// Saída: 70 (Ignorou o padrão e usou 30%)</text:span></text:span></text:p>
      <text:h text:style-name="Heading_20_3" text:outline-level="3">5. Escopo de Variáveis nas Funções</text:h>
      <text:p text:style-name="P8">O conceito de <text:span text:style-name="T22">Escopo</text:span> determina onde uma variável pode ser acessada ou modificada dentro do seu código. As funções criam uma barreira de proteção conhecida como <text:span text:style-name="T22">Escopo Local</text:span>.</text:p>
      <text:list text:style-name="L71">
        <text:list-item>
          <text:p text:style-name="P210"><text:span text:style-name="T22">Escopo Global:</text:span> Variáveis criadas fora de qualquer função pertencem ao escopo global e podem ser lidas por qualquer parte do arquivo.</text:p>
        </text:list-item>
        <text:list-item>
          <text:p text:style-name="P210"><text:span text:style-name="T22">Escopo Local (ou de Função):</text:span> Variáveis criadas dentro de uma função nasceram ali dentro e morrem ali dentro. O mundo exterior não tem acesso a elas.</text:p>
        </text:list-item>
      </text:list>
      <text:p text:style-name="P148">JavaScript</text:p>
      <text:p text:style-name="P149"><text:span text:style-name="Source_20_Text"><text:span text:style-name="T21">const globalVar = "Eu sou global";</text:span></text:span></text:p>
      <text:p text:style-name="P149"><text:span text:style-name="Source_20_Text"><text:span text:style-name="T21">function testarEscopo() {</text:span></text:span></text:p>
      <text:p text:style-name="P149"><text:span text:style-name="Source_20_Text"><text:span text:style-name="T21"><text:s text:c="4"/>const localVar = "Eu sou local";</text:span></text:span></text:p>
      <text:p text:style-name="P149"><text:span text:style-name="Source_20_Text"><text:span text:style-name="T21"><text:s text:c="4"/>console.log(globalVar); // Funciona! Consegue ler variáveis de fora.</text:span></text:span></text:p>
      <text:p text:style-name="P149"><text:span text:style-name="Source_20_Text"><text:span text:style-name="T21"><text:s text:c="4"/>console.log(localVar); <text:s/>// Funciona!</text:span></text:span></text:p>
      <text:p text:style-name="P149"><text:span text:style-name="Source_20_Text"><text:span text:style-name="T21">}</text:span></text:span></text:p>
      <text:p text:style-name="P149"><text:span text:style-name="Source_20_Text"><text:span text:style-name="T21">testarEscopo();</text:span></text:span></text:p>
      <text:p text:style-name="P149"><text:span text:style-name="Source_20_Text"><text:span text:style-name="T21">console.log(localVar); // ERRO! O sistema quebra porque localVar não existe fora da função.</text:span></text:span></text:p>
      <text:p text:style-name="P211"/>
      <text:p text:style-name="P212">Os Proximos passos em Js</text:p>
      <text:list text:style-name="L72">
        <text:list-item>
          <text:p text:style-name="P213">Função </text:p>
        </text:list-item>
        <text:list-item>
          <text:p text:style-name="P213">objetos</text:p>
        </text:list-item>
        <text:list-item>
          <text:p text:style-name="P213">modularização</text:p>
        </text:list-item>
        <text:list-item>
          <text:p text:style-name="P213">RegEx</text:p>
        </text:list-item>
        <text:list-item>
          <text:p text:style-name="P213">JSON</text:p>
        </text:list-item>
        <text:list-item>
          <text:p text:style-name="P213">AJAX</text:p>
        </text:list-item>
        <text:list-item>
          <text:p text:style-name="P213">NodeJS</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pt" fo:country="BR"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2" style:display-name="Heading 2" style:family="paragraph" style:parent-style-name="Heading" style:next-style-name="Text_20_body" style:default-outline-level="2" style:list-style-name="" style:class="chapter">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1" style:font-family-complex="'Noto Sans Devanagari'" style:font-family-generic-complex="system" style:font-pitch-complex="variable" style:font-size-complex="18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Heading_20_3" style:display-name="Heading 3" style:family="paragraph" style:parent-style-name="Heading" style:next-style-name="Text_20_body" style:default-outline-level="3" style:list-style-name="" style:class="chapter">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list-style-name="" style:class="chapter">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 Devanagari1" style:font-family-complex="'Noto Sans Devanagari'" style:font-family-generic-complex="system" style:font-pitch-complex="variable" style:font-size-complex="24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auto-update="true"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text-overline-style="none" style:text-overline-color="font-color"/>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1cm" fo:text-indent="0cm" style:auto-text-indent="false">
        <style:tab-stops>
          <style:tab-stop style:position="16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nothing"/>
        </style:list-level-properties>
      </text:outline-level-style>
      <text:outline-level-style text:level="2" loext:num-list-format="%2%" style:num-format="">
        <style:list-level-properties text:list-level-position-and-space-mode="label-alignment">
          <style:list-level-label-alignment text:label-followed-by="nothing"/>
        </style:list-level-properties>
      </text:outline-level-style>
      <text:outline-level-style text:level="3" loext:num-list-format="%3%" style:num-format="">
        <style:list-level-properties text:list-level-position-and-space-mode="label-alignment">
          <style:list-level-label-alignment text:label-followed-by="nothing"/>
        </style:list-level-properties>
      </text:outline-level-style>
      <text:outline-level-style text:level="4" loext:num-list-format="%4%" style:num-format="">
        <style:list-level-properties text:list-level-position-and-space-mode="label-alignment">
          <style:list-level-label-alignment text:label-followed-by="nothing"/>
        </style:list-level-properties>
      </text:outline-level-style>
      <text:outline-level-style text:level="5" loext:num-list-format="%5%" style:num-format="">
        <style:list-level-properties text:list-level-position-and-space-mode="label-alignment">
          <style:list-level-label-alignment text:label-followed-by="nothing"/>
        </style:list-level-properties>
      </text:outline-level-style>
      <text:outline-level-style text:level="6" loext:num-list-format="%6%" style:num-format="">
        <style:list-level-properties text:list-level-position-and-space-mode="label-alignment">
          <style:list-level-label-alignment text:label-followed-by="nothing"/>
        </style:list-level-properties>
      </text:outline-level-style>
      <text:outline-level-style text:level="7" loext:num-list-format="%7%" style:num-format="">
        <style:list-level-properties text:list-level-position-and-space-mode="label-alignment">
          <style:list-level-label-alignment text:label-followed-by="nothing"/>
        </style:list-level-properties>
      </text:outline-level-style>
      <text:outline-level-style text:level="8" loext:num-list-format="%8%" style:num-format="">
        <style:list-level-properties text:list-level-position-and-space-mode="label-alignment">
          <style:list-level-label-alignment text:label-followed-by="nothing"/>
        </style:list-level-properties>
      </text:outline-level-style>
      <text:outline-level-style text:level="9" loext:num-list-format="%9%" style:num-format="">
        <style:list-level-properties text:list-level-position-and-space-mode="label-alignment">
          <style:list-level-label-alignment text:label-followed-by="nothing"/>
        </style:list-level-properties>
      </text:outline-level-style>
      <text:outline-level-style text:level="10" loext:num-list-format="%10%" style:num-format="">
        <style:list-level-properties text:list-level-position-and-space-mode="label-alignment">
          <style:list-level-label-alignment text:label-followed-by="nothing"/>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Text_20_body">
      <style:text-properties fo:font-size="10pt" fo:font-style="italic" fo:font-weight="normal" officeooo:rsid="0065800b" officeooo:paragraph-rsid="0065800b" style:font-size-asian="10pt" style:font-style-asian="italic" style:font-weight-asian="normal" style:font-size-complex="10pt" style:font-style-complex="italic" style:font-weight-complex="normal"/>
    </style:style>
    <style:style style:name="MP2" style:family="paragraph" style:parent-style-name="Text_20_body">
      <style:text-properties officeooo:paragraph-rsid="0065800b"/>
    </style:style>
    <style:style style:name="MP3" style:family="paragraph" style:parent-style-name="Text_20_body">
      <style:text-properties fo:font-size="10pt" fo:font-style="italic" fo:font-weight="bold" officeooo:rsid="0065800b" officeooo:paragraph-rsid="0065800b" style:font-size-asian="10pt" style:font-style-asian="italic" style:font-weight-asian="bold" style:font-size-complex="10pt" style:font-style-complex="italic" style:font-weight-complex="bold"/>
    </style:style>
    <style:style style:name="MT1" style:family="text">
      <style:text-properties fo:font-size="10pt" fo:font-style="italic" fo:font-weight="normal" officeooo:rsid="0065800b" style:font-size-asian="10pt" style:font-style-asian="italic" style:font-weight-asian="normal" style:font-size-complex="10pt" style:font-style-complex="italic" style:font-weight-complex="normal"/>
    </style:style>
    <style:style style:name="MT2" style:family="text">
      <style:text-properties fo:font-size="10pt" fo:font-style="italic" fo:font-weight="bold" officeooo:rsid="0065800b" style:font-size-asian="10pt" style:font-style-asian="italic" style:font-weight-asian="bold" style:font-size-complex="10pt" style:font-style-complex="italic" style:font-weight-complex="bold"/>
    </style:style>
    <style:style style:name="MT3" style:family="text">
      <style:text-properties fo:font-size="10pt" fo:font-style="italic" fo:font-weight="bold" officeooo:rsid="00662b79" style:font-size-asian="10pt" style:font-style-asian="italic" style:font-weight-asian="bold" style:font-size-complex="10pt" style:font-style-complex="italic" style:font-weight-complex="bold"/>
    </style:style>
    <style:style style:name="MT4" style:family="text">
      <style:text-properties fo:font-weight="normal" style:font-weight-asian="normal" style:font-weight-complex="normal"/>
    </style:style>
    <style:style style:name="MT5" style:family="text">
      <style:text-properties officeooo:rsid="00662b79"/>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fo:background-color="transparent" draw:fill="non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
        <text:p text:style-name="MP2"><text:span text:style-name="MT1">Feito Por: </text:span><text:span text:style-name="MT2">João de Sousa António </text:span><text:span text:style-name="MT3">(JS.DEV988) </text:span></text:p>
      </style:footer>
      <style:footer-left>
        <text:p text:style-name="MP1"/>
        <text:p text:style-name="MP3"><text:span text:style-name="MT4">Feito Por: </text:span>João de Sousa António <text:span text:style-name="MT5">(JS.DEV988) </text:span></text:p>
      </style:footer-left>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João António</meta:initial-creator>
    <meta:creation-date>2026-06-11T13:53:10.809271952</meta:creation-date>
    <meta:generator>LibreOffice/26.2.3.2$Linux_X86_64 LibreOffice_project/620$Build-2</meta:generator>
    <dc:date>2026-06-20T12:12:19.475045091</dc:date>
    <dc:creator>João António</dc:creator>
    <meta:editing-duration>PT7H4M29S</meta:editing-duration>
    <meta:editing-cycles>79</meta:editing-cycles>
    <meta:document-statistic meta:table-count="1" meta:image-count="1" meta:object-count="0" meta:page-count="38" meta:paragraph-count="957" meta:word-count="9273" meta:character-count="55848" meta:non-whitespace-character-count="47318"/>
  </office:meta>
</office:document-meta>
</file>