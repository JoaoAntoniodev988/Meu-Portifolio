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337cm"/>
    </style:style>
    <style:style style:name="Tabela1.B" style:family="table-column">
      <style:table-column-properties style:column-width="6.706cm"/>
    </style:style>
    <style:style style:name="Tabela1.C" style:family="table-column">
      <style:table-column-properties style:column-width="6.957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/>
    </style:style>
    <style:style style:name="T3" style:family="text">
      <style:text-properties style:font-name="Liberation Serif" fo:font-style="italic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 </text:span><text:span text:style-name="T2">Flexbox</text:span><text:span text:style-name="T1"> (abreviação para </text:span><text:span text:style-name="T3">CSS Flexible Box Layout</text:span><text:span text:style-name="T1">) revolucionou a forma como construímos interfaces na web. Antes dele, alinhar elementos — especialmente centralizar algo verticalmente — exigia "gambiarras" com </text:span><text:span text:style-name="Source_20_Text"><text:span text:style-name="T1">float</text:span></text:span><text:span text:style-name="T1">, margens negativas ou tabelas.</text:span></text:p>
      <text:p text:style-name="P2">A grande força do Flexbox é a sua capacidade de <text:span text:style-name="T4">alinhar, distribuir e reorganizar espaços dinamicamente</text:span> entre itens em um container, mesmo que o tamanho desses itens seja desconhecido ou dinâmico.</text:p>
      <text:p text:style-name="P2">Abaixo, estruturei um guia completo para você dominar esse conceito.</text:p>
      <text:h text:style-name="P3" text:outline-level="2">1. O Conceito Base: Pai e Filhos</text:h>
      <text:p text:style-name="P2">Para o Flexbox funcionar, você precisa entender que ele atua sempre em dois níveis:</text:p>
      <text:list text:style-name="L1">
        <text:list-item>
          <text:p text:style-name="P4"><text:span text:style-name="T2">Flex Container (O Pai):</text:span><text:span text:style-name="T1"> É o elemento que envolve os itens. É nele que você declara </text:span><text:span text:style-name="Source_20_Text"><text:span text:style-name="T1">display: flex;</text:span></text:span><text:span text:style-name="T1"> para ativar a "magia".</text:span></text:p>
        </text:list-item>
        <text:list-item>
          <text:p text:style-name="P5"><text:span text:style-name="T4">Flex Items (Os Filhos):</text:span> São os elementos diretos que estão dentro do container. Eles passam a obedecer às regras definidas pelo pai.</text:p>
        </text:list-item>
      </text:list>
      <text:h text:style-name="P3" text:outline-level="2">2. A Regra dos Eixos (Crucial para entender o Flexbox)</text:h>
      <text:p text:style-name="P2">O Flexbox não usa "esquerda/direita" ou "cima/baixo". Ele usa eixos geométricos:</text:p>
      <text:list text:style-name="L2">
        <text:list-item>
          <text:p text:style-name="P6"><text:span text:style-name="T4">Eixo Principal (Main Axis):</text:span> É a direção principal em que os itens fluem. Por padrão, é horizontal (da esquerda para a direita).</text:p>
        </text:list-item>
        <text:list-item>
          <text:p text:style-name="P6"><text:span text:style-name="T4">Eixo Secundário (Cross Axis):</text:span> É a direção perpendicular ao eixo principal. Por padrão, é vertical (de cima para baixo).</text:p>
        </text:list-item>
      </text:list>
      <text:p text:style-name="P1"><text:span text:style-name="T1">Se você mudar a direção do Flexbox para coluna (</text:span><text:span text:style-name="Source_20_Text"><text:span text:style-name="T1">column</text:span></text:span><text:span text:style-name="T1">), os eixos se invertem! O principal vira vertical e o secundário vira horizontal.</text:span></text:p>
      <text:h text:style-name="P3" text:outline-level="2">3. Propriedades do Container (Aplicadas no Pai)</text:h>
      <text:p text:style-name="P2">Estas são as propriedades que você usará em 90% do tempo para alinhar o layout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<text:span text:style-name="Strong_20_Emphasis"><text:span text:style-name="T1">Propriedade</text:span></text:span></text:p>
            </table:table-cell>
            <table:table-cell table:style-name="Tabela1.A1" office:value-type="string">
              <text:p text:style-name="P7"><text:span text:style-name="Strong_20_Emphasis"><text:span text:style-name="T1">O que faz?</text:span></text:span></text:p>
            </table:table-cell>
            <table:table-cell table:style-name="Tabela1.A1" office:value-type="string">
              <text:p text:style-name="P7"><text:span text:style-name="Strong_20_Emphasis"><text:span text:style-name="T1">Valores mais usados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8"><text:span text:style-name="Source_20_Text"><text:span text:style-name="T2">flex-direction</text:span></text:span></text:p>
          </table:table-cell>
          <table:table-cell table:style-name="Tabela1.A1" office:value-type="string">
            <text:p text:style-name="P9">Define a direção do Eixo Principal.</text:p>
          </table:table-cell>
          <table:table-cell table:style-name="Tabela1.A1" office:value-type="string">
            <text:p text:style-name="P8"><text:span text:style-name="Source_20_Text"><text:span text:style-name="T1">row</text:span></text:span><text:span text:style-name="T1"> (linha - padrão), </text:span><text:span text:style-name="Source_20_Text"><text:span text:style-name="T1">column</text:span></text:span><text:span text:style-name="T1"> (coluna), </text:span><text:span text:style-name="Source_20_Text"><text:span text:style-name="T1">row-reverse</text:span></text:span></text:p>
          </table:table-cell>
        </table:table-row>
        <table:table-row>
          <table:table-cell table:style-name="Tabela1.A1" office:value-type="string">
            <text:p text:style-name="P8"><text:span text:style-name="Source_20_Text"><text:span text:style-name="T2">justify-content</text:span></text:span></text:p>
          </table:table-cell>
          <table:table-cell table:style-name="Tabela1.A1" office:value-type="string">
            <text:p text:style-name="P9">Alinha os itens no Eixo Principal.</text:p>
          </table:table-cell>
          <table:table-cell table:style-name="Tabela1.A1" office:value-type="string">
            <text:p text:style-name="P8"><text:span text:style-name="Source_20_Text"><text:span text:style-name="T1">flex-start</text:span></text:span><text:span text:style-name="T1">, </text:span><text:span text:style-name="Source_20_Text"><text:span text:style-name="T1">center</text:span></text:span><text:span text:style-name="T1">, </text:span><text:span text:style-name="Source_20_Text"><text:span text:style-name="T1">flex-end</text:span></text:span><text:span text:style-name="T1">, </text:span><text:span text:style-name="Source_20_Text"><text:span text:style-name="T1">space-between</text:span></text:span><text:span text:style-name="T1">, </text:span><text:span text:style-name="Source_20_Text"><text:span text:style-name="T1">space-around</text:span></text:span></text:p>
          </table:table-cell>
        </table:table-row>
        <table:table-row>
          <table:table-cell table:style-name="Tabela1.A1" office:value-type="string">
            <text:p text:style-name="P8"><text:span text:style-name="Source_20_Text"><text:span text:style-name="T2">align-items</text:span></text:span></text:p>
          </table:table-cell>
          <table:table-cell table:style-name="Tabela1.A1" office:value-type="string">
            <text:p text:style-name="P9">Alinha os itens no Eixo Secundário.</text:p>
          </table:table-cell>
          <table:table-cell table:style-name="Tabela1.A1" office:value-type="string">
            <text:p text:style-name="P8"><text:span text:style-name="Source_20_Text"><text:span text:style-name="T1">stretch</text:span></text:span><text:span text:style-name="T1"> (padrão), </text:span><text:span text:style-name="Source_20_Text"><text:span text:style-name="T1">center</text:span></text:span><text:span text:style-name="T1">, </text:span><text:span text:style-name="Source_20_Text"><text:span text:style-name="T1">flex-start</text:span></text:span><text:span text:style-name="T1">, </text:span><text:span text:style-name="Source_20_Text"><text:span text:style-name="T1">flex-end</text:span></text:span></text:p>
          </table:table-cell>
        </table:table-row>
        <table:table-row>
          <table:table-cell table:style-name="Tabela1.A1" office:value-type="string">
            <text:p text:style-name="P8"><text:span text:style-name="Source_20_Text"><text:span text:style-name="T2">flex-wrap</text:span></text:span></text:p>
          </table:table-cell>
          <table:table-cell table:style-name="Tabela1.A1" office:value-type="string">
            <text:p text:style-name="P9">Define se os itens devem quebrar a linha se faltar espaço.</text:p>
          </table:table-cell>
          <table:table-cell table:style-name="Tabela1.A1" office:value-type="string">
            <text:p text:style-name="P8"><text:span text:style-name="Source_20_Text"><text:span text:style-name="T1">nowrap</text:span></text:span><text:span text:style-name="T1"> (padrão), </text:span><text:span text:style-name="Source_20_Text"><text:span text:style-name="T1">wrap</text:span></text:span></text:p>
          </table:table-cell>
        </table:table-row>
        <text:soft-page-break/>
        <table:table-row>
          <table:table-cell table:style-name="Tabela1.A1" office:value-type="string">
            <text:p text:style-name="P8"><text:span text:style-name="Source_20_Text"><text:span text:style-name="T2">gap</text:span></text:span></text:p>
          </table:table-cell>
          <table:table-cell table:style-name="Tabela1.A1" office:value-type="string">
            <text:p text:style-name="P9">Cria um espaçamento uniforme entre os itens.</text:p>
          </table:table-cell>
          <table:table-cell table:style-name="Tabela1.A1" office:value-type="string">
            <text:p text:style-name="P8"><text:span text:style-name="Source_20_Text"><text:span text:style-name="T1">10px</text:span></text:span><text:span text:style-name="T1">, </text:span><text:span text:style-name="Source_20_Text"><text:span text:style-name="T1">1rem</text:span></text:span><text:span text:style-name="T1">, </text:span><text:span text:style-name="Source_20_Text"><text:span text:style-name="T1">2%</text:span></text:span></text:p>
          </table:table-cell>
        </table:table-row>
      </table:table>
      <text:h text:style-name="P3" text:outline-level="2"/>
      <text:h text:style-name="P3" text:outline-level="2">4. Propriedades dos Itens (Aplicadas nos Filhos)</text:h>
      <text:p text:style-name="P2">Embora o container controle o layout geral, os filhos podem ter comportamentos individuais.</text:p>
      <text:list text:style-name="L3">
        <text:list-item>
          <text:p text:style-name="P10"><text:bookmark-start text:name="__DdeLink__476_4036392192"/><text:span text:style-name="Source_20_Text"><text:span text:style-name="T2">flex-grow</text:span></text:span><text:bookmark-end text:name="__DdeLink__476_4036392192"/><text:span text:style-name="T2">:</text:span><text:span text:style-name="T1"> Define o quanto um item deve "crescer" para ocupar o espaço vazio disponível. (Aceita números proporcionais, ex: </text:span><text:span text:style-name="Source_20_Text"><text:span text:style-name="T1">1</text:span></text:span><text:span text:style-name="T1">, </text:span><text:span text:style-name="Source_20_Text"><text:span text:style-name="T1">2</text:span></text:span><text:span text:style-name="T1">).</text:span></text:p>
        </text:list-item>
        <text:list-item>
          <text:p text:style-name="P10"><text:span text:style-name="Source_20_Text"><text:span text:style-name="T2">flex-shrink</text:span></text:span><text:span text:style-name="T2">:</text:span><text:span text:style-name="T1"> Define o quanto um item deve "encolher" caso o espaço do container seja menor que o tamanho total dos itens.</text:span></text:p>
        </text:list-item>
        <text:list-item>
          <text:p text:style-name="P10"><text:span text:style-name="Source_20_Text"><text:span text:style-name="T2">flex-basis</text:span></text:span><text:span text:style-name="T2">:</text:span><text:span text:style-name="T1"> Define o tamanho base inicial do item antes de crescer ou encolher (substitui o </text:span><text:span text:style-name="Source_20_Text"><text:span text:style-name="T1">width</text:span></text:span><text:span text:style-name="T1"> dentro do Flexbox).</text:span></text:p>
        </text:list-item>
        <text:list-item>
          <text:p text:style-name="P10"><text:bookmark-start text:name="__DdeLink__478_4036392192"/><text:span text:style-name="Source_20_Text"><text:span text:style-name="T2">align-self</text:span></text:span><text:span text:style-name="T2">:</text:span><text:bookmark-end text:name="__DdeLink__478_4036392192"/><text:span text:style-name="T1"> Permite que um único item ignore o </text:span><text:span text:style-name="Source_20_Text"><text:span text:style-name="T1">align-items</text:span></text:span><text:span text:style-name="T1"> do pai e tenha seu próprio alinhamento no eixo secundário (ex: o container alinha tudo ao centro, mas você quer um botão específico no topo).</text:span></text:p>
        </text:list-item>
      </text:list>
      <text:p text:style-name="P11"><text:span text:style-name="T2">Dica de Ouro:</text:span><text:span text:style-name="T1"> Existe uma propriedade abreviada chamada apenas de </text:span><text:span text:style-name="Source_20_Text"><text:span text:style-name="T2">flex</text:span></text:span><text:span text:style-name="T1">. Se você aplicar </text:span><text:span text:style-name="Source_20_Text"><text:span text:style-name="T1">flex: 1;</text:span></text:span><text:span text:style-name="T1"> em três colunas filhas, todas elas dividirão o espaço do pai igualmente, ocupando 33.3% cada.</text:span></text:p>
      <text:p text:style-name="Text_20_body">Se o Flexbox mudou a forma como alinhamos elementos em uma única dimensão, o <text:span text:style-name="T4">CSS Grid Layout</text:span> redefine totalmente a construção de páginas web completas. Ele é o sistema de layout mais poderoso do CSS porque é <text:span text:style-name="T4">bidimensional</text:span>, o que significa que ele controla linhas e colunas ao mesmo tempo.</text:p>
      <text:p text:style-name="Text_20_body">Enquanto o Flexbox é ideal para componentes menores (como menus ou grupos de botões), o Grid Layout foi desenhado para a <text:span text:style-name="T4">macroestrutura</text:span> da página (como o esqueleto de um portal de notícias, painéis administrativos ou e-commerces).</text:p>
      <text:p text:style-name="Text_20_body">[Image comparing 1D Flexbox layout versus 2D CSS Grid layout]</text:p>
      <text:p text:style-name="Text_20_body">Abaixo, apresento o guia completo de estudos do Grid Layout, seguido por um <text:span text:style-name="T4">Laboratório Prático (Playground)</text:span> completo para você salvar e testar tudo no seu navegador.</text:p>
      <text:h text:style-name="Heading_20_2" text:outline-level="2">CSS Grid Layout</text:h>
      <text:h text:style-name="Heading_20_3" text:outline-level="3">A Anatomia do Grid (Terminologia)</text:h>
      <text:p text:style-name="Text_20_body">Para não se perder no Grid, você precisa entender os termos técnicos que os navegadores usam:</text:p>
      <text:list text:style-name="L4">
        <text:list-item>
          <text:p text:style-name="P12"><text:span text:style-name="T4">Grid Container (O Pai):</text:span> O elemento onde você aplica <text:span text:style-name="Source_20_Text">display: grid;</text:span>.</text:p>
        </text:list-item>
        <text:list-item>
          <text:p text:style-name="P12"><text:span text:style-name="T4">Grid Item (Os Filhos):</text:span> Os elementos que estão diretamente dentro do container.</text:p>
        </text:list-item>
        <text:list-item>
          <text:p text:style-name="P12"><text:soft-page-break/><text:span text:style-name="T4">Grid Track (Trilha):</text:span> O espaço entre duas linhas do grid. Basicamente, uma coluna ou uma linha inteira.</text:p>
        </text:list-item>
        <text:list-item>
          <text:p text:style-name="P12"><text:span text:style-name="T4">Grid Cell (Célula):</text:span> O "quadradinho" resultante da interseção de uma linha e uma coluna (como uma célula do Excel).</text:p>
        </text:list-item>
        <text:list-item>
          <text:p text:style-name="P12"><text:span text:style-name="T4">Grid Area (Área):</text:span> Qualquer espaço retangular composto por uma ou mais células do grid.</text:p>
        </text:list-item>
        <text:list-item>
          <text:p text:style-name="P12"><text:span text:style-name="T4">Grid Lines (Linhas):</text:span> As linhas divisorias que criam o grid. Elas são numeradas automaticamente (linha 1, linha 2...) e servem para posicionar os itens.</text:p>
        </text:list-item>
      </text:list>
      <text:h text:style-name="Heading_20_3" text:outline-level="3">Propriedades do Container (Pai)</text:h>
      <text:list text:style-name="L5">
        <text:list-item>
          <text:p text:style-name="P13"><text:span text:style-name="Source_20_Text"><text:span text:style-name="T4">grid-template-columns</text:span></text:span><text:span text:style-name="T4"> e </text:span><text:span text:style-name="Source_20_Text"><text:span text:style-name="T4">grid-template-rows</text:span></text:span><text:span text:style-name="T4">:</text:span> Definem o número e o tamanho das colunas e linhas.</text:p>
          <text:list>
            <text:list-item>
              <text:p text:style-name="P13"><text:span text:style-name="T5">A unidade </text:span><text:span text:style-name="Source_20_Text"><text:span text:style-name="T5">fr</text:span></text:span><text:span text:style-name="T5"> (Fraction):</text:span> Uma unidade exclusiva do Grid que representa uma fração do espaço disponível. <text:span text:style-name="Source_20_Text">1fr 2fr 1fr</text:span> cria três colunas, onde a do meio tem o dobro do tamanho das laterais.</text:p>
            </text:list-item>
            <text:list-item>
              <text:p text:style-name="P13"><text:span text:style-name="T5">A função </text:span><text:span text:style-name="Source_20_Text"><text:span text:style-name="T5">repeat()</text:span></text:span><text:span text:style-name="T5">:</text:span> Economiza código. <text:span text:style-name="Source_20_Text">repeat(3, 1fr)</text:span> é o mesmo que escrever <text:span text:style-name="Source_20_Text">1fr 1fr 1fr</text:span>.</text:p>
            </text:list-item>
          </text:list>
        </text:list-item>
        <text:list-item>
          <text:p text:style-name="P13"><text:span text:style-name="Source_20_Text"><text:span text:style-name="T4">gap</text:span></text:span><text:span text:style-name="T4">:</text:span> Define o espaçamento entre as células (linhas e colunas) de forma global.</text:p>
        </text:list-item>
        <text:list-item>
          <text:p text:style-name="P13"><text:span text:style-name="Source_20_Text"><text:span text:style-name="T4">justify-items</text:span></text:span><text:span text:style-name="T4"> / </text:span><text:span text:style-name="Source_20_Text"><text:span text:style-name="T4">align-items</text:span></text:span><text:span text:style-name="T4">:</text:span> Alinha o conteúdo dos itens <text:span text:style-name="T5">dentro</text:span> de suas respectivas células (Horizontal / Vertical).</text:p>
        </text:list-item>
        <text:list-item>
          <text:p text:style-name="P13"><text:span text:style-name="Source_20_Text"><text:span text:style-name="T4">grid-template-areas</text:span></text:span><text:span text:style-name="T4">:</text:span> Permite "desenhar" o layout do site textualmente na folha de estilo, nomeando áreas e associando-as aos elementos filhos.</text:p>
        </text:list-item>
      </text:list>
      <text:h text:style-name="Heading_20_3" text:outline-level="3">Propriedades dos Itens (Filhos)</text:h>
      <text:p text:style-name="Text_20_body">No Grid, os filhos podem se esticar para ocupar várias colunas ou linhas usando as linhas de marcação:</text:p>
      <text:list text:style-name="L6">
        <text:list-item>
          <text:p text:style-name="P14"><text:span text:style-name="Source_20_Text"><text:span text:style-name="T4">grid-column</text:span></text:span><text:span text:style-name="T4">:</text:span> Atalho para definir onde o item começa e onde termina horizontalmente. Exemplo: <text:span text:style-name="Source_20_Text">grid-column: 1 / 3;</text:span> (o item ocupa da linha 1 até a linha 3, ou seja, duas colunas).</text:p>
        </text:list-item>
        <text:list-item>
          <text:p text:style-name="P14"><text:span text:style-name="Source_20_Text"><text:span text:style-name="T4">grid-row</text:span></text:span><text:span text:style-name="T4">:</text:span> O mesmo que o anterior, mas para o sentido vertical (linhas).</text:p>
        </text:list-item>
        <text:list-item>
          <text:p text:style-name="P14"><text:span text:style-name="Source_20_Text"><text:span text:style-name="T4">grid-area</text:span></text:span><text:span text:style-name="T4">:</text:span> Associa o item filho a um nome definido na propriedade <text:span text:style-name="Source_20_Text">grid-template-areas</text:span> do pai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09T17:18:41.238642215</meta:creation-date>
    <dc:date>2026-06-11T09:14:07.597398024</dc:date>
    <dc:creator>João António</dc:creator>
    <meta:editing-duration>PT10H1M7S</meta:editing-duration>
    <meta:editing-cycles>4</meta:editing-cycles>
    <meta:generator>LibreOffice/26.2.3.2$Linux_X86_64 LibreOffice_project/620$Build-2</meta:generator>
    <meta:document-statistic meta:table-count="1" meta:image-count="0" meta:object-count="0" meta:page-count="3" meta:paragraph-count="64" meta:word-count="919" meta:character-count="5616" meta:non-whitespace-character-count="4782"/>
  </office:meta>
</office:document-meta>
</file>